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Inter" svg:font-family="Inter, 'Inter Fallback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Inter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margin-top="0cm" fo:margin-bottom="0.499cm" style:contextual-spacing="false" fo:orphans="2" fo:widows="2" fo:text-indent="0cm" style:auto-text-indent="false"/>
    </style:style>
    <style:style style:name="P3" style:family="paragraph" style:parent-style-name="Text_20_body" style:list-style-name="L1"/>
    <style:style style:name="P4" style:family="paragraph" style:parent-style-name="Text_20_body" style:list-style-name="L2">
      <style:text-properties fo:font-weight="bold"/>
    </style:style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Preformatted_20_Text">
      <style:paragraph-properties fo:margin-top="0cm" fo:margin-bottom="0.499cm" style:contextual-spacing="false"/>
    </style:style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Text_20_body" style:list-style-name="L12"/>
    <style:style style:name="P1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Inter" fo:font-size="14pt" fo:letter-spacing="normal" fo:font-style="normal" fo:font-weight="bold" style:font-size-asian="14pt" style:font-weight-asian="bold" style:font-size-complex="14pt" style:font-weight-complex="bold"/>
    </style:style>
    <style:style style:name="P18" style:family="paragraph" style:parent-style-name="Text_20_body" style:list-style-name="L13">
      <style:text-properties fo:font-weight="bold"/>
    </style:style>
    <style:style style:name="P19" style:family="paragraph" style:parent-style-name="Text_20_body" style:list-style-name="L14"/>
    <style:style style:name="P20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size="16pt" fo:font-weight="bold" style:font-size-asian="16pt" style:font-weight-asian="bold" style:font-size-complex="16pt" style:font-weight-complex="bold" loext:padding="0cm" loext:border="none"/>
    </style:style>
    <style:style style:name="P21" style:family="paragraph" style:parent-style-name="Standard">
      <style:paragraph-properties fo:margin-left="0cm" fo:margin-right="0cm" fo:margin-top="0cm" fo:margin-bottom="0.499cm" style:contextual-spacing="false" fo:orphans="1" fo:text-indent="0cm" style:auto-text-indent="false"/>
      <style:text-properties loext:padding="0cm" loext:border="none"/>
    </style:style>
    <style:style style:name="P22" style:family="paragraph" style:parent-style-name="Text_20_body" style:list-style-name="L15">
      <style:text-properties fo:font-weight="bold"/>
    </style:style>
    <style:style style:name="P23" style:family="paragraph" style:parent-style-name="Text_20_body" style:list-style-name="L15"/>
    <style:style style:name="P24" style:family="paragraph" style:parent-style-name="Text_20_body">
      <style:paragraph-properties fo:margin-left="0cm" fo:margin-right="0cm" fo:margin-top="0cm" fo:margin-bottom="0cm" style:contextual-spacing="true" fo:line-height="100%" fo:orphans="2" fo:widows="2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25" style:family="paragraph" style:parent-style-name="Text_20_body">
      <style:paragraph-properties fo:margin-left="0cm" fo:margin-right="0cm" fo:margin-top="0cm" fo:margin-bottom="0.499cm" style:contextual-spacing="false" fo:line-height="100%" fo:orphans="2" fo:widows="2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26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style:font-name="Inter" fo:font-size="14pt" fo:letter-spacing="normal" fo:font-style="normal" fo:font-weight="bold" style:font-size-asian="14pt" style:font-weight-asian="bold" style:font-size-complex="14pt" style:font-weight-complex="bold"/>
    </style:style>
    <style:style style:name="P27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28" style:family="paragraph" style:parent-style-name="Text_20_body" style:list-style-name="L16"/>
    <style:style style:name="P29" style:family="paragraph" style:parent-style-name="Heading_20_1">
      <style:text-properties fo:font-size="14pt" style:font-size-asian="14pt" style:font-size-complex="14pt"/>
    </style:style>
    <style:style style:name="P30" style:family="paragraph" style:parent-style-name="Text_20_body">
      <style:text-properties officeooo:rsid="00060faf" officeooo:paragraph-rsid="00060faf"/>
    </style:style>
    <style:style style:name="P31" style:family="paragraph" style:parent-style-name="Text_20_body">
      <style:text-properties fo:font-variant="normal" fo:text-transform="none" style:font-name="Inter" fo:font-size="12pt" fo:letter-spacing="normal" fo:font-style="normal" fo:font-weight="normal" officeooo:rsid="00060faf" officeooo:paragraph-rsid="00060faf"/>
    </style:style>
    <style:style style:name="P32" style:family="paragraph" style:parent-style-name="Text_20_body">
      <style:text-properties fo:font-size="15pt" fo:font-weight="bold" officeooo:rsid="000744d9" officeooo:paragraph-rsid="000744d9" style:font-size-asian="15pt" style:font-weight-asian="bold" style:font-size-complex="15pt" style:font-weight-complex="bold"/>
    </style:style>
    <style:style style:name="P33" style:family="paragraph" style:parent-style-name="Heading_20_3">
      <style:text-properties fo:font-size="15pt" fo:font-weight="bold" officeooo:rsid="000744d9" officeooo:paragraph-rsid="000744d9" style:font-size-asian="15pt" style:font-weight-asian="bold" style:font-size-complex="15pt" style:font-weight-complex="bold"/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fo:font-size="15pt" fo:font-weight="bold" officeooo:rsid="000744d9" style:font-size-asian="15pt" style:font-weight-asian="bold" style:font-size-complex="15pt" style:font-weight-complex="bold"/>
    </style:style>
    <style:style style:name="P35" style:family="paragraph" style:parent-style-name="Preformatted_20_Text">
      <style:paragraph-properties fo:margin-left="0cm" fo:margin-right="0cm" fo:line-height="115%" fo:text-indent="0cm" style:auto-text-indent="false"/>
      <style:text-properties fo:font-size="15pt" fo:font-weight="bold" officeooo:rsid="000744d9" style:font-size-asian="15pt" style:font-weight-asian="bold" style:font-size-complex="15pt" style:font-weight-complex="bold"/>
    </style:style>
    <style:style style:name="P36" style:family="paragraph" style:parent-style-name="Preformatted_20_Text">
      <style:paragraph-properties fo:margin-left="0cm" fo:margin-right="0cm" fo:margin-top="0cm" fo:margin-bottom="0.499cm" style:contextual-spacing="false" fo:line-height="115%" fo:text-indent="0cm" style:auto-text-indent="false"/>
      <style:text-properties fo:font-size="15pt" fo:font-weight="bold" officeooo:rsid="000744d9" style:font-size-asian="15pt" style:font-weight-asian="bold" style:font-size-complex="15pt" style:font-weight-complex="bold"/>
    </style:style>
    <style:style style:name="P37" style:family="paragraph" style:parent-style-name="Text_20_body" style:list-style-name="L17">
      <style:paragraph-properties fo:margin-left="0cm" fo:margin-right="0cm" fo:margin-top="0cm" fo:margin-bottom="0cm" style:contextual-spacing="false" fo:text-indent="0cm" style:auto-text-indent="false"/>
      <style:text-properties fo:font-size="15pt" fo:font-weight="bold" officeooo:rsid="000744d9" style:font-size-asian="15pt" style:font-weight-asian="bold" style:font-size-complex="15pt" style:font-weight-complex="bold"/>
    </style:style>
    <style:style style:name="P38" style:family="paragraph" style:parent-style-name="Text_20_body" style:list-style-name="L17">
      <style:paragraph-properties fo:margin-left="0cm" fo:margin-right="0cm" fo:text-indent="0cm" style:auto-text-indent="false"/>
      <style:text-properties fo:font-size="15pt" fo:font-weight="bold" officeooo:rsid="000744d9" style:font-size-asian="15pt" style:font-weight-asian="bold" style:font-size-complex="15pt" style:font-weight-complex="bold"/>
    </style:style>
    <style:style style:name="P39" style:family="paragraph" style:parent-style-name="Horizontal_20_Line">
      <style:paragraph-properties fo:margin-top="0cm" fo:margin-bottom="0.247cm" style:contextual-spacing="false" fo:line-height="115%"/>
      <style:text-properties fo:font-size="15pt" fo:font-weight="bold" officeooo:rsid="000744d9" style:font-size-asian="15pt" style:font-weight-asian="bold" style:font-size-complex="15pt" style:font-weight-complex="bold"/>
    </style:style>
    <style:style style:name="P40" style:family="paragraph" style:parent-style-name="Heading_20_3">
      <style:paragraph-properties fo:margin-left="0cm" fo:margin-right="0cm" fo:margin-top="0cm" fo:margin-bottom="0.247cm" style:contextual-spacing="false" fo:line-height="115%" fo:text-indent="0cm" style:auto-text-indent="false"/>
      <style:text-properties fo:font-size="15pt" officeooo:rsid="000744d9" style:font-size-asian="15pt" style:font-size-complex="15pt"/>
    </style:style>
    <style:style style:name="P41" style:family="paragraph" style:parent-style-name="Text_20_body" style:list-style-name="L18">
      <style:paragraph-properties fo:margin-left="0cm" fo:margin-right="0cm" fo:margin-top="0cm" fo:margin-bottom="0cm" style:contextual-spacing="false" fo:text-indent="0cm" style:auto-text-indent="false"/>
      <style:text-properties fo:font-size="15pt" fo:font-weight="bold" officeooo:rsid="000744d9" style:font-size-asian="15pt" style:font-weight-asian="bold" style:font-size-complex="15pt" style:font-weight-complex="bold"/>
    </style:style>
    <style:style style:name="P42" style:family="paragraph" style:parent-style-name="Text_20_body" style:list-style-name="L18">
      <style:paragraph-properties fo:margin-left="0cm" fo:margin-right="0cm" fo:text-indent="0cm" style:auto-text-indent="false"/>
      <style:text-properties fo:font-size="15pt" fo:font-weight="bold" officeooo:rsid="000744d9" style:font-size-asian="15pt" style:font-weight-asian="bold" style:font-size-complex="15pt" style:font-weight-complex="bold"/>
    </style:style>
    <style:style style:name="P43" style:family="paragraph" style:parent-style-name="Text_20_body">
      <style:text-properties fo:font-size="15pt" fo:font-weight="bold" officeooo:rsid="000a7578" officeooo:paragraph-rsid="000a7578" style:font-size-asian="15pt" style:font-weight-asian="bold" style:font-size-complex="15pt" style:font-weight-complex="bold"/>
    </style:style>
    <style:style style:name="P44" style:family="paragraph" style:parent-style-name="Text_20_body">
      <style:text-properties fo:font-size="6pt" fo:font-weight="bold" officeooo:rsid="000a7578" officeooo:paragraph-rsid="000a7578" style:font-size-asian="5.25pt" style:font-weight-asian="bold" style:font-size-complex="6pt" style:font-weight-complex="bold"/>
    </style:style>
    <style:style style:name="P45" style:family="paragraph" style:parent-style-name="Text_20_body">
      <style:text-properties fo:font-size="13pt" fo:font-weight="bold" officeooo:rsid="000a7578" officeooo:paragraph-rsid="000a7578" style:font-size-asian="13pt" style:font-weight-asian="bold" style:font-size-complex="13pt" style:font-weight-complex="bold"/>
    </style:style>
    <style:style style:name="P46" style:family="paragraph" style:parent-style-name="Text_20_body">
      <style:text-properties fo:font-size="12pt" fo:font-weight="bold" officeooo:rsid="000a7578" officeooo:paragraph-rsid="000a7578" style:font-size-asian="12pt" style:font-weight-asian="bold" style:font-size-complex="12pt" style:font-weight-complex="bold"/>
    </style:style>
    <style:style style:name="P47" style:family="paragraph" style:parent-style-name="Heading_20_1">
      <style:paragraph-properties fo:margin-left="0cm" fo:margin-right="0cm" fo:orphans="2" fo:widows="2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48" style:family="paragraph" style:parent-style-name="Text_20_body" style:list-style-name="L19">
      <style:paragraph-properties fo:margin-left="0cm" fo:margin-right="0cm" fo:margin-top="0cm" fo:margin-bottom="0cm" style:contextual-spacing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49" style:family="paragraph" style:parent-style-name="Text_20_body" style:list-style-name="L19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50" style:family="paragraph" style:parent-style-name="Text_20_body">
      <style:paragraph-properties fo:margin-left="0cm" fo:margin-right="0cm" fo:orphans="2" fo:widows="2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/>
    </style:style>
    <style:style style:name="T2" style:family="text">
      <style:text-properties officeooo:rsid="00102895"/>
    </style:style>
    <style:style style:name="T3" style:family="text">
      <style:text-properties fo:font-variant="normal" fo:text-transform="none" style:font-name="Inter" fo:letter-spacing="normal" fo:font-style="normal" officeooo:rsid="0002c6c7"/>
    </style:style>
    <style:style style:name="T4" style:family="text">
      <style:text-properties fo:font-variant="normal" fo:text-transform="none" style:font-name="Inter" fo:letter-spacing="normal" fo:font-style="normal"/>
    </style:style>
    <style:style style:name="T5" style:family="text">
      <style:text-properties style:font-name="Liberation Mono"/>
    </style:style>
    <style:style style:name="T6" style:family="text">
      <style:text-properties fo:font-variant="normal" fo:text-transform="none" style:font-name="Inter" fo:font-size="12pt" fo:letter-spacing="normal" fo:font-style="normal" fo:font-weight="normal"/>
    </style:style>
    <style:style style:name="T7" style:family="text">
      <style:text-properties officeooo:rsid="0010b4ad"/>
    </style:style>
    <style:style style:name="T8" style:family="text">
      <style:text-properties officeooo:rsid="000e8e60"/>
    </style:style>
    <style:style style:name="T9" style:family="text">
      <style:text-properties officeooo:rsid="000af35b"/>
    </style:style>
    <style:style style:name="T10" style:family="text">
      <style:text-properties officeooo:rsid="000d46d7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ça a arquitetura de um Sistema Inteligente de Logística usando o Uber como exemplo de sistema que vou chamar de Uber da Logística (Melhor Caminho, Previsao de Chegada, Rastreabilidade). Esse sistema Inteigente de Logística fará o Cadastro dos veículos que permite 1 -Entregar: 1 - Equipamentos em Geral incluso móveis, ex.: Fogão, Geladeira, Motor, Peças em geral, Ventilador; 2 - Grãos Secos, ex.: Milho e Soja Os usuários podem ser tanto pessoa Física quanto pessoa Jurídica;</text:p>
      <text:p text:style-name="P2"/>
      <text:h text:style-name="Heading_20_1" text:outline-level="1">Arquitetura — Sistema Inteligente de Logística</text:h>
      <text:h text:style-name="Heading_20_2" text:outline-level="2">“Uber da Logística” — Melhor Caminho, Previsão de Chegada e Rastreabilidade</text:h>
      <text:p text:style-name="Text_20_body">Roberto, abaixo está uma arquitetura completa para um <text:span text:style-name="T1">Sistema Inteligente de Logística</text:span>, inspirado no modelo do Uber, mas voltado para <text:span text:style-name="T1">transporte de cargas</text:span>, como:</text:p>
      <text:list text:style-name="L1">
        <text:list-item>
          <text:p text:style-name="P3"><text:span text:style-name="T1">Equipamentos em geral e móveis</text:span><text:line-break/>Exemplos: fogão, geladeira, motor, peças, ventilador, móveis etc.</text:p>
        </text:list-item>
        <text:list-item>
          <text:p text:style-name="P3"><text:span text:style-name="T1">Grãos secos</text:span><text:line-break/>Exemplos: milho, soja e outros produtos agrícolas secos.</text:p>
        </text:list-item>
      </text:list>
      <text:p text:style-name="Text_20_body">O sistema atenderá usuários <text:span text:style-name="T1">Pessoa Física</text:span> e <text:span text:style-name="T1">Pessoa Jurídica</text:span>, permitindo solicitar entregas, cadastrar veículos, rastrear cargas, calcular melhor rota, prever chegada e gerenciar todo o ciclo logístico.</text:p>
      <text:p text:style-name="Horizontal_20_Line"/>
      <text:h text:style-name="Heading_20_1" text:outline-level="1">1. Visão Geral do Sistema</text:h>
      <text:p text:style-name="Text_20_body">O sistema funciona como uma plataforma digital que conecta:</text:p>
      <text:list text:style-name="L2">
        <text:list-item>
          <text:p text:style-name="P4">Clientes embarcadores</text:p>
          <text:list>
            <text:list-item>
              <text:p text:style-name="P5">Pessoa Física</text:p>
            </text:list-item>
            <text:list-item>
              <text:p text:style-name="P5">Pessoa Jurídica</text:p>
            </text:list-item>
          </text:list>
        </text:list-item>
        <text:list-item>
          <text:p text:style-name="P4">Motoristas / Transportadores</text:p>
          <text:list>
            <text:list-item>
              <text:p text:style-name="P5">Autônomos</text:p>
            </text:list-item>
            <text:list-item>
              <text:p text:style-name="P5">Empresas transportadoras</text:p>
            </text:list-item>
          </text:list>
        </text:list-item>
        <text:list-item>
          <text:p text:style-name="P4">Veículos</text:p>
          <text:list>
            <text:list-item>
              <text:p text:style-name="P5">Caminhonete</text:p>
            </text:list-item>
            <text:list-item>
              <text:p text:style-name="P5">Fiorino</text:p>
            </text:list-item>
            <text:list-item>
              <text:p text:style-name="P5">Van</text:p>
            </text:list-item>
            <text:list-item>
              <text:p text:style-name="P5">Caminhão pequeno</text:p>
            </text:list-item>
            <text:list-item>
              <text:p text:style-name="P5"><text:soft-page-break/>Caminhão médio</text:p>
            </text:list-item>
            <text:list-item>
              <text:p text:style-name="P5">Caminhão baú</text:p>
            </text:list-item>
            <text:list-item>
              <text:p text:style-name="P5">Caminhão graneleiro</text:p>
            </text:list-item>
            <text:list-item>
              <text:p text:style-name="P5">Carreta</text:p>
            </text:list-item>
            <text:list-item>
              <text:p text:style-name="P5">Bitrem, se necessário</text:p>
            </text:list-item>
          </text:list>
        </text:list-item>
        <text:list-item>
          <text:p text:style-name="P4">Cargas</text:p>
          <text:list>
            <text:list-item>
              <text:p text:style-name="P5">Equipamentos</text:p>
            </text:list-item>
            <text:list-item>
              <text:p text:style-name="P5">Móveis</text:p>
            </text:list-item>
            <text:list-item>
              <text:p text:style-name="P5">Peças</text:p>
            </text:list-item>
            <text:list-item>
              <text:p text:style-name="P5">Motores</text:p>
            </text:list-item>
            <text:list-item>
              <text:p text:style-name="P5">Grãos secos</text:p>
            </text:list-item>
          </text:list>
        </text:list-item>
      </text:list>
      <text:p text:style-name="Horizontal_20_Line"/>
      <text:h text:style-name="Heading_20_1" text:outline-level="1">2. Objetivos Principais</text:h>
      <text:p text:style-name="Text_20_body">O sistema inteligente deverá permitir:</text:p>
      <text:h text:style-name="Heading_20_2" text:outline-level="2">Para o cliente</text:h>
      <text:list text:style-name="L3">
        <text:list-item>
          <text:p text:style-name="P6">Cadastrar-se como <text:span text:style-name="T1">Pessoa Física</text:span> ou <text:span text:style-name="T1">Pessoa Jurídica</text:span></text:p>
        </text:list-item>
        <text:list-item>
          <text:p text:style-name="P6">Solicitar transporte de carga</text:p>
        </text:list-item>
        <text:list-item>
          <text:p text:style-name="P6">Informar origem e destino</text:p>
        </text:list-item>
        <text:list-item>
          <text:p text:style-name="P6">Informar tipo de carga</text:p>
        </text:list-item>
        <text:list-item>
          <text:p text:style-name="P6">Informar peso, volume e características especiais</text:p>
        </text:list-item>
        <text:list-item>
          <text:p text:style-name="P6">Receber estimativa de preço</text:p>
        </text:list-item>
        <text:list-item>
          <text:p text:style-name="P6">Acompanhar o veículo em tempo real</text:p>
        </text:list-item>
        <text:list-item>
          <text:p text:style-name="P6">Visualizar previsão de chegada</text:p>
        </text:list-item>
        <text:list-item>
          <text:p text:style-name="P6">Receber comprovante de entrega</text:p>
        </text:list-item>
      </text:list>
      <text:h text:style-name="Heading_20_2" text:outline-level="2" text:is-list-header="true">Para o motorista ou transportador</text:h>
      <text:list text:style-name="L4">
        <text:list-item>
          <text:p text:style-name="P7">Cadastrar veículo</text:p>
        </text:list-item>
        <text:list-item>
          <text:p text:style-name="P7">Informar disponibilidade</text:p>
        </text:list-item>
        <text:list-item>
          <text:p text:style-name="P7">Aceitar ou recusar fretes</text:p>
        </text:list-item>
        <text:list-item>
          <text:p text:style-name="P7">Navegar pela melhor rota</text:p>
        </text:list-item>
        <text:list-item>
          <text:p text:style-name="P7">Atualizar status da entrega</text:p>
        </text:list-item>
        <text:list-item>
          <text:p text:style-name="P7"><text:soft-page-break/>Enviar foto/comprovante de coleta e entrega</text:p>
        </text:list-item>
        <text:list-item>
          <text:p text:style-name="P7">Receber pagamentos</text:p>
        </text:list-item>
      </text:list>
      <text:h text:style-name="Heading_20_2" text:outline-level="2" text:is-list-header="true">Para o administrador</text:h>
      <text:list text:style-name="L5">
        <text:list-item>
          <text:p text:style-name="P8">Gerenciar usuários</text:p>
        </text:list-item>
        <text:list-item>
          <text:p text:style-name="P8">Validar documentos</text:p>
        </text:list-item>
        <text:list-item>
          <text:p text:style-name="P8">Monitorar entregas</text:p>
        </text:list-item>
        <text:list-item>
          <text:p text:style-name="P8">Acompanhar indicadores operacionais</text:p>
        </text:list-item>
        <text:list-item>
          <text:p text:style-name="P8">Gerenciar disputas, cancelamentos e suporte</text:p>
        </text:list-item>
        <text:list-item>
          <text:p text:style-name="P8">Configurar regras de preço, tipos de carga e veículos</text:p>
        </text:list-item>
      </text:list>
      <text:p text:style-name="Horizontal_20_Line"/>
      <text:h text:style-name="Heading_20_1" text:outline-level="1">3. Módulos Principais da Arquitetura</text:h>
      <text:p text:style-name="Text_20_body">A arquitetura pode ser dividida nos seguintes módulos:</text:p>
      <text:p text:style-name="P9">Sistema Inteligente de Logística<text:line-break/>│<text:line-break/>├── Aplicativo do Cliente<text:line-break/>├── Aplicativo do Motorista<text:line-break/>├── Painel Administrativo<text:line-break/>├── API Gateway<text:line-break/>├── Módulo de Cadastro e Identidade<text:line-break/>├── Módulo de Veículos<text:line-break/>├── Módulo de Solicitação de Frete<text:line-break/>├── Módulo de Precificação<text:line-break/>├── Módulo de Matching Inteligente<text:line-break/>├── Módulo de Roteirização<text:line-break/>├── Módulo de Previsão de Chegada<text:line-break/>├── Módulo de Rastreabilidade<text:line-break/>├── Módulo de Pagamentos<text:line-break/>├── Módulo de Notificações<text:line-break/>├── Módulo de Documentos<text:line-break/>├── Módulo de Avaliações<text:line-break/>├── Banco de Dados<text:line-break/>├── Serviços de Mapas e GPS<text:line-break/>└── Camada de Inteligência Artificial</text:p>
      <text:p text:style-name="Horizontal_20_Line"/>
      <text:h text:style-name="Heading_20_1" text:outline-level="1">4. Arquitetura em Camadas</text:h>
      <text:h text:style-name="Heading_20_2" text:outline-level="2">4.1. Camada de Apresentação</text:h>
      <text:p text:style-name="Text_20_body">Esta é a camada usada diretamente pelos usuários.</text:p>
      <text:h text:style-name="Heading_20_3" text:outline-level="3">Aplicativo do Cliente</text:h>
      <text:p text:style-name="Text_20_body">Pode ser um aplicativo mobile ou web.</text:p>
      <text:p text:style-name="Text_20_body"><text:soft-page-break/>Funcionalidades:</text:p>
      <text:list text:style-name="L6">
        <text:list-item>
          <text:p text:style-name="P10">Cadastro de Pessoa Física</text:p>
        </text:list-item>
        <text:list-item>
          <text:p text:style-name="P10">Cadastro de Pessoa Jurídica</text:p>
        </text:list-item>
        <text:list-item>
          <text:p text:style-name="P10">Solicitação de frete</text:p>
        </text:list-item>
        <text:list-item>
          <text:p text:style-name="P10">Simulação de preço</text:p>
        </text:list-item>
        <text:list-item>
          <text:p text:style-name="P10">Escolha do tipo de carga</text:p>
        </text:list-item>
        <text:list-item>
          <text:p text:style-name="P10">Acompanhamento em tempo real</text:p>
        </text:list-item>
        <text:list-item>
          <text:p text:style-name="P10">Histórico de entregas</text:p>
        </text:list-item>
        <text:list-item>
          <text:p text:style-name="P10">Pagamento</text:p>
        </text:list-item>
        <text:list-item>
          <text:p text:style-name="P10">Avaliação do motorista</text:p>
        </text:list-item>
      </text:list>
      <text:p text:style-name="Horizontal_20_Line"/>
      <text:h text:style-name="Heading_20_3" text:outline-level="3">Aplicativo do Motorista</text:h>
      <text:p text:style-name="Text_20_body">Funcionalidades:</text:p>
      <text:list text:style-name="L7">
        <text:list-item>
          <text:p text:style-name="P11">Cadastro do motorista</text:p>
        </text:list-item>
        <text:list-item>
          <text:p text:style-name="P11">Cadastro do veículo</text:p>
        </text:list-item>
        <text:list-item>
          <text:p text:style-name="P11">Upload de documentos</text:p>
        </text:list-item>
        <text:list-item>
          <text:p text:style-name="P11">Aceitar ou recusar frete</text:p>
        </text:list-item>
        <text:list-item>
          <text:p text:style-name="P11">Visualizar rota</text:p>
        </text:list-item>
        <text:list-item>
          <text:p text:style-name="P11">Atualizar status da entrega</text:p>
        </text:list-item>
        <text:list-item>
          <text:p text:style-name="P11">Enviar comprovante</text:p>
        </text:list-item>
        <text:list-item>
          <text:p text:style-name="P11">Receber notificações</text:p>
        </text:list-item>
        <text:list-item>
          <text:p text:style-name="P11">Consultar ganhos</text:p>
        </text:list-item>
      </text:list>
      <text:p text:style-name="Horizontal_20_Line"/>
      <text:h text:style-name="Heading_20_3" text:outline-level="3">Painel Administrativo</text:h>
      <text:p text:style-name="Text_20_body">Funcionalidades:</text:p>
      <text:list text:style-name="L8">
        <text:list-item>
          <text:p text:style-name="P12">Gestão de clientes</text:p>
        </text:list-item>
        <text:list-item>
          <text:p text:style-name="P12">Gestão de motoristas</text:p>
        </text:list-item>
        <text:list-item>
          <text:p text:style-name="P12">Gestão de veículos</text:p>
        </text:list-item>
        <text:list-item>
          <text:p text:style-name="P12">Validação documental</text:p>
        </text:list-item>
        <text:list-item>
          <text:p text:style-name="P12">Monitoramento das entregas</text:p>
        </text:list-item>
        <text:list-item>
          <text:p text:style-name="P12">Gestão de pagamentos</text:p>
        </text:list-item>
        <text:list-item>
          <text:p text:style-name="P12"><text:soft-page-break/>Gestão de ocorrências</text:p>
        </text:list-item>
        <text:list-item>
          <text:p text:style-name="P12">Relatórios operacionais</text:p>
        </text:list-item>
        <text:list-item>
          <text:p text:style-name="P12">Indicadores de desempenho</text:p>
        </text:list-item>
      </text:list>
      <text:p text:style-name="Horizontal_20_Line"/>
      <text:h text:style-name="Heading_20_1" text:outline-level="1">5. Tipos de Usuários</text:h>
      <text:h text:style-name="Heading_20_2" text:outline-level="2">5.1. Pessoa Física</text:h>
      <text:p text:style-name="Text_20_body">Exemplo:</text:p>
      <text:list text:style-name="L9">
        <text:list-item>
          <text:p text:style-name="P13">Uma pessoa que quer transportar uma geladeira</text:p>
        </text:list-item>
        <text:list-item>
          <text:p text:style-name="P13">Uma pessoa que comprou um motor</text:p>
        </text:list-item>
        <text:list-item>
          <text:p text:style-name="P13">Uma pessoa que precisa mudar móveis</text:p>
        </text:list-item>
        <text:list-item>
          <text:p text:style-name="P13">Um produtor rural pequeno que precisa transportar grãos</text:p>
        </text:list-item>
      </text:list>
      <text:p text:style-name="Text_20_body">Dados principais:</text:p>
      <text:p text:style-name="P9">Nome completo<text:line-break/>CPF<text:line-break/>Telefone<text:line-break/>E-mail<text:line-break/>Endereço<text:line-break/>Documento de identidade<text:line-break/>Forma de pagamento</text:p>
      <text:p text:style-name="Horizontal_20_Line"/>
      <text:h text:style-name="Heading_20_2" text:outline-level="2">5.2. Pessoa Jurídica</text:h>
      <text:p text:style-name="Text_20_body">Exemplo:</text:p>
      <text:list text:style-name="L10">
        <text:list-item>
          <text:p text:style-name="P14">Loja de móveis</text:p>
        </text:list-item>
        <text:list-item>
          <text:p text:style-name="P14">Loja de eletrodomésticos</text:p>
        </text:list-item>
        <text:list-item>
          <text:p text:style-name="P14">Indústria</text:p>
        </text:list-item>
        <text:list-item>
          <text:p text:style-name="P14">Oficina</text:p>
        </text:list-item>
        <text:list-item>
          <text:p text:style-name="P14">Distribuidora de peças</text:p>
        </text:list-item>
        <text:list-item>
          <text:p text:style-name="P14">Cooperativa agrícola</text:p>
        </text:list-item>
        <text:list-item>
          <text:p text:style-name="P14">Produtor rural com CNPJ</text:p>
        </text:list-item>
        <text:list-item>
          <text:p text:style-name="P14">Empresa cerealista</text:p>
        </text:list-item>
      </text:list>
      <text:p text:style-name="Text_20_body">Dados principais:</text:p>
      <text:p text:style-name="P9">Razão social<text:line-break/>Nome fantasia<text:line-break/>CNPJ<text:line-break/>Inscrição estadual<text:line-break/><text:soft-page-break/>Responsável legal<text:line-break/>Telefone<text:line-break/>E-mail<text:line-break/>Endereço fiscal<text:line-break/>Endereço operacional<text:line-break/>Dados de faturamento</text:p>
      <text:p text:style-name="Horizontal_20_Line"/>
      <text:h text:style-name="Heading_20_2" text:outline-level="2">5.3. Motorista Autônomo</text:h>
      <text:p text:style-name="Text_20_body">Dados principais:</text:p>
      <text:p text:style-name="P9">Nome completo<text:line-break/>CPF<text:line-break/>CNH<text:line-break/>Categoria da CNH<text:line-break/>Telefone<text:line-break/>E-mail<text:line-break/>Endereço<text:line-break/>Dados bancários<text:line-break/>Documentos do veículo<text:line-break/>Certidões, se necessário</text:p>
      <text:p text:style-name="Horizontal_20_Line"/>
      <text:h text:style-name="Heading_20_2" text:outline-level="2">5.4. Empresa Transportadora</text:h>
      <text:p text:style-name="Text_20_body">Dados principais:</text:p>
      <text:p text:style-name="P9">Razão social<text:line-break/>CNPJ<text:line-break/>Responsável<text:line-break/>Motoristas vinculados<text:line-break/>Frota cadastrada<text:line-break/>Documentos da empresa<text:line-break/>Dados bancários<text:line-break/>Apólice de seguro</text:p>
      <text:p text:style-name="Horizontal_20_Line"/>
      <text:h text:style-name="Heading_20_1" text:outline-level="1">6. Cadastro de Veículos</text:h>
      <text:p text:style-name="Text_20_body">O cadastro de veículos é um dos pontos centrais do sistema.</text:p>
      <text:h text:style-name="Heading_20_2" text:outline-level="2">6.1. Dados básicos do veículo</text:h>
      <text:p text:style-name="P9">Placa<text:line-break/>RENAVAM<text:line-break/>Marca<text:line-break/>Modelo<text:line-break/>Ano<text:line-break/>Tipo do veículo<text:line-break/>Capacidade em kg<text:line-break/>Capacidade em m³<text:line-break/>Tipo de carroceria<text:line-break/>Tipo de carga permitida<text:line-break/>Estado de conservação<text:line-break/>Fotos do veículo<text:line-break/><text:soft-page-break/>Documento do veículo<text:line-break/>Seguro<text:line-break/>Disponibilidade<text:line-break/>Localização atual</text:p>
      <text:p text:style-name="Horizontal_20_Line"/>
      <text:h text:style-name="Heading_20_2" text:outline-level="2">6.2. Tipos de veículos</text:h>
      <text:h text:style-name="Heading_20_3" text:outline-level="3">Para equipamentos, móveis e peças</text:h>
      <text:p text:style-name="P9">Utilitário pequeno<text:line-break/>Caminhonete<text:line-break/>Fiorino<text:line-break/>Van<text:line-break/>Caminhão 3/4<text:line-break/>Caminhão toco<text:line-break/>Caminhão truck<text:line-break/>Caminhão baú<text:line-break/>Caminhão sider</text:p>
      <text:h text:style-name="Heading_20_3" text:outline-level="3">Para grãos secos</text:h>
      <text:p text:style-name="P9">Caminhão graneleiro<text:line-break/>Carreta graneleira<text:line-break/>Bitrem graneleiro<text:line-break/>Rodotrem graneleiro<text:line-break/>Caçamba graneleira</text:p>
      <text:p text:style-name="Horizontal_20_Line"/>
      <text:h text:style-name="Heading_20_2" text:outline-level="2">6.3. Regras por tipo de carga</text:h>
      <text:h text:style-name="Heading_20_3" text:outline-level="3">Equipamentos em geral</text:h>
      <text:p text:style-name="Text_20_body">Essas cargas podem exigir:</text:p>
      <text:list text:style-name="L11">
        <text:list-item>
          <text:p text:style-name="P15">Proteção contra chuva</text:p>
        </text:list-item>
        <text:list-item>
          <text:p text:style-name="P15">Amarração</text:p>
        </text:list-item>
        <text:list-item>
          <text:p text:style-name="P15">Ajudante</text:p>
        </text:list-item>
        <text:list-item>
          <text:p text:style-name="P15">Plataforma elevatória</text:p>
        </text:list-item>
        <text:list-item>
          <text:p text:style-name="P15">Baú fechado</text:p>
        </text:list-item>
        <text:list-item>
          <text:p text:style-name="P15">Cuidado com impacto</text:p>
        </text:list-item>
        <text:list-item>
          <text:p text:style-name="P15">Rastreamento obrigatório</text:p>
        </text:list-item>
      </text:list>
      <text:p text:style-name="Text_20_body">Exemplos:</text:p>
      <text:p text:style-name="P9">Fogão<text:line-break/>Geladeira<text:line-break/>Motor<text:line-break/>Peças mecânicas<text:line-break/>Ventilador<text:line-break/><text:soft-page-break/>Móveis<text:line-break/>Máquinas pequenas</text:p>
      <text:p text:style-name="Horizontal_20_Line"/>
      <text:h text:style-name="Heading_20_3" text:outline-level="3">Grãos secos</text:h>
      <text:p text:style-name="Text_20_body">Essas cargas podem exigir:</text:p>
      <text:list text:style-name="L12">
        <text:list-item>
          <text:p text:style-name="P16">Veículo graneleiro</text:p>
        </text:list-item>
        <text:list-item>
          <text:p text:style-name="P16">Proteção contra umidade</text:p>
        </text:list-item>
        <text:list-item>
          <text:p text:style-name="P16">Lona</text:p>
        </text:list-item>
        <text:list-item>
          <text:p text:style-name="P16">Limpeza da carroceria</text:p>
        </text:list-item>
        <text:list-item>
          <text:p text:style-name="P16">Controle de peso</text:p>
        </text:list-item>
        <text:list-item>
          <text:p text:style-name="P16">Nota fiscal</text:p>
        </text:list-item>
        <text:list-item>
          <text:p text:style-name="P16">Documento de origem</text:p>
        </text:list-item>
        <text:list-item>
          <text:p text:style-name="P16">Romaneio de carga</text:p>
        </text:list-item>
        <text:list-item>
          <text:p text:style-name="P16">Pesagem na origem e no destino</text:p>
        </text:list-item>
      </text:list>
      <text:p text:style-name="Text_20_body">Exemplos:</text:p>
      <text:p text:style-name="P9">Milho<text:line-break/>Soja<text:line-break/>Sorgo<text:line-break/>Feijão seco<text:line-break/>Arroz em casca</text:p>
      <text:p text:style-name="Horizontal_20_Line"/>
      <text:h text:style-name="Heading_20_1" text:outline-level="1">7. Fluxo Principal de Solicitação de Frete</text:h>
      <text:h text:style-name="Heading_20_2" text:outline-level="2">Etapa 1 — Cliente solicita entrega</text:h>
      <text:p text:style-name="Text_20_body">O cliente informa:</text:p>
      <text:p text:style-name="P9">Tipo de usuário: Pessoa Física ou Pessoa Jurídica<text:line-break/>Origem<text:line-break/>Destino<text:line-break/>Tipo de carga<text:line-break/>Descrição da carga<text:line-break/>Peso estimado<text:line-break/>Volume estimado<text:line-break/>Fotos da carga<text:line-break/>Data e horário desejados<text:line-break/>Necessidade de ajudante<text:line-break/>Necessidade de embalagem<text:line-break/>Necessidade de seguro<text:line-break/>Observações</text:p>
      <text:p text:style-name="Horizontal_20_Line"/>
      <text:h text:style-name="Heading_20_2" text:outline-level="2"><text:soft-page-break/>Etapa 2 — Sistema calcula tipo ideal de veículo</text:h>
      <text:p text:style-name="Text_20_body">Exemplo:</text:p>
      <text:p text:style-name="P9">Carga: Geladeira<text:line-break/>Peso: 80 kg<text:line-break/>Volume: Médio<text:line-break/>Requer proteção contra chuva: Sim<text:line-break/><text:line-break/>Veículo recomendado:<text:line-break/>Caminhonete baú, Fiorino ou caminhão baú pequeno</text:p>
      <text:p text:style-name="Text_20_body">Outro exemplo:</text:p>
      <text:p text:style-name="P9">Carga: Soja<text:line-break/>Peso: 28 toneladas<text:line-break/>Tipo: Grão seco<text:line-break/>Requer graneleiro: Sim<text:line-break/><text:line-break/>Veículo recomendado:<text:line-break/>Carreta graneleira ou caminhão truck graneleiro</text:p>
      <text:p text:style-name="Horizontal_20_Line"/>
      <text:h text:style-name="Heading_20_2" text:outline-level="2">Etapa 3 — Sistema calcula preço estimado</text:h>
      <text:p text:style-name="Text_20_body">A precificação pode considerar:</text:p>
      <text:p text:style-name="P9">Distância<text:line-break/>Tempo estimado<text:line-break/>Peso<text:line-break/>Volume<text:line-break/>Tipo de carga<text:line-break/>Tipo de veículo<text:line-break/>Pedágios<text:line-break/>Seguro<text:line-break/>Urgência<text:line-break/>Ajudante<text:line-break/>Risco da rota<text:line-break/>Disponibilidade de motoristas<text:line-break/>Oferta e demanda<text:line-break/>Carga de retorno</text:p>
      <text:p text:style-name="Text_20_body">Fórmula conceitual:</text:p>
      <text:p text:style-name="Text_20_body">$$ Preço = TarifaBase + Distância \times ValorKm + Tempo \times ValorHora + Adicionais $$</text:p>
      <text:p text:style-name="Text_20_body">Onde:</text:p>
      <text:p text:style-name="Text_20_body">$$ Adicionais = Seguro + Pedágios + Ajudante + TaxaDeUrgência + TaxaDeRisco $$</text:p>
      <text:p text:style-name="Horizontal_20_Line"/>
      <text:h text:style-name="Heading_20_2" text:outline-level="2">Etapa 4 — Matching inteligente</text:h>
      <text:p text:style-name="Text_20_body">O sistema procura motoristas disponíveis com base em:</text:p>
      <text:p text:style-name="P9">Localização próxima da origem<text:line-break/>Tipo de veículo compatível<text:line-break/>Capacidade do veículo<text:line-break/>Documentos válidos<text:line-break/><text:soft-page-break/>Histórico de avaliações<text:line-break/>Disponibilidade<text:line-break/>Aceite para o tipo de carga<text:line-break/>Preço estimado<text:line-break/>Tempo até a coleta</text:p>
      <text:p text:style-name="Horizontal_20_Line"/>
      <text:h text:style-name="Heading_20_2" text:outline-level="2">Etapa 5 — Motorista aceita o frete</text:h>
      <text:p text:style-name="Text_20_body">O motorista recebe:</text:p>
      <text:p text:style-name="P9">Origem<text:line-break/>Destino<text:line-break/>Tipo de carga<text:line-break/>Peso<text:line-break/>Volume<text:line-break/>Valor do frete<text:line-break/>Tempo estimado<text:line-break/>Distância<text:line-break/>Requisitos especiais</text:p>
      <text:p text:style-name="Text_20_body">Ele pode:</text:p>
      <text:p text:style-name="P9">Aceitar<text:line-break/>Recusar<text:line-break/>Fazer contraproposta, se permitido</text:p>
      <text:p text:style-name="Horizontal_20_Line"/>
      <text:h text:style-name="Heading_20_2" text:outline-level="2">Etapa 6 — Coleta da carga</text:h>
      <text:p text:style-name="Text_20_body">Na coleta, o motorista pode registrar:</text:p>
      <text:p text:style-name="P9">Foto da carga<text:line-break/>Assinatura do remetente<text:line-break/>QR Code da coleta<text:line-break/>Geolocalização<text:line-break/>Data e hora<text:line-break/>Condição da carga<text:line-break/>Número da nota fiscal<text:line-break/>Peso inicial, se aplicável</text:p>
      <text:p text:style-name="Horizontal_20_Line"/>
      <text:h text:style-name="Heading_20_2" text:outline-level="2">Etapa 7 — Transporte com rastreamento</text:h>
      <text:p text:style-name="Text_20_body">Durante o trajeto, o sistema acompanha:</text:p>
      <text:p text:style-name="P9">Localização GPS<text:line-break/>Velocidade<text:line-break/>Paradas<text:line-break/>Desvios de rota<text:line-break/>Previsão de chegada<text:line-break/>Status da entrega<text:line-break/>Eventos de risco<text:line-break/>Comunicação com o cliente</text:p>
      <text:p text:style-name="Horizontal_20_Line"/>
      <text:h text:style-name="Heading_20_2" text:outline-level="2"><text:soft-page-break/>Etapa 8 — Entrega</text:h>
      <text:p text:style-name="Text_20_body">Na entrega, são registrados:</text:p>
      <text:p text:style-name="P9">Foto da entrega<text:line-break/>Assinatura do recebedor<text:line-break/>Nome e documento do recebedor<text:line-break/>QR Code ou código de confirmação<text:line-break/>Geolocalização<text:line-break/>Data e hora<text:line-break/>Condição da carga<text:line-break/>Peso final, no caso de grãos</text:p>
      <text:p text:style-name="Horizontal_20_Line"/>
      <text:h text:style-name="Heading_20_1" text:outline-level="1">8. Status da Entrega</text:h>
      <text:p text:style-name="Text_20_body">Sugestão de estados do pedido:</text:p>
      <text:p text:style-name="P9">Solicitado<text:line-break/>Aguardando motorista<text:line-break/>Motorista encontrado<text:line-break/>Motorista a caminho da coleta<text:line-break/>Chegou na origem<text:line-break/>Carga coletada<text:line-break/>Em trânsito<text:line-break/>Parado temporariamente<text:line-break/>Desvio identificado<text:line-break/>Próximo ao destino<text:line-break/>Chegou ao destino<text:line-break/>Entregue<text:line-break/>Finalizado<text:line-break/>Cancelado<text:line-break/>Em disputa</text:p>
      <text:p text:style-name="Horizontal_20_Line"/>
      <text:h text:style-name="Heading_20_1" text:outline-level="1">9. Melhor Caminho — Roteirização Inteligente</text:h>
      <text:p text:style-name="Text_20_body">O módulo de melhor caminho deve usar mapas, GPS e dados externos.</text:p>
      <text:h text:style-name="Heading_20_2" text:outline-level="2">Dados considerados</text:h>
      <text:p text:style-name="P9">Distância<text:line-break/>Tempo<text:line-break/>Trânsito<text:line-break/>Tipo de estrada<text:line-break/>Pedágios<text:line-break/>Restrições para caminhões<text:line-break/>Altura máxima<text:line-break/>Peso máximo permitido<text:line-break/>Áreas urbanas restritas<text:line-break/>Segurança da rota<text:line-break/>Postos de combustível<text:line-break/>Pontos de parada<text:line-break/>Condições climáticas<text:line-break/>Histórico de atrasos</text:p>
      <text:p text:style-name="Horizontal_20_Line"/>
      <text:h text:style-name="Heading_20_2" text:outline-level="2"><text:soft-page-break/>Exemplo de decisão</text:h>
      <text:p text:style-name="Text_20_body">Para um caminhão graneleiro, o sistema pode evitar:</text:p>
      <text:p text:style-name="P9">Pontes com limite de peso<text:line-break/>Vias urbanas estreitas<text:line-break/>Estradas não pavimentadas em período de chuva<text:line-break/>Áreas com restrição para veículos pesados</text:p>
      <text:p text:style-name="Text_20_body">Para uma entrega de geladeira, o sistema pode priorizar:</text:p>
      <text:p text:style-name="P9">Menor tempo<text:line-break/>Menor risco de impacto<text:line-break/>Rota com menos trepidação<text:line-break/>Rota com acesso fácil ao destino</text:p>
      <text:p text:style-name="Horizontal_20_Line"/>
      <text:h text:style-name="Heading_20_1" text:outline-level="1">10. Previsão de Chegada — ETA</text:h>
      <text:p text:style-name="Text_20_body">ETA significa <text:span text:style-name="T1">Estimated Time of Arrival</text:span>, ou seja, previsão de chegada.</text:p>
      <text:p text:style-name="Text_20_body">O sistema calcula a previsão usando:</text:p>
      <text:p text:style-name="P9">Distância restante<text:line-break/>Velocidade média<text:line-break/>Trânsito atual<text:line-break/>Histórico da rota<text:line-break/>Tipo de veículo<text:line-break/>Tempo de carga e descarga<text:line-break/>Paradas previstas<text:line-break/>Clima<text:line-break/>Pedágios<text:line-break/>Tempo em balança, no caso de grãos</text:p>
      <text:p text:style-name="Text_20_body">Fórmula conceitual:</text:p>
      <text:p text:style-name="Text_20_body">$$ ETA = TempoRestanteDeViagem + TempoDeParadas + TempoDeDescarga $$</text:p>
      <text:p text:style-name="Text_20_body">O ETA deve ser atualizado automaticamente durante o percurso.</text:p>
      <text:p text:style-name="Horizontal_20_Line"/>
      <text:h text:style-name="Heading_20_1" text:outline-level="1">11. Rastreabilidade</text:h>
      <text:p text:style-name="Text_20_body">A rastreabilidade permite saber tudo que aconteceu com a carga.</text:p>
      <text:h text:style-name="Heading_20_2" text:outline-level="2">Eventos rastreáveis</text:h>
      <text:p text:style-name="P9">Pedido criado<text:line-break/>Motorista aceitou<text:line-break/>Motorista chegou à origem<text:line-break/>Carga coletada<text:line-break/>Rota iniciada<text:line-break/>Parada realizada<text:line-break/>Desvio de rota<text:line-break/>Entrada em área de risco<text:line-break/>Chegada ao destino<text:line-break/><text:soft-page-break/>Entrega confirmada<text:line-break/>Ocorrência registrada</text:p>
      <text:p text:style-name="Horizontal_20_Line"/>
      <text:h text:style-name="Heading_20_2" text:outline-level="2">Dados registrados por evento</text:h>
      <text:p text:style-name="P9">ID do pedido<text:line-break/>Tipo do evento<text:line-break/>Data e hora<text:line-break/>Latitude<text:line-break/>Longitude<text:line-break/>Usuário responsável<text:line-break/>Foto, se houver<text:line-break/>Assinatura, se houver<text:line-break/>Observação<text:line-break/>Status anterior<text:line-break/>Status novo</text:p>
      <text:p text:style-name="Horizontal_20_Line"/>
      <text:h text:style-name="Heading_20_1" text:outline-level="1">12. Camada de Inteligência Artificial</text:h>
      <text:p text:style-name="Text_20_body">A IA pode atuar nos seguintes pontos:</text:p>
      <text:h text:style-name="Heading_20_2" text:outline-level="2">12.1. Recomendação de veículo</text:h>
      <text:p text:style-name="Text_20_body">Com base em:</text:p>
      <text:p text:style-name="P9">Tipo de carga<text:line-break/>Peso<text:line-break/>Volume<text:line-break/>Fragilidade<text:line-break/>Distância<text:line-break/>Condições da rota<text:line-break/>Regras legais<text:line-break/>Histórico de entregas parecidas</text:p>
      <text:p text:style-name="Text_20_body">Exemplo:</text:p>
      <text:p text:style-name="P9">Se a carga for "geladeira", o sistema recomenda veículo fechado ou coberto.<text:line-break/>Se a carga for "soja", o sistema recomenda veículo graneleiro com lona.</text:p>
      <text:p text:style-name="Horizontal_20_Line"/>
      <text:h text:style-name="Heading_20_2" text:outline-level="2">12.2. Previsão de chegada</text:h>
      <text:p text:style-name="Text_20_body">Modelo treinado com:</text:p>
      <text:p text:style-name="P9">Histórico de viagens<text:line-break/>Trânsito<text:line-break/>Clima<text:line-break/>Tipo de veículo<text:line-break/>Horário<text:line-break/>Dia da semana<text:line-break/>Tipo de estrada<text:line-break/>Perfil do motorista<text:line-break/>Tempo médio em paradas</text:p>
      <text:p text:style-name="Horizontal_20_Line"><text:soft-page-break/></text:p>
      <text:h text:style-name="Heading_20_2" text:outline-level="2">12.3. Detecção de risco</text:h>
      <text:p text:style-name="Text_20_body">O sistema pode detectar:</text:p>
      <text:p text:style-name="P9">Desvio de rota<text:line-break/>Parada longa não planejada<text:line-break/>Velocidade incompatível<text:line-break/>Entrada em zona de risco<text:line-break/>Atraso anormal<text:line-break/>Possível fraude no GPS<text:line-break/>Divergência entre peso informado e veículo usado</text:p>
      <text:p text:style-name="Horizontal_20_Line"/>
      <text:h text:style-name="Heading_20_2" text:outline-level="2">12.4. Preço dinâmico</text:h>
      <text:p text:style-name="Text_20_body">Semelhante ao Uber, pode considerar:</text:p>
      <text:p text:style-name="P9">Alta demanda<text:line-break/>Poucos veículos disponíveis<text:line-break/>Urgência<text:line-break/>Localidade remota<text:line-break/>Carga especializada<text:line-break/>Risco operacional<text:line-break/>Carga de retorno</text:p>
      <text:p text:style-name="Horizontal_20_Line"/>
      <text:h text:style-name="Heading_20_2" text:outline-level="2">12.5. Matching inteligente</text:h>
      <text:p text:style-name="Text_20_body">O algoritmo escolhe o melhor motorista considerando:</text:p>
      <text:p text:style-name="P9">Distância até a origem<text:line-break/>Compatibilidade do veículo<text:line-break/>Preço<text:line-break/>Avaliação<text:line-break/>Índice de cancelamento<text:line-break/>Tempo estimado até coleta<text:line-break/>Histórico de pontualidade<text:line-break/>Documentação válida<text:line-break/>Experiência com aquele tipo de carga</text:p>
      <text:p text:style-name="Text_20_body">Pontuação conceitual:</text:p>
      <text:p text:style-name="Text_20_body">$$ Score = Compatibilidade + Proximidade + Avaliação + Pontualidade - Risco $$</text:p>
      <text:p text:style-name="Horizontal_20_Line"/>
      <text:h text:style-name="Heading_20_1" text:outline-level="1">13. Arquitetura Técnica Sugerida</text:h>
      <text:h text:style-name="Heading_20_2" text:outline-level="2">13.1. Frontend</text:h>
      <text:p text:style-name="Text_20_body">Aplicações:</text:p>
      <text:p text:style-name="P9">App Cliente - Android/iOS<text:line-break/>App Motorista - Android/iOS<text:line-break/><text:soft-page-break/>Portal Web Cliente<text:line-break/>Painel Administrativo Web</text:p>
      <text:p text:style-name="Text_20_body">Tecnologias possíveis:</text:p>
      <text:p text:style-name="P9">React<text:line-break/>React Native<text:line-break/>Flutter<text:line-break/>Angular<text:line-break/>Vue.js<text:line-break/>Next.js</text:p>
      <text:p text:style-name="Horizontal_20_Line"/>
      <text:h text:style-name="Heading_20_2" text:outline-level="2">13.2. Backend</text:h>
      <text:p text:style-name="Text_20_body">Pode ser estruturado em microsserviços ou arquitetura modular.</text:p>
      <text:p text:style-name="Text_20_body">Módulos sugeridos:</text:p>
      <text:p text:style-name="P9">Auth Service<text:line-break/>User Service<text:line-break/>Vehicle Service<text:line-break/>Freight Request Service<text:line-break/>Pricing Service<text:line-break/>Matching Service<text:line-break/>Route Service<text:line-break/>Tracking Service<text:line-break/>ETA Service<text:line-break/>Payment Service<text:line-break/>Notification Service<text:line-break/>Document Service<text:line-break/>Rating Service<text:line-break/>Admin Service</text:p>
      <text:p text:style-name="Text_20_body">Tecnologias possíveis:</text:p>
      <text:p text:style-name="P9">Node.js<text:line-break/>NestJS<text:line-break/>Java Spring Boot<text:line-break/>Python FastAPI<text:line-break/>Go<text:line-break/>.NET</text:p>
      <text:p text:style-name="Horizontal_20_Line"/>
      <text:h text:style-name="Heading_20_2" text:outline-level="2">13.3. Banco de Dados</text:h>
      <text:p text:style-name="Text_20_body">Sugestão de uso híbrido:</text:p>
      <text:h text:style-name="Heading_20_3" text:outline-level="3">Banco relacional</text:h>
      <text:p text:style-name="Text_20_body">Para dados estruturados:</text:p>
      <text:p text:style-name="P9">SQL<text:span text:style-name="T2">ite</text:span><text:line-break/>MySQL<text:line-break/>SQL Server</text:p>
      <text:p text:style-name="Text_20_body">Tabelas:</text:p>
      <text:p text:style-name="P9"><text:soft-page-break/>users<text:line-break/>companies<text:line-break/>drivers<text:line-break/>vehicles<text:line-break/>freight_orders<text:line-break/>cargo_items<text:line-break/>payments<text:line-break/>documents<text:line-break/>ratings<text:line-break/>invoices</text:p>
      <text:p text:style-name="Horizontal_20_Line"/>
      <text:h text:style-name="Heading_20_3" text:outline-level="3">Banco geoespacial</text:h>
      <text:p text:style-name="Text_20_body">Para localização e rotas:</text:p>
      <text:p text:style-name="P9">PostgreSQL + PostGIS</text:p>
      <text:p text:style-name="Text_20_body">Uso:</text:p>
      <text:p text:style-name="P9">Buscar motoristas próximos<text:line-break/>Calcular áreas de atendimento<text:line-break/>Registrar trilha GPS<text:line-break/>Analisar desvio de rota</text:p>
      <text:p text:style-name="Horizontal_20_Line"/>
      <text:h text:style-name="Heading_20_3" text:outline-level="3">Banco NoSQL</text:h>
      <text:p text:style-name="Text_20_body">Para eventos e rastreamento:</text:p>
      <text:p text:style-name="P9">MongoDB<text:line-break/>DynamoDB<text:line-break/>Cassandra</text:p>
      <text:p text:style-name="Text_20_body">Uso:</text:p>
      <text:p text:style-name="P9">Eventos de localização<text:line-break/>Logs da entrega<text:line-break/>Timeline da carga<text:line-break/>Histórico de telemetria</text:p>
      <text:p text:style-name="Horizontal_20_Line"/>
      <text:h text:style-name="Heading_20_3" text:outline-level="3">Cache</text:h>
      <text:p text:style-name="Text_20_body">Para dados rápidos:</text:p>
      <text:p text:style-name="P9">Redis<text:line-break/>Memcached</text:p>
      <text:p text:style-name="Text_20_body">Uso:</text:p>
      <text:p text:style-name="P9">Localização atual dos motoristas<text:line-break/>Sessões<text:line-break/>Ranking de motoristas disponíveis<text:line-break/>Preços temporários</text:p>
      <text:p text:style-name="Horizontal_20_Line"/>
      <text:h text:style-name="Heading_20_3" text:outline-level="3"><text:soft-page-break/>Mensageria</text:h>
      <text:p text:style-name="Text_20_body">Para comunicação assíncrona:</text:p>
      <text:p text:style-name="P9">Kafka<text:line-break/>RabbitMQ<text:line-break/>AWS SQS<text:line-break/>Google Pub/Sub</text:p>
      <text:p text:style-name="Text_20_body">Eventos:</text:p>
      <text:p text:style-name="P9">FreteSolicitado<text:line-break/>MotoristaEncontrado<text:line-break/>CargaColetada<text:line-break/>LocalizacaoAtualizada<text:line-break/>ETAAtualizado<text:line-break/>EntregaFinalizada<text:line-break/>PagamentoConfirmado</text:p>
      <text:p text:style-name="Horizontal_20_Line"/>
      <text:h text:style-name="Heading_20_1" text:outline-level="1">14. Integrações Externas</text:h>
      <text:p text:style-name="Text_20_body">O sistema pode integrar-se com:</text:p>
      <text:p text:style-name="P9">Google Maps<text:line-break/>Mapbox<text:line-break/>HERE Maps<text:line-break/>Waze for Cities<text:line-break/>APIs de pedágio<text:line-break/>APIs de clima<text:line-break/>Gateway de pagamento<text:line-break/>Pix<text:line-break/>Cartão de crédito<text:line-break/>Boleto<text:line-break/>APIs fiscais<text:line-break/>SEFAZ, quando aplicável<text:line-break/>APIs de consulta de CNPJ<text:line-break/>APIs de validação de documentos<text:line-break/>APIs de seguro de carga</text:p>
      <text:p text:style-name="Horizontal_20_Line"/>
      <text:h text:style-name="Heading_20_1" text:outline-level="1">15. Modelo de Dados Simplificado</text:h>
      <text:h text:style-name="Heading_20_2" text:outline-level="2">Usuário</text:h>
      <text:p text:style-name="P9">User<text:line-break/>- id<text:line-break/>- type: PF ou PJ<text:line-break/>- name<text:line-break/>- email<text:line-break/>- phone<text:line-break/>- document_number<text:line-break/>- status<text:line-break/>- created_at</text:p>
      <text:p text:style-name="Horizontal_20_Line"/>
      <text:h text:style-name="Heading_20_2" text:outline-level="2"><text:soft-page-break/>Empresa</text:h>
      <text:p text:style-name="P9">Company<text:line-break/>- id<text:line-break/>- user_id<text:line-break/>- legal_name<text:line-break/>- trade_name<text:line-break/>- cnpj<text:line-break/>- state_registration<text:line-break/>- billing_address</text:p>
      <text:p text:style-name="Horizontal_20_Line"/>
      <text:h text:style-name="Heading_20_2" text:outline-level="2">Motorista</text:h>
      <text:p text:style-name="P9">Driver<text:line-break/>- id<text:line-break/>- user_id<text:line-break/>- cnh_number<text:line-break/>- cnh_category<text:line-break/>- rating<text:line-break/>- status<text:line-break/>- current_latitude<text:line-break/>- current_longitude<text:line-break/>- available</text:p>
      <text:p text:style-name="Horizontal_20_Line"/>
      <text:h text:style-name="Heading_20_2" text:outline-level="2">Veículo</text:h>
      <text:p text:style-name="P9">Vehicle<text:line-break/>- id<text:line-break/>- driver_id<text:line-break/>- plate<text:line-break/>- brand<text:line-break/>- model<text:line-break/>- year<text:line-break/>- vehicle_type<text:line-break/>- body_type<text:line-break/>- max_weight_kg<text:line-break/>- max_volume_m3<text:line-break/>- allowed_cargo_types<text:line-break/>- has_insurance<text:line-break/>- status</text:p>
      <text:p text:style-name="Horizontal_20_Line"/>
      <text:h text:style-name="Heading_20_2" text:outline-level="2">Pedido de Frete</text:h>
      <text:p text:style-name="P9">FreightOrder<text:line-break/>- id<text:line-break/>- customer_id<text:line-break/>- driver_id<text:line-break/>- vehicle_id<text:line-break/>- origin_address<text:line-break/>- origin_latitude<text:line-break/>- origin_longitude<text:line-break/>- destination_address<text:line-break/>- destination_latitude<text:line-break/>- destination_longitude<text:line-break/><text:soft-page-break/>- cargo_type<text:line-break/>- cargo_description<text:line-break/>- estimated_weight_kg<text:line-break/>- estimated_volume_m3<text:line-break/>- status<text:line-break/>- estimated_price<text:line-break/>- final_price<text:line-break/>- estimated_arrival_time<text:line-break/>- created_at</text:p>
      <text:p text:style-name="Horizontal_20_Line"/>
      <text:h text:style-name="Heading_20_2" text:outline-level="2">Evento de Rastreabilidade</text:h>
      <text:p text:style-name="P9">TrackingEvent<text:line-break/>- id<text:line-break/>- freight_order_id<text:line-break/>- event_type<text:line-break/>- latitude<text:line-break/>- longitude<text:line-break/>- description<text:line-break/>- image_url<text:line-break/>- signature_url<text:line-break/>- created_at</text:p>
      <text:p text:style-name="Horizontal_20_Line"/>
      <text:h text:style-name="Heading_20_1" text:outline-level="1">16. APIs Principais</text:h>
      <text:h text:style-name="Heading_20_2" text:outline-level="2">Cadastro de usuário</text:h>
      <text:p text:style-name="P9">POST /users</text:p>
      <text:p text:style-name="Text_20_body">Exemplo de payload:</text:p>
      <text:p text:style-name="P9">{<text:line-break/> <text:s/>"type": "PF",<text:line-break/> <text:s/>"name": "João Silva",<text:line-break/> <text:s/>"email": "joao@email.com",<text:line-break/> <text:s/>"phone": "+55 65 99999-9999",<text:line-break/> <text:s/>"document_number": "00000000000"<text:line-break/>}</text:p>
      <text:p text:style-name="Horizontal_20_Line"/>
      <text:h text:style-name="Heading_20_2" text:outline-level="2">Cadastro de veículo</text:h>
      <text:p text:style-name="P9">POST /vehicles</text:p>
      <text:p text:style-name="Text_20_body">Exemplo:</text:p>
      <text:p text:style-name="P9">{<text:line-break/> <text:s/>"driver_id": "123",<text:line-break/> <text:s/>"plate": "ABC1D23",<text:line-break/> <text:s/>"brand": "Mercedes-Benz",<text:line-break/> <text:s/>"model": "Atego",<text:line-break/> <text:s/>"year": 2022,<text:line-break/> <text:s/>"vehicle_type": "caminhao",<text:line-break/><text:soft-page-break/> <text:s/>"body_type": "bau",<text:line-break/> <text:s/>"max_weight_kg": 8000,<text:line-break/> <text:s/>"max_volume_m3": 45,<text:line-break/> <text:s/>"allowed_cargo_types": ["equipamentos", "moveis"]<text:line-break/>}</text:p>
      <text:p text:style-name="Horizontal_20_Line"/>
      <text:h text:style-name="Heading_20_2" text:outline-level="2">Solicitação de frete</text:h>
      <text:p text:style-name="P9">POST /freight-orders</text:p>
      <text:p text:style-name="Text_20_body">Exemplo:</text:p>
      <text:p text:style-name="P9">{<text:line-break/> <text:s/>"customer_id": "789",<text:line-break/> <text:s/>"origin": {<text:line-break/> <text:s text:c="3"/>"address": "Av. Principal, 100",<text:line-break/> <text:s text:c="3"/>"latitude": -15.601,<text:line-break/> <text:s text:c="3"/>"longitude": -56.097<text:line-break/> <text:s/>},<text:line-break/> <text:s/>"destination": {<text:line-break/> <text:s text:c="3"/>"address": "Rua das Flores, 200",<text:line-break/> <text:s text:c="3"/>"latitude": -15.650,<text:line-break/> <text:s text:c="3"/>"longitude": -56.120<text:line-break/> <text:s/>},<text:line-break/> <text:s/>"cargo": {<text:line-break/> <text:s text:c="3"/>"type": "equipamentos",<text:line-break/> <text:s text:c="3"/>"description": "Geladeira duplex",<text:line-break/> <text:s text:c="3"/>"estimated_weight_kg": 90,<text:line-break/> <text:s text:c="3"/>"estimated_volume_m3": 1.2<text:line-break/> <text:s/>}<text:line-break/>}</text:p>
      <text:p text:style-name="Horizontal_20_Line"/>
      <text:h text:style-name="Heading_20_2" text:outline-level="2">Atualização de localização</text:h>
      <text:p text:style-name="P9">POST /tracking/location</text:p>
      <text:p text:style-name="Text_20_body">Exemplo:</text:p>
      <text:p text:style-name="P9">{<text:line-break/> <text:s/>"freight_order_id": "456",<text:line-break/> <text:s/>"driver_id": "123",<text:line-break/> <text:s/>"latitude": -15.620,<text:line-break/> <text:s/>"longitude": -56.105,<text:line-break/> <text:s/>"speed": 65,<text:line-break/> <text:s/>"timestamp": "2026-05-30T09:25:00-04:00"<text:line-break/>}</text:p>
      <text:p text:style-name="Horizontal_20_Line"/>
      <text:h text:style-name="Heading_20_1" text:outline-level="1">17. Segurança e Compliance</text:h>
      <text:p text:style-name="Text_20_body">O sistema deve conter:</text:p>
      <text:p text:style-name="P9">Login seguro<text:line-break/>Autenticação multifator<text:line-break/><text:soft-page-break/>Criptografia de dados sensíveis<text:line-break/>Controle de permissões por perfil<text:line-break/>Validação de documentos<text:line-break/>Auditoria de eventos<text:line-break/>Logs de acesso<text:line-break/>LGPD<text:line-break/>Termos de uso<text:line-break/>Política de privacidade<text:line-break/>Seguro de carga<text:line-break/>Controle antifraude</text:p>
      <text:p text:style-name="Horizontal_20_Line"/>
      <text:h text:style-name="Heading_20_1" text:outline-level="1">18. Regras de Negócio Importantes</text:h>
      <text:h text:style-name="Heading_20_2" text:outline-level="2">Compatibilidade entre carga e veículo</text:h>
      <text:p text:style-name="Text_20_body">Exemplo:</text:p>
      <text:p text:style-name="P9">Grãos secos não podem ser transportados em veículo baú comum.<text:line-break/>Geladeira não deve ser transportada em carroceria aberta sem proteção.<text:line-break/>Motor pode exigir amarração e proteção contra vazamento.<text:line-break/>Móveis podem exigir ajudante.</text:p>
      <text:p text:style-name="Horizontal_20_Line"/>
      <text:h text:style-name="Heading_20_2" text:outline-level="2">Documentação obrigatória</text:h>
      <text:p text:style-name="Text_20_body">Para motoristas:</text:p>
      <text:p text:style-name="P9">CNH válida<text:line-break/>Documento do veículo<text:line-break/>Seguro, se exigido<text:line-break/>Comprovante de endereço<text:line-break/>Dados bancários</text:p>
      <text:p text:style-name="Text_20_body">Para Pessoa Jurídica:</text:p>
      <text:p text:style-name="P9">CNPJ válido<text:line-break/>Contrato social, se necessário<text:line-break/>Inscrição estadual, quando aplicável<text:line-break/>Dados fiscais</text:p>
      <text:p text:style-name="Text_20_body">Para cargas agrícolas:</text:p>
      <text:p text:style-name="P9">Nota fiscal<text:line-break/>Romaneio<text:line-break/>Documento de origem<text:line-break/>Peso de saída<text:line-break/>Peso de chegada</text:p>
      <text:p text:style-name="Horizontal_20_Line"/>
      <text:h text:style-name="Heading_20_1" text:outline-level="1">19. Exemplo de Jornada — Entrega de Geladeira</text:h>
      <text:p text:style-name="P9">1. Cliente PF entra no app.<text:line-break/>2. Informa que deseja transportar uma geladeira.<text:line-break/>3. Sistema pergunta peso, tamanho e se há escadas.<text:line-break/><text:soft-page-break/>4. Sistema recomenda Fiorino baú ou caminhonete coberta.<text:line-break/>5. Sistema calcula preço.<text:line-break/>6. Cliente confirma.<text:line-break/>7. Sistema encontra motorista próximo.<text:line-break/>8. Motorista aceita.<text:line-break/>9. Cliente acompanha o veículo até a coleta.<text:line-break/>10. Motorista fotografa a geladeira.<text:line-break/>11. Carga é transportada com rastreamento.<text:line-break/>12. Cliente acompanha ETA.<text:line-break/>13. Motorista entrega.<text:line-break/>14. Recebedor confirma por assinatura ou código.<text:line-break/>15. Sistema finaliza e libera pagamento.</text:p>
      <text:p text:style-name="Horizontal_20_Line"/>
      <text:h text:style-name="Heading_20_1" text:outline-level="1">20. Exemplo de Jornada — Transporte de Soja</text:h>
      <text:p text:style-name="P9">1. Empresa PJ solicita transporte de soja.<text:line-break/>2. Informa origem, destino, peso estimado e tipo de grão.<text:line-break/>3. Sistema exige veículo graneleiro.<text:line-break/>4. Sistema verifica transportadores disponíveis.<text:line-break/>5. Calcula rota considerando peso, pedágios e restrições.<text:line-break/>6. Transportador aceita o frete.<text:line-break/>7. Na origem, motorista registra pesagem inicial.<text:line-break/>8. Sistema registra nota fiscal e romaneio.<text:line-break/>9. Carga segue com GPS ativo.<text:line-break/>10. Sistema monitora paradas e desvios.<text:line-break/>11. No destino, motorista registra pesagem final.<text:line-break/>12. Recebedor confirma entrega.<text:line-break/>13. Sistema gera comprovante e relatório de rastreabilidade.</text:p>
      <text:p text:style-name="Horizontal_20_Line"/>
      <text:h text:style-name="Heading_20_1" text:outline-level="1">21. Indicadores de Gestão</text:h>
      <text:p text:style-name="Text_20_body">O painel administrativo deve exibir:</text:p>
      <text:p text:style-name="P9">Número de entregas realizadas<text:line-break/>Entregas em andamento<text:line-break/>Tempo médio de entrega<text:line-break/>Atrasos<text:line-break/>Cancelamentos<text:line-break/>Receita total<text:line-break/>Ticket médio<text:line-break/>Motoristas ativos<text:line-break/>Veículos disponíveis<text:line-break/>Avaliação média dos motoristas<text:line-break/>Ocorrências por tipo<text:line-break/>Rotas mais usadas<text:line-break/>Tipos de carga mais transportados<text:line-break/>Taxa de aceite dos motoristas<text:line-break/>Taxa de entrega no prazo</text:p>
      <text:p text:style-name="Horizontal_20_Line"/>
      <text:h text:style-name="Heading_20_1" text:outline-level="1">22. Diagrama Simplificado da Arquitetura</text:h>
      <text:p text:style-name="P9">[Cliente App/Web]<text:line-break/> <text:s text:c="7"/>|<text:line-break/><text:soft-page-break/> <text:s text:c="7"/>v<text:line-break/>[API Gateway] &lt;--------------------&gt; [Painel Admin]<text:line-break/> <text:s text:c="7"/>|<text:line-break/> <text:s text:c="7"/>v<text:line-break/>[Serviços Backend]<text:line-break/> <text:s text:c="7"/>|<text:line-break/> <text:s text:c="7"/>├── Auth Service<text:line-break/> <text:s text:c="7"/>├── User Service<text:line-break/> <text:s text:c="7"/>├── Vehicle Service<text:line-break/> <text:s text:c="7"/>├── Freight Service<text:line-break/> <text:s text:c="7"/>├── Pricing Service<text:line-break/> <text:s text:c="7"/>├── Matching Service<text:line-break/> <text:s text:c="7"/>├── Routing Service<text:line-break/> <text:s text:c="7"/>├── ETA Service<text:line-break/> <text:s text:c="7"/>├── Tracking Service<text:line-break/> <text:s text:c="7"/>├── Payment Service<text:line-break/> <text:s text:c="7"/>├── Notification Service<text:line-break/> <text:s text:c="7"/>└── Document Service<text:line-break/> <text:s text:c="7"/>|<text:line-break/> <text:s text:c="7"/>v<text:line-break/>[Bancos de Dados]<text:line-break/> <text:s text:c="7"/>|<text:line-break/> <text:s text:c="7"/>├── PostgreSQL/PostGIS<text:line-break/> <text:s text:c="7"/>├── Redis<text:line-break/> <text:s text:c="7"/>├── MongoDB/Event Store<text:line-break/> <text:s text:c="7"/>└── Data Lake<text:line-break/> <text:s text:c="7"/>|<text:line-break/> <text:s text:c="7"/>v<text:line-break/>[Camada de IA]<text:line-break/> <text:s text:c="7"/>|<text:line-break/> <text:s text:c="7"/>├── Recomendação de Veículo<text:line-break/> <text:s text:c="7"/>├── Melhor Rota<text:line-break/> <text:s text:c="7"/>├── Previsão de Chegada<text:line-break/> <text:s text:c="7"/>├── Detecção de Risco<text:line-break/> <text:s text:c="7"/>└── Preço Dinâmico<text:line-break/> <text:s text:c="7"/>|<text:line-break/> <text:s text:c="7"/>v<text:line-break/>[Integrações Externas]<text:line-break/> <text:s text:c="7"/>|<text:line-break/> <text:s text:c="7"/>├── Mapas/GPS<text:line-break/> <text:s text:c="7"/>├── Pagamentos<text:line-break/> <text:s text:c="7"/>├── Clima<text:line-break/> <text:s text:c="7"/>├── Pedágios<text:line-break/> <text:s text:c="7"/>├── SEFAZ<text:line-break/> <text:s text:c="7"/>└── Seguro de Carga</text:p>
      <text:p text:style-name="Horizontal_20_Line"/>
      <text:h text:style-name="Heading_20_1" text:outline-level="1">23. MVP — Primeira Versão Recomendada</text:h>
      <text:p text:style-name="Text_20_body">Para começar de forma prática, eu recomendo um MVP com:</text:p>
      <text:h text:style-name="Heading_20_2" text:outline-level="2">Funcionalidades do Cliente</text:h>
      <text:p text:style-name="P9">Cadastro PF/PJ<text:line-break/>Solicitação de frete<text:line-break/>Cálculo básico de preço<text:line-break/>Acompanhamento do pedido<text:line-break/>Rastreamento em mapa<text:line-break/>Avaliação da entrega</text:p>
      <text:h text:style-name="Heading_20_2" text:outline-level="2"><text:soft-page-break/>Funcionalidades do Motorista</text:h>
      <text:p text:style-name="P9">Cadastro do motorista<text:line-break/>Cadastro do veículo<text:line-break/>Aceite de frete<text:line-break/>Atualização de status<text:line-break/>Envio de localização<text:line-break/>Comprovante de entrega</text:p>
      <text:h text:style-name="Heading_20_2" text:outline-level="2">Funcionalidades Administrativas</text:h>
      <text:p text:style-name="P9">Validação de usuários<text:line-break/>Validação de veículos<text:line-break/>Gestão de pedidos<text:line-break/>Gestão de motoristas<text:line-break/>Relatório básico</text:p>
      <text:h text:style-name="Heading_20_2" text:outline-level="2">Inteligência inicial</text:h>
      <text:p text:style-name="P9">Recomendação simples de veículo<text:line-break/>Cálculo de rota por API de mapas<text:line-break/>ETA usando serviço de mapas<text:line-break/>Matching por distância e tipo de veículo</text:p>
      <text:p text:style-name="Text_20_body">Depois, evoluir para:</text:p>
      <text:p text:style-name="P9">IA preditiva<text:line-break/>Preço dinâmico<text:line-break/>Otimização de cargas de retorno<text:line-break/>Score de risco<text:line-break/>Detecção automática de anomalias<text:line-break/>Integração fiscal<text:line-break/>Seguro automatizado</text:p>
      <text:p text:style-name="Horizontal_20_Line"/>
      <text:h text:style-name="Heading_20_1" text:outline-level="1">24. Resumo Executivo</text:h>
      <text:p text:style-name="Text_20_body">O <text:span text:style-name="T1">Uber da Logística</text:span> será uma plataforma inteligente que conecta clientes, motoristas e transportadores para realizar entregas de equipamentos, móveis, peças e grãos secos.</text:p>
      <text:p text:style-name="Text_20_body">A base do sistema será composta por:</text:p>
      <text:p text:style-name="P9">Cadastro de usuários PF/PJ<text:line-break/>Cadastro de motoristas e veículos<text:line-break/>Solicitação de frete<text:line-break/>Matching inteligente<text:line-break/>Roteirização<text:line-break/>Previsão de chegada<text:line-break/>Rastreabilidade<text:line-break/>Pagamento<text:line-break/>Avaliação<text:line-break/>Painel administrativo</text:p>
      <text:p text:style-name="Text_20_body"/>
      <text:p text:style-name="Text_20_body"/>
      <text:p text:style-name="Text_20_body"><text:soft-page-break/>A inteligência do sistema estará principalmente em:</text:p>
      <text:p text:style-name="P9">Escolher o veículo correto<text:line-break/>Encontrar o melhor motorista<text:line-break/>Calcular a melhor rota<text:line-break/>Prever horário de chegada<text:line-break/>Monitorar riscos<text:line-break/>Garantir rastreabilidade da carga</text:p>
      <text:p text:style-name="Text_20_body">Essa arquitetura permite começar com um MVP enxuto e evoluir para uma plataforma robusta de logística inteligente.</text:p>
      <text:p text:style-name="Text_20_body"/>
      <text:p text:style-name="P17">Gostaria que esse Sistema seja Usado na Forma de Portal e Aplicativo</text:p>
      <text:p text:style-name="P2"/>
      <text:h text:style-name="Heading_20_1" text:outline-level="1">Sistema Inteligente de Logística em <text:span text:style-name="T1">Portal Web + Aplicativo Mobile</text:span></text:h>
      <text:p text:style-name="Text_20_body">Perfeito, Roberto. O <text:span text:style-name="T1">“Uber da Logística”</text:span> pode ser projetado para funcionar em dois canais principais:</text:p>
      <text:list text:style-name="L13">
        <text:list-item>
          <text:p text:style-name="P18">Portal Web</text:p>
        </text:list-item>
        <text:list-item>
          <text:p text:style-name="P18">Aplicativo Mobile</text:p>
        </text:list-item>
      </text:list>
      <text:p text:style-name="Text_20_body">Cada canal atende perfis e necessidades diferentes, mas todos conectados ao mesmo backend, banco de dados e motor inteligente do sistema.</text:p>
      <text:p text:style-name="Horizontal_20_Line"/>
      <text:h text:style-name="Heading_20_1" text:outline-level="1">1. Visão Geral da Solução</text:h>
      <text:p text:style-name="P9">Usuários PF/PJ<text:line-break/> <text:s text:c="3"/>├── Portal Web do Cliente<text:line-break/> <text:s text:c="3"/>└── Aplicativo do Cliente<text:line-break/><text:line-break/>Motoristas / Transportadores<text:line-break/> <text:s text:c="3"/>└── Aplicativo do Motorista<text:line-break/><text:line-break/>Administradores<text:line-break/> <text:s text:c="3"/>└── Portal Administrativo Web<text:line-break/><text:line-break/>Sistema Central<text:line-break/> <text:s text:c="3"/>├── APIs<text:line-break/> <text:s text:c="3"/>├── Banco de Dados<text:line-break/> <text:s text:c="3"/>├── Motor de Rotas<text:line-break/> <text:s text:c="3"/>├── Rastreamento<text:line-break/> <text:s text:c="3"/>├── Previsão de Chegada<text:line-break/> <text:s text:c="3"/>├── Matching Inteligente<text:line-break/> <text:s text:c="3"/>└── Pagamentos</text:p>
      <text:p text:style-name="Horizontal_20_Line"/>
      <text:h text:style-name="Heading_20_1" text:outline-level="1"><text:soft-page-break/>2. Canais do Sistema</text:h>
      <text:h text:style-name="Heading_20_2" text:outline-level="2">2.1. Portal Web do Cliente</text:h>
      <text:p text:style-name="Text_20_body">O portal web será acessado por navegador, como:</text:p>
      <text:p text:style-name="P9">www.uberdalogistica.com.br</text:p>
      <text:p text:style-name="Text_20_body">Esse portal será ideal para:</text:p>
      <text:list text:style-name="L14">
        <text:list-item>
          <text:p text:style-name="P19">Empresas</text:p>
        </text:list-item>
        <text:list-item>
          <text:p text:style-name="P19">Cooperativas</text:p>
        </text:list-item>
        <text:list-item>
          <text:p text:style-name="P19">Lojas</text:p>
        </text:list-item>
        <text:list-item>
          <text:p text:style-name="P19">Indústrias</text:p>
        </text:list-item>
        <text:list-item>
          <text:p text:style-name="P19">Produtores rurais</text:p>
        </text:list-item>
        <text:list-item>
          <text:p text:style-name="P19">Usuários que preferem computador</text:p>
        </text:list-item>
        <text:list-item>
          <text:p text:style-name="P19">Operações com maior volume de pedidos</text:p>
        </text:list-item>
      </text:list>
      <text:p text:style-name="Horizontal_20_Line"/>
      <text:h text:style-name="Heading_20_2" text:outline-level="2">Funcionalidades do Portal Web do Cliente</text:h>
      <text:h text:style-name="Heading_20_3" text:outline-level="3">Cadastro</text:h>
      <text:p text:style-name="P9">Cadastro de Pessoa Física<text:line-break/>Cadastro de Pessoa Jurídica<text:line-break/>Validação de CPF/CNPJ<text:line-break/>Cadastro de endereços frequentes<text:line-break/>Cadastro de formas de pagamento</text:p>
      <text:h text:style-name="Heading_20_3" text:outline-level="3">Solicitação de Frete</text:h>
      <text:p text:style-name="P9">Informar origem<text:line-break/>Informar destino<text:line-break/>Selecionar tipo de carga<text:line-break/>Informar peso<text:line-break/>Informar volume<text:line-break/>Adicionar fotos da carga<text:line-break/>Selecionar data e horário<text:line-break/>Solicitar ajudante, seguro ou embalagem<text:line-break/>Receber estimativa de preço<text:line-break/>Confirmar solicitação</text:p>
      <text:h text:style-name="Heading_20_3" text:outline-level="3">Gestão de Entregas</text:h>
      <text:p text:style-name="P9">Acompanhar entregas em andamento<text:line-break/>Consultar entregas finalizadas<text:line-break/>Cancelar pedido<text:line-break/>Reagendar coleta<text:line-break/>Visualizar motorista designado<text:line-break/>Visualizar veículo designado<text:line-break/>Baixar comprovante de entrega</text:p>
      <text:h text:style-name="Heading_20_3" text:outline-level="3"><text:soft-page-break/>Rastreabilidade</text:h>
      <text:p text:style-name="P9">Mapa em tempo real<text:line-break/>Status da entrega<text:line-break/>Linha do tempo dos eventos<text:line-break/>Previsão de chegada<text:line-break/>Registro de coleta<text:line-break/>Registro de entrega<text:line-break/>Fotos e assinaturas</text:p>
      <text:h text:style-name="Heading_20_3" text:outline-level="3">Área Financeira</text:h>
      <text:p text:style-name="P9">Consultar pagamentos<text:line-break/>Baixar recibos<text:line-break/>Baixar notas fiscais, se aplicável<text:line-break/>Consultar histórico financeiro<text:line-break/>Gerenciar cartões, Pix ou boleto</text:p>
      <text:p text:style-name="Horizontal_20_Line"/>
      <text:h text:style-name="Heading_20_1" text:outline-level="1">3. Aplicativo do Cliente</text:h>
      <text:p text:style-name="Text_20_body">O aplicativo do cliente será usado em celulares Android e iOS.</text:p>
      <text:p text:style-name="Text_20_body">Ele será útil para quem precisa fazer solicitações rápidas, acompanhar entregas pelo celular e receber notificações.</text:p>
      <text:p text:style-name="Horizontal_20_Line"/>
      <text:h text:style-name="Heading_20_2" text:outline-level="2">Funcionalidades do Aplicativo do Cliente</text:h>
      <text:p text:style-name="P9">Login e cadastro<text:line-break/>Solicitar frete rapidamente<text:line-break/>Fotografar a carga pelo celular<text:line-break/>Usar localização atual como origem<text:line-break/>Acompanhar motorista no mapa<text:line-break/>Receber notificações push<text:line-break/>Conversar com motorista ou suporte<text:line-break/>Confirmar entrega por código<text:line-break/>Avaliar motorista<text:line-break/>Consultar histórico de pedidos</text:p>
      <text:p text:style-name="Horizontal_20_Line"/>
      <text:h text:style-name="Heading_20_2" text:outline-level="2">Exemplo de Uso</text:h>
      <text:p text:style-name="P9">1. Cliente abre o app.<text:line-break/>2. Seleciona "Nova Entrega".<text:line-break/>3. Informa que deseja transportar uma geladeira.<text:line-break/>4. Tira foto da geladeira.<text:line-break/>5. Informa origem e destino.<text:line-break/>6. Sistema recomenda veículo adequado.<text:line-break/>7. Cliente confirma o valor.<text:line-break/>8. Sistema encontra motorista.<text:line-break/>9. Cliente acompanha o trajeto em tempo real.<text:line-break/>10. Ao final, avalia a entrega.</text:p>
      <text:p text:style-name="Horizontal_20_Line"/>
      <text:h text:style-name="Heading_20_1" text:outline-level="1"><text:soft-page-break/>4. Aplicativo do Motorista</text:h>
      <text:p text:style-name="Text_20_body">O motorista deve usar principalmente o aplicativo mobile, pois ele estará em deslocamento.</text:p>
      <text:p text:style-name="Horizontal_20_Line"/>
      <text:h text:style-name="Heading_20_2" text:outline-level="2">Funcionalidades do Aplicativo do Motorista</text:h>
      <text:h text:style-name="Heading_20_3" text:outline-level="3">Cadastro e Validação</text:h>
      <text:p text:style-name="P9">Cadastro pessoal<text:line-break/>Cadastro de CNH<text:line-break/>Cadastro do veículo<text:line-break/>Envio de fotos do veículo<text:line-break/>Envio de documentos<text:line-break/>Conta bancária ou chave Pix<text:line-break/>Aceite dos termos de uso</text:p>
      <text:h text:style-name="Heading_20_3" text:outline-level="3">Disponibilidade</text:h>
      <text:p text:style-name="P9">Ficar online<text:line-break/>Ficar offline<text:line-break/>Informar região de atuação<text:line-break/>Informar tipos de carga aceitos<text:line-break/>Informar disponibilidade de ajudante</text:p>
      <text:h text:style-name="Heading_20_3" text:outline-level="3">Recebimento de Fretes</text:h>
      <text:p text:style-name="P9">Receber chamada de frete<text:line-break/>Visualizar origem<text:line-break/>Visualizar destino<text:line-break/>Visualizar tipo de carga<text:line-break/>Visualizar peso e volume<text:line-break/>Visualizar valor estimado<text:line-break/>Aceitar ou recusar frete</text:p>
      <text:h text:style-name="Heading_20_3" text:outline-level="3">Operação da Entrega</text:h>
      <text:p text:style-name="P9">Navegação até a origem<text:line-break/>Confirmação de chegada<text:line-break/>Registro de coleta<text:line-break/>Foto da carga<text:line-break/>Assinatura ou código de coleta<text:line-break/>Navegação até o destino<text:line-break/>Atualização automática de localização<text:line-break/>Registro de entrega<text:line-break/>Foto da entrega<text:line-break/>Assinatura ou código de entrega</text:p>
      <text:h text:style-name="Heading_20_3" text:outline-level="3">Financeiro do Motorista</text:h>
      <text:p text:style-name="P9">Consultar ganhos<text:line-break/>Ver fretes realizados<text:line-break/>Solicitar saque<text:line-break/>Consultar repasses<text:line-break/>Visualizar taxas da plataforma</text:p>
      <text:p text:style-name="Horizontal_20_Line"/>
      <text:h text:style-name="Heading_20_1" text:outline-level="1"><text:soft-page-break/>5. Portal Administrativo Web</text:h>
      <text:p text:style-name="Text_20_body">O portal administrativo será usado pela equipe interna da empresa.</text:p>
      <text:p text:style-name="Text_20_body">Ele será a central de controle da operação.</text:p>
      <text:p text:style-name="Horizontal_20_Line"/>
      <text:h text:style-name="Heading_20_2" text:outline-level="2">Funcionalidades do Portal Administrativo</text:h>
      <text:h text:style-name="Heading_20_3" text:outline-level="3">Gestão de Usuários</text:h>
      <text:p text:style-name="P9">Consultar clientes PF<text:line-break/>Consultar clientes PJ<text:line-break/>Bloquear ou liberar usuários<text:line-break/>Validar documentos<text:line-break/>Consultar histórico de pedidos</text:p>
      <text:h text:style-name="Heading_20_3" text:outline-level="3">Gestão de Motoristas</text:h>
      <text:p text:style-name="P9">Aprovar motoristas<text:line-break/>Reprovar documentos<text:line-break/>Consultar CNH<text:line-break/>Consultar veículos<text:line-break/>Analisar avaliações<text:line-break/>Bloquear motorista<text:line-break/>Suspender motorista</text:p>
      <text:h text:style-name="Heading_20_3" text:outline-level="3">Gestão de Veículos</text:h>
      <text:p text:style-name="P9">Cadastrar tipos de veículos aceitos<text:line-break/>Validar documentos dos veículos<text:line-break/>Consultar capacidade de carga<text:line-break/>Verificar seguro<text:line-break/>Aprovar veículo para grãos secos<text:line-break/>Aprovar veículo para equipamentos</text:p>
      <text:h text:style-name="Heading_20_3" text:outline-level="3">Gestão de Fretes</text:h>
      <text:p text:style-name="P9">Monitorar pedidos em tempo real<text:line-break/>Ver entregas em andamento<text:line-break/>Ver entregas atrasadas<text:line-break/>Intervir em problemas<text:line-break/>Cancelar pedidos<text:line-break/>Reatribuir motorista<text:line-break/>Acompanhar ocorrências</text:p>
      <text:h text:style-name="Heading_20_3" text:outline-level="3">Monitoramento em Mapa</text:h>
      <text:p text:style-name="P9">Visualizar motoristas online<text:line-break/>Visualizar entregas ativas<text:line-break/>Visualizar rotas em andamento<text:line-break/>Identificar desvios<text:line-break/>Identificar paradas longas<text:line-break/>Identificar atrasos</text:p>
      <text:h text:style-name="Heading_20_3" text:outline-level="3"><text:soft-page-break/>Relatórios</text:h>
      <text:p text:style-name="P9">Total de fretes realizados<text:line-break/>Receita por período<text:line-break/>Motoristas mais ativos<text:line-break/>Clientes com maior volume<text:line-break/>Tipos de carga mais transportados<text:line-break/>Tempo médio de entrega<text:line-break/>Taxa de atraso<text:line-break/>Taxa de cancelamento</text:p>
      <text:p text:style-name="Horizontal_20_Line"/>
      <text:h text:style-name="Heading_20_1" text:outline-level="1">6. Divisão por Perfil de Usuário</text:h>
      <text:h text:style-name="Heading_20_2" text:outline-level="2">Cliente Pessoa Física</text:h>
      <text:p text:style-name="Text_20_body">Pode usar:</text:p>
      <text:p text:style-name="P9">Portal Web<text:line-break/>Aplicativo Mobile</text:p>
      <text:p text:style-name="Text_20_body">Exemplos de uso:</text:p>
      <text:p text:style-name="P9">Transporte de fogão<text:line-break/>Transporte de geladeira<text:line-break/>Transporte de móveis<text:line-break/>Transporte de ventilador<text:line-break/>Transporte de motor<text:line-break/>Transporte de peças</text:p>
      <text:p text:style-name="Horizontal_20_Line"/>
      <text:h text:style-name="Heading_20_2" text:outline-level="2">Cliente Pessoa Jurídica</text:h>
      <text:p text:style-name="Text_20_body">Pode usar:</text:p>
      <text:p text:style-name="P9">Portal Web<text:line-break/>Aplicativo Mobile</text:p>
      <text:p text:style-name="Text_20_body">Mas o portal web será mais indicado para empresas.</text:p>
      <text:p text:style-name="Text_20_body">Exemplos de uso:</text:p>
      <text:p text:style-name="P9">Loja de móveis solicitando várias entregas<text:line-break/>Loja de eletrodomésticos despachando produtos<text:line-break/>Oficina transportando motores<text:line-break/>Indústria enviando peças<text:line-break/>Cooperativa transportando soja ou milho<text:line-break/>Cerealista contratando caminhão graneleiro</text:p>
      <text:p text:style-name="Horizontal_20_Line"/>
      <text:h text:style-name="Heading_20_2" text:outline-level="2">Motorista Autônomo</text:h>
      <text:p text:style-name="Text_20_body">Usa principalmente:</text:p>
      <text:p text:style-name="P9">Aplicativo do Motorista</text:p>
      <text:p text:style-name="Horizontal_20_Line"><text:soft-page-break/></text:p>
      <text:h text:style-name="Heading_20_2" text:outline-level="2">Transportadora</text:h>
      <text:p text:style-name="Text_20_body">Pode usar:</text:p>
      <text:p text:style-name="P9">Portal Web da Transportadora<text:line-break/>Aplicativo do Motorista</text:p>
      <text:p text:style-name="Text_20_body">No portal, a transportadora pode:</text:p>
      <text:p text:style-name="P9">Cadastrar vários motoristas<text:line-break/>Cadastrar vários veículos<text:line-break/>Acompanhar sua frota<text:line-break/>Receber fretes<text:line-break/>Controlar ganhos<text:line-break/>Ver desempenho dos motoristas</text:p>
      <text:p text:style-name="Horizontal_20_Line"/>
      <text:h text:style-name="Heading_20_2" text:outline-level="2">Administrador da Plataforma</text:h>
      <text:p text:style-name="Text_20_body">Usa:</text:p>
      <text:p text:style-name="P9">Portal Administrativo Web</text:p>
      <text:p text:style-name="Horizontal_20_Line"/>
      <text:h text:style-name="Heading_20_1" text:outline-level="1">7. Arquitetura Técnica com Portal e Aplicativo</text:h>
      <text:p text:style-name="P9">[Portal Web Cliente]<text:line-break/> <text:s text:c="7"/>|<text:line-break/>[App Cliente Android/iOS]<text:line-break/> <text:s text:c="7"/>|<text:line-break/>[App Motorista Android/iOS]<text:line-break/> <text:s text:c="7"/>|<text:line-break/>[Portal Transportadora]<text:line-break/> <text:s text:c="7"/>|<text:line-break/>[Portal Administrativo]<text:line-break/> <text:s text:c="7"/>|<text:line-break/> <text:s text:c="7"/>v<text:line-break/>[API Gateway]<text:line-break/> <text:s text:c="7"/>|<text:line-break/> <text:s text:c="7"/>v<text:line-break/>[Backend / Serviços]<text:line-break/> <text:s text:c="7"/>|<text:line-break/> <text:s text:c="7"/>├── Serviço de Autenticação<text:line-break/> <text:s text:c="7"/>├── Serviço de Usuários<text:line-break/> <text:s text:c="7"/>├── Serviço de Veículos<text:line-break/> <text:s text:c="7"/>├── Serviço de Fretes<text:line-break/> <text:s text:c="7"/>├── Serviço de Matching<text:line-break/> <text:s text:c="7"/>├── Serviço de Rotas<text:line-break/> <text:s text:c="7"/>├── Serviço de Rastreamento<text:line-break/> <text:s text:c="7"/>├── Serviço de ETA<text:line-break/> <text:s text:c="7"/>├── Serviço de Pagamentos<text:line-break/> <text:s text:c="7"/>├── Serviço de Notificações<text:line-break/> <text:s text:c="7"/>├── Serviço de Documentos<text:line-break/> <text:s text:c="7"/>└── Serviço de Relatórios<text:line-break/> <text:s text:c="7"/>|<text:line-break/> <text:s text:c="7"/>v<text:line-break/><text:soft-page-break/>[Bancos de Dados]<text:line-break/> <text:s text:c="7"/>|<text:line-break/> <text:s text:c="7"/>├── PostgreSQL/PostGIS<text:line-break/> <text:s text:c="7"/>├── Redis<text:line-break/> <text:s text:c="7"/>├── MongoDB/Eventos<text:line-break/> <text:s text:c="7"/>└── Data Lake<text:line-break/> <text:s text:c="7"/>|<text:line-break/> <text:s text:c="7"/>v<text:line-break/>[Integrações Externas]<text:line-break/> <text:s text:c="7"/>|<text:line-break/> <text:s text:c="7"/>├── Google Maps / Mapbox / HERE<text:line-break/> <text:s text:c="7"/>├── Gateway de Pagamento<text:line-break/> <text:s text:c="7"/>├── Pix<text:line-break/> <text:s text:c="7"/>├── SEFAZ<text:line-break/> <text:s text:c="7"/>├── Consulta CNPJ<text:line-break/> <text:s text:c="7"/>├── Clima<text:line-break/> <text:s text:c="7"/>├── Pedágios<text:line-break/> <text:s text:c="7"/>└── Seguro de Carga</text:p>
      <text:p text:style-name="Horizontal_20_Line"/>
      <text:h text:style-name="Heading_20_1" text:outline-level="1">8. Sugestão de Tecnologias</text:h>
      <text:h text:style-name="Heading_20_2" text:outline-level="2">Portal Web</text:h>
      <text:p text:style-name="Text_20_body">Opções recomendadas:</text:p>
      <text:p text:style-name="P9">React.js<text:line-break/>Next.js<text:line-break/>Angular<text:line-break/>Vue.js</text:p>
      <text:p text:style-name="Text_20_body">Sugestão prática:</text:p>
      <text:p text:style-name="P9">Next.js</text:p>
      <text:p text:style-name="Text_20_body">Porque permite criar um portal rápido, moderno e com boa performance.</text:p>
      <text:p text:style-name="Horizontal_20_Line"/>
      <text:h text:style-name="Heading_20_2" text:outline-level="2">Aplicativo Mobile</text:h>
      <text:p text:style-name="Text_20_body">Opções recomendadas:</text:p>
      <text:p text:style-name="P9">Flutter<text:line-break/>React Native<text:line-break/>Kotlin para Android<text:line-break/>Swift para iOS</text:p>
      <text:p text:style-name="Text_20_body">Sugestão prática:</text:p>
      <text:p text:style-name="P9">Flutter</text:p>
      <text:p text:style-name="Text_20_body">Porque permite desenvolver um único aplicativo para Android e iOS.</text:p>
      <text:p text:style-name="Horizontal_20_Line"/>
      <text:h text:style-name="Heading_20_2" text:outline-level="2"><text:soft-page-break/>Backend</text:h>
      <text:p text:style-name="Text_20_body">Opções recomendadas:</text:p>
      <text:p text:style-name="P9">Node.js com NestJS<text:line-break/>Java com Spring Boot<text:line-break/>Python com FastAPI<text:line-break/>.NET</text:p>
      <text:p text:style-name="Text_20_body">Sugestão prática:</text:p>
      <text:p text:style-name="P9">NestJS ou Spring Boot</text:p>
      <text:p text:style-name="Horizontal_20_Line"/>
      <text:h text:style-name="Heading_20_2" text:outline-level="2">Banco de Dados</text:h>
      <text:p text:style-name="P9">PostgreSQL com PostGIS<text:line-break/>Redis<text:line-break/>MongoDB</text:p>
      <text:p text:style-name="Horizontal_20_Line"/>
      <text:h text:style-name="Heading_20_2" text:outline-level="2">Mapas e GPS</text:h>
      <text:p text:style-name="P9">Google Maps API<text:line-break/>Mapbox<text:line-break/>HERE Maps</text:p>
      <text:p text:style-name="Horizontal_20_Line"/>
      <text:h text:style-name="Heading_20_2" text:outline-level="2">Notificações</text:h>
      <text:p text:style-name="P9">Firebase Cloud Messaging<text:line-break/>E-mail<text:line-break/>SMS<text:line-break/>WhatsApp, se integrado oficialmente</text:p>
      <text:p text:style-name="Horizontal_20_Line"/>
      <text:h text:style-name="Heading_20_1" text:outline-level="1">9. MVP Recomendado com Portal e Aplicativo</text:h>
      <text:p text:style-name="Text_20_body">Para a primeira versão, recomendo dividir assim:</text:p>
      <text:p text:style-name="Horizontal_20_Line"/>
      <text:h text:style-name="Heading_20_2" text:outline-level="2">MVP — Portal Web Cliente</text:h>
      <text:p text:style-name="P9">Cadastro PF/PJ<text:line-break/>Login<text:line-break/>Solicitação de frete<text:line-break/>Consulta de preço<text:line-break/>Histórico de pedidos<text:line-break/>Rastreamento básico<text:line-break/>Comprovante de entrega</text:p>
      <text:p text:style-name="Horizontal_20_Line"/>
      <text:h text:style-name="Heading_20_2" text:outline-level="2"><text:soft-page-break/>MVP — Aplicativo Cliente</text:h>
      <text:p text:style-name="P9">Cadastro e login<text:line-break/>Solicitar frete<text:line-break/>Acompanhar entrega<text:line-break/>Receber notificações<text:line-break/>Avaliar motorista</text:p>
      <text:p text:style-name="Horizontal_20_Line"/>
      <text:h text:style-name="Heading_20_2" text:outline-level="2">MVP — Aplicativo Motorista</text:h>
      <text:p text:style-name="P9">Cadastro do motorista<text:line-break/>Cadastro do veículo<text:line-break/>Ficar online/offline<text:line-break/>Receber solicitação de frete<text:line-break/>Aceitar frete<text:line-break/>Atualizar status da entrega<text:line-break/>Enviar localização GPS<text:line-break/>Registrar coleta<text:line-break/>Registrar entrega</text:p>
      <text:p text:style-name="Horizontal_20_Line"/>
      <text:h text:style-name="Heading_20_2" text:outline-level="2">MVP — Portal Administrativo</text:h>
      <text:p text:style-name="P9">Aprovar usuários<text:line-break/>Aprovar motoristas<text:line-break/>Aprovar veículos<text:line-break/>Visualizar pedidos<text:line-break/>Monitorar entregas<text:line-break/>Gerenciar ocorrências<text:line-break/>Consultar relatórios básicos</text:p>
      <text:p text:style-name="Horizontal_20_Line"/>
      <text:h text:style-name="Heading_20_1" text:outline-level="1">10. Experiência do Usuário</text:h>
      <text:h text:style-name="Heading_20_2" text:outline-level="2">Tela inicial do Portal</text:h>
      <text:p text:style-name="Text_20_body">Opções principais:</text:p>
      <text:p text:style-name="P9">Solicitar Frete<text:line-break/>Acompanhar Entrega<text:line-break/>Cadastrar Veículo<text:line-break/>Entrar como Motorista<text:line-break/>Entrar como Empresa<text:line-break/>Área Administrativa</text:p>
      <text:p text:style-name="Horizontal_20_Line"/>
      <text:h text:style-name="Heading_20_2" text:outline-level="2">Tela inicial do Aplicativo Cliente</text:h>
      <text:p text:style-name="P9">Nova Entrega<text:line-break/>Minhas Entregas<text:line-break/>Rastreamento<text:line-break/>Pagamentos<text:line-break/><text:soft-page-break/>Perfil<text:line-break/>Suporte</text:p>
      <text:p text:style-name="Horizontal_20_Line"/>
      <text:h text:style-name="Heading_20_2" text:outline-level="2">Tela inicial do Aplicativo Motorista</text:h>
      <text:p text:style-name="P9">Ficar Online<text:line-break/>Fretes Disponíveis<text:line-break/>Entrega Atual<text:line-break/>Meus Ganhos<text:line-break/>Meu Veículo<text:line-break/>Perfil<text:line-break/>Suporte</text:p>
      <text:p text:style-name="Horizontal_20_Line"/>
      <text:h text:style-name="Heading_20_1" text:outline-level="1">11. Fluxo Resumido no Portal e App</text:h>
      <text:p text:style-name="P9">1. Cliente acessa portal ou app.<text:line-break/>2. Faz cadastro como PF ou PJ.<text:line-break/>3. Solicita uma entrega.<text:line-break/>4. Informa carga, origem e destino.<text:line-break/>5. Sistema calcula preço e veículo ideal.<text:line-break/>6. Motoristas compatíveis recebem a solicitação no app.<text:line-break/>7. Um motorista aceita.<text:line-break/>8. Cliente acompanha tudo pelo portal ou app.<text:line-break/>9. Motorista atualiza a operação pelo app.<text:line-break/>10. Entrega é confirmada.<text:line-break/>11. Sistema gera comprovante e histórico de rastreabilidade.</text:p>
      <text:p text:style-name="Horizontal_20_Line"/>
      <text:h text:style-name="Heading_20_1" text:outline-level="1">12. Conclusão</text:h>
      <text:p text:style-name="Text_20_body">O sistema deve ser construído como uma plataforma multicanal:</text:p>
      <text:p text:style-name="P9">Portal Web para clientes, empresas, transportadoras e administradores<text:line-break/>Aplicativo Mobile para clientes<text:line-break/>Aplicativo Mobile para motoristas<text:line-break/>Backend centralizado com APIs<text:line-break/>Banco de dados único e integrado<text:line-break/>Motor inteligente de rotas, ETA, matching e rastreabilidade</text:p>
      <text:p text:style-name="Text_20_body">Dessa forma, o <text:span text:style-name="T1">Uber da Logística</text:span> poderá atender tanto operações simples, como transportar uma geladeira, quanto operações maiores, como transportar soja, milho, peças industriais e móveis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0"><text:soft-page-break/></text:p>
      <text:p text:style-name="P20">Monte uma arquitetura de Rede desse sistema </text:p>
      <text:p text:style-name="P21"/>
      <text:h text:style-name="Heading_20_1" text:outline-level="1">Arquitetura de Rede — Sistema Inteligente de Logística</text:h>
      <text:h text:style-name="Heading_20_2" text:outline-level="2">Portal Web + Aplicativos + Backend + Rastreamento em Tempo Real</text:h>
      <text:p text:style-name="Text_20_body">Roberto, abaixo está uma proposta de <text:span text:style-name="T1">arquitetura de rede</text:span> para o sistema <text:span text:style-name="T1">Uber da Logística</text:span>, considerando:</text:p>
      <text:list text:style-name="L15">
        <text:list-item>
          <text:p text:style-name="P22">Portal Web do Cliente</text:p>
        </text:list-item>
        <text:list-item>
          <text:p text:style-name="P22">Portal Administrativo</text:p>
        </text:list-item>
        <text:list-item>
          <text:p text:style-name="P22">Portal da Transportadora</text:p>
        </text:list-item>
        <text:list-item>
          <text:p text:style-name="P22">Aplicativo do Cliente</text:p>
        </text:list-item>
        <text:list-item>
          <text:p text:style-name="P22">Aplicativo do Motorista</text:p>
        </text:list-item>
        <text:list-item>
          <text:p text:style-name="P22">Rastreamento GPS em tempo real</text:p>
        </text:list-item>
        <text:list-item>
          <text:p text:style-name="P22">Melhor rota</text:p>
        </text:list-item>
        <text:list-item>
          <text:p text:style-name="P22">Previsão de chegada</text:p>
        </text:list-item>
        <text:list-item>
          <text:p text:style-name="P22">Cadastro de veículos</text:p>
        </text:list-item>
        <text:list-item>
          <text:p text:style-name="P23"><text:span text:style-name="T1">Integrações externas</text:span>, como mapas, pagamentos, SEFAZ, clima e notificações.</text:p>
        </text:list-item>
      </text:list>
      <text:p text:style-name="Horizontal_20_Line"/>
      <text:h text:style-name="Heading_20_1" text:outline-level="1">1. Visão Geral da Arquitetura de Rede</text:h>
      <text:p text:style-name="Text_20_body">A arquitetura deve ser segura, escalável e preparada para alto volume de acessos, principalmente por causa do rastreamento dos motoristas em tempo real.</text:p>
      <text:p text:style-name="P9">Usuários Web / Apps Mobile<text:line-break/> <text:s text:c="7"/>|<text:line-break/> <text:s text:c="7"/>v<text:line-break/>[Internet]<text:line-break/> <text:s text:c="7"/>|<text:line-break/> <text:s text:c="7"/>v<text:line-break/>[DNS]<text:line-break/> <text:s text:c="7"/>|<text:line-break/> <text:s text:c="7"/>v<text:line-break/>[CDN + WAF]<text:line-break/> <text:s text:c="7"/>|<text:line-break/> <text:s text:c="7"/>v<text:line-break/>[Load Balancer Público]<text:line-break/> <text:s text:c="7"/>|<text:line-break/> <text:s text:c="7"/>v<text:line-break/>[API Gateway / Ingress]<text:line-break/> <text:s text:c="7"/>|<text:line-break/> <text:s text:c="7"/>v<text:line-break/><text:soft-page-break/>[VPC / Rede Privada na Nuvem]<text:line-break/> <text:s text:c="7"/>|<text:line-break/> <text:s text:c="7"/>├── Sub-rede Pública<text:line-break/> <text:s text:c="7"/>├── Sub-rede Privada de Aplicação<text:line-break/> <text:s text:c="7"/>├── Sub-rede Privada de Dados<text:line-break/> <text:s text:c="7"/>├── Sub-rede de Monitoramento<text:line-break/> <text:s text:c="7"/>└── Sub-rede de Integrações</text:p>
      <text:p text:style-name="Horizontal_20_Line"/>
      <text:h text:style-name="Heading_20_1" text:outline-level="1">2. Diagrama Geral de Rede</text:h>
      <text:p text:style-name="P9"><text:s text:c="25"/>INTERNET<text:line-break/> <text:s text:c="27"/>|<text:line-break/> <text:s text:c="27"/>v<text:line-break/> <text:s text:c="19"/>+----------------+<text:line-break/> <text:s text:c="19"/>| <text:s text:c="5"/>DNS <text:s text:c="6"/>|<text:line-break/> <text:s text:c="19"/>+----------------+<text:line-break/> <text:s text:c="27"/>|<text:line-break/> <text:s text:c="27"/>v<text:line-break/> <text:s text:c="13"/>+-----------------------------+<text:line-break/> <text:s text:c="13"/>| CDN + WAF + Proteção DDoS <text:s text:c="2"/>|<text:line-break/> <text:s text:c="13"/>+-----------------------------+<text:line-break/> <text:s text:c="27"/>|<text:line-break/> <text:s text:c="27"/>v<text:line-break/> <text:s text:c="17"/>+--------------------+<text:line-break/> <text:s text:c="17"/>| Load Balancer Web <text:s/>|<text:line-break/> <text:s text:c="17"/>+--------------------+<text:line-break/> <text:s text:c="27"/>|<text:line-break/> <text:s text:c="27"/>v<text:line-break/> <text:s text:c="17"/>+--------------------+<text:line-break/> <text:s text:c="17"/>| API Gateway/Ingress|<text:line-break/> <text:s text:c="17"/>+--------------------+<text:line-break/> <text:s text:c="27"/>|<text:line-break/> <text:s text:c="27"/>v<text:line-break/> <text:s text:c="7"/>+------------------------------------------------+<text:line-break/> <text:s text:c="7"/>| <text:s text:c="17"/>VPC / VNET <text:s text:c="19"/>|<text:line-break/> <text:s text:c="7"/>| <text:s text:c="47"/>|<text:line-break/> <text:s text:c="7"/>| <text:s/>+------------------+ <text:s text:c="2"/>+-------------------+ <text:s/>|<text:line-break/> <text:s text:c="7"/>| <text:s/>| Sub-rede Pública | <text:s text:c="2"/>| NAT Gateway <text:s text:c="6"/>| <text:s/>|<text:line-break/> <text:s text:c="7"/>| <text:s/>| Bastion opcional | <text:s text:c="2"/>| Saída controlada <text:s/>| <text:s/>|<text:line-break/> <text:s text:c="7"/>| <text:s/>+------------------+ <text:s text:c="2"/>+-------------------+ <text:s/>|<text:line-break/> <text:s text:c="7"/>| <text:s text:c="47"/>|<text:line-break/> <text:s text:c="7"/>| <text:s/>+------------------------------------------+ <text:s/>|<text:line-break/> <text:s text:c="7"/>| <text:s/>| Sub-rede Privada de Aplicações <text:s text:c="10"/>| <text:s/>|<text:line-break/> <text:s text:c="7"/>| <text:s/>| <text:s text:c="41"/>| <text:s/>|<text:line-break/> <text:s text:c="7"/>| <text:s/>| <text:s/>Portal Web <text:s text:c="29"/>| <text:s/>|<text:line-break/> <text:s text:c="7"/>| <text:s/>| <text:s/>Backend APIs <text:s text:c="27"/>| <text:s/>|<text:line-break/> <text:s text:c="7"/>| <text:s/>| <text:s/>Matching Service <text:s text:c="23"/>| <text:s/>|<text:line-break/> <text:s text:c="7"/>| <text:s/>| <text:s/>Tracking Service <text:s text:c="23"/>| <text:s/>|<text:line-break/> <text:s text:c="7"/>| <text:s/>| <text:s/>Routing Service <text:s text:c="24"/>| <text:s/>|<text:line-break/> <text:s text:c="7"/>| <text:s/>| <text:s/>ETA Service <text:s text:c="28"/>| <text:s/>|<text:line-break/> <text:s text:c="7"/>| <text:s/>| <text:s/>Notification Service <text:s text:c="19"/>| <text:s/>|<text:line-break/> <text:s text:c="7"/>| <text:s/>+------------------------------------------+ <text:s/>|<text:line-break/> <text:s text:c="7"/>| <text:s text:c="47"/>|<text:line-break/> <text:s text:c="7"/>| <text:s/>+------------------------------------------+ <text:s/>|<text:line-break/> <text:s text:c="7"/>| <text:s/>| Sub-rede Privada de Dados <text:s text:c="15"/>| <text:s/>|<text:line-break/> <text:s text:c="7"/>| <text:s/>| <text:s text:c="41"/>| <text:s/>|<text:line-break/> <text:s text:c="7"/>| <text:s/>| PostgreSQL/PostGIS <text:s text:c="22"/>| <text:s/>|<text:line-break/> <text:s text:c="7"/>| <text:s/>| Redis <text:s text:c="35"/>| <text:s/>|<text:line-break/> <text:s text:c="7"/>| <text:s/>| MongoDB/Event Store <text:s text:c="21"/>| <text:s/>|<text:line-break/> <text:s text:c="7"/>| <text:s/>| Object Storage <text:s text:c="26"/>| <text:s/>|<text:line-break/><text:soft-page-break/> <text:s text:c="7"/>| <text:s/>+------------------------------------------+ <text:s/>|<text:line-break/> <text:s text:c="7"/>| <text:s text:c="47"/>|<text:line-break/> <text:s text:c="7"/>| <text:s/>+------------------------------------------+ <text:s/>|<text:line-break/> <text:s text:c="7"/>| <text:s/>| Sub-rede de Mensageria <text:s text:c="18"/>| <text:s/>|<text:line-break/> <text:s text:c="7"/>| <text:s/>| Kafka / RabbitMQ / SQS <text:s text:c="18"/>| <text:s/>|<text:line-break/> <text:s text:c="7"/>| <text:s/>+------------------------------------------+ <text:s/>|<text:line-break/> <text:s text:c="7"/>| <text:s text:c="47"/>|<text:line-break/> <text:s text:c="7"/>| <text:s/>+------------------------------------------+ <text:s/>|<text:line-break/> <text:s text:c="7"/>| <text:s/>| Sub-rede de Observabilidade <text:s text:c="13"/>| <text:s/>|<text:line-break/> <text:s text:c="7"/>| <text:s/>| Logs / Métricas / Traces / SIEM <text:s text:c="9"/>| <text:s/>|<text:line-break/> <text:s text:c="7"/>| <text:s/>+------------------------------------------+ <text:s/>|<text:line-break/> <text:s text:c="7"/>| <text:s text:c="47"/>|<text:line-break/> <text:s text:c="7"/>+------------------------------------------------+<text:line-break/> <text:s text:c="27"/>|<text:line-break/> <text:s text:c="27"/>v<text:line-break/> <text:s text:c="13"/>+-----------------------------+<text:line-break/> <text:s text:c="13"/>| Integrações Externas <text:s text:c="7"/>|<text:line-break/> <text:s text:c="13"/>| Mapas, Pagamentos, SEFAZ, <text:s text:c="2"/>|<text:line-break/> <text:s text:c="13"/>| Clima, SMS, WhatsApp, Pix <text:s text:c="2"/>|<text:line-break/> <text:s text:c="13"/>+-----------------------------+</text:p>
      <text:p text:style-name="Horizontal_20_Line"/>
      <text:h text:style-name="Heading_20_1" text:outline-level="1">3. Componentes Principais da Rede</text:h>
      <text:h text:style-name="Heading_20_2" text:outline-level="2">3.1. Internet</text:h>
      <text:p text:style-name="Text_20_body">Origem dos acessos dos usuários:</text:p>
      <text:p text:style-name="P9">Clientes pelo Portal Web<text:line-break/>Clientes pelo Aplicativo Mobile<text:line-break/>Motoristas pelo Aplicativo Mobile<text:line-break/>Transportadoras pelo Portal Web<text:line-break/>Administradores pelo Portal Administrativo</text:p>
      <text:p text:style-name="Horizontal_20_Line"/>
      <text:h text:style-name="Heading_20_2" text:outline-level="2">3.2. DNS</text:h>
      <text:p text:style-name="Text_20_body">Responsável por direcionar os domínios do sistema.</text:p>
      <text:p text:style-name="Text_20_body">Exemplos:</text:p>
      <text:p text:style-name="P9">www.uberdalogistica.com.br<text:line-break/>api.uberdalogistica.com.br<text:line-break/>admin.uberdalogistica.com.br<text:line-break/>transportadora.uberdalogistica.com.br<text:line-break/>tracking.uberdalogistica.com.br</text:p>
      <text:p text:style-name="Text_20_body">Funções:</text:p>
      <text:p text:style-name="P9">Resolver nomes para IPs públicos<text:line-break/>Direcionar tráfego para CDN ou Load Balancer<text:line-break/>Permitir failover em caso de indisponibilidade</text:p>
      <text:p text:style-name="Horizontal_20_Line"/>
      <text:h text:style-name="Heading_20_2" text:outline-level="2"><text:soft-page-break/>3.3. CDN</text:h>
      <text:p text:style-name="Text_20_body">A CDN será usada para acelerar o acesso ao portal e entregar conteúdo estático.</text:p>
      <text:p text:style-name="Text_20_body">Exemplos de conteúdo:</text:p>
      <text:p text:style-name="P9">Imagens<text:line-break/>Arquivos JavaScript<text:line-break/>Arquivos CSS<text:line-break/>Ícones<text:line-break/>Documentos públicos<text:line-break/>Arquivos do portal</text:p>
      <text:p text:style-name="Text_20_body">Benefícios:</text:p>
      <text:p text:style-name="P9">Menor latência<text:line-break/>Menor carga nos servidores<text:line-break/>Melhor desempenho para usuários em diferentes regiões<text:line-break/>Proteção adicional contra ataques</text:p>
      <text:p text:style-name="Horizontal_20_Line"/>
      <text:h text:style-name="Heading_20_2" text:outline-level="2">3.4. WAF — Web Application Firewall</text:h>
      <text:p text:style-name="Text_20_body">O WAF protege o sistema contra ataques comuns.</text:p>
      <text:p text:style-name="Text_20_body">Deve bloquear ou mitigar:</text:p>
      <text:p text:style-name="P9">SQL Injection<text:line-break/>Cross-Site Scripting<text:line-break/>Ataques DDoS<text:line-break/>Bots maliciosos<text:line-break/>Tentativas de força bruta<text:line-break/>Requisições suspeitas<text:line-break/>Uploads inválidos</text:p>
      <text:p text:style-name="Horizontal_20_Line"/>
      <text:h text:style-name="Heading_20_2" text:outline-level="2">3.5. Load Balancer Público</text:h>
      <text:p text:style-name="Text_20_body">O Load Balancer distribui as requisições entre os servidores de aplicação.</text:p>
      <text:p text:style-name="Text_20_body">Ele recebe tráfego de:</text:p>
      <text:p text:style-name="P9">Portal Web<text:line-break/>Aplicativo Cliente<text:line-break/>Aplicativo Motorista<text:line-break/>Portal Administrativo<text:line-break/>Portal da Transportadora</text:p>
      <text:p text:style-name="Text_20_body">Protocolos:</text:p>
      <text:p text:style-name="P9">HTTPS na porta 443<text:line-break/>HTTP na porta 80 apenas para redirecionamento para HTTPS<text:line-break/>WebSocket seguro via WSS para rastreamento em tempo real</text:p>
      <text:p text:style-name="Horizontal_20_Line"/>
      <text:h text:style-name="Heading_20_1" text:outline-level="1"><text:soft-page-break/>4. VPC / Rede Privada na Nuvem</text:h>
      <text:p text:style-name="Text_20_body">A VPC, ou Virtual Private Cloud, é a rede privada onde ficam os principais recursos do sistema.</text:p>
      <text:p text:style-name="Text_20_body">Ela deve ser dividida em sub-redes.</text:p>
      <text:p text:style-name="Horizontal_20_Line"/>
      <text:h text:style-name="Heading_20_1" text:outline-level="1">5. Sub-redes Sugeridas</text:h>
      <text:h text:style-name="Heading_20_2" text:outline-level="2">5.1. Sub-rede Pública</text:h>
      <text:p text:style-name="Text_20_body">Deve conter poucos recursos expostos diretamente.</text:p>
      <text:p text:style-name="Text_20_body">Componentes possíveis:</text:p>
      <text:p text:style-name="P9">Load Balancer público<text:line-break/>NAT Gateway<text:line-break/>Bastion Host, se necessário<text:line-break/>VPN Gateway</text:p>
      <text:p text:style-name="Text_20_body">Recomendação:</text:p>
      <text:p text:style-name="P9">Servidores de aplicação não devem ficar diretamente expostos na internet.</text:p>
      <text:p text:style-name="Horizontal_20_Line"/>
      <text:h text:style-name="Heading_20_2" text:outline-level="2">5.2. Sub-rede Privada de Aplicações</text:h>
      <text:p text:style-name="Text_20_body">Aqui ficam os serviços do sistema.</text:p>
      <text:p text:style-name="Text_20_body">Componentes:</text:p>
      <text:p text:style-name="P9">API Gateway<text:line-break/>Serviços Backend<text:line-break/>Portal Web, se renderizado no servidor<text:line-break/>Serviço de Matching<text:line-break/>Serviço de Rotas<text:line-break/>Serviço de ETA<text:line-break/>Serviço de Rastreamento<text:line-break/>Serviço de Notificações<text:line-break/>Serviço de Pagamentos<text:line-break/>Serviço de Documentos<text:line-break/>Serviço de Relatórios</text:p>
      <text:p text:style-name="Text_20_body">Esses serviços não devem ter IP público.</text:p>
      <text:p text:style-name="Text_20_body">Eles recebem tráfego apenas do:</text:p>
      <text:p text:style-name="P9">Load Balancer<text:line-break/>API Gateway<text:line-break/>Serviços internos autorizados</text:p>
      <text:p text:style-name="Horizontal_20_Line"/>
      <text:h text:style-name="Heading_20_2" text:outline-level="2">5.3. Sub-rede Privada de Dados</text:h>
      <text:p text:style-name="Text_20_body">Aqui ficam os bancos de dados e armazenamento sensível.</text:p>
      <text:p text:style-name="Text_20_body"><text:soft-page-break/>Componentes:</text:p>
      <text:p text:style-name="P9">PostgreSQL com PostGIS<text:line-break/>Redis<text:line-break/>MongoDB ou banco de eventos<text:line-break/>Data Lake<text:line-break/>Backup Storage<text:line-break/>Object Storage privado</text:p>
      <text:p text:style-name="Text_20_body">Acesso permitido apenas para:</text:p>
      <text:p text:style-name="P9">Serviços backend autorizados<text:line-break/>Ferramentas de backup<text:line-break/>Serviços de monitoramento autorizados</text:p>
      <text:p text:style-name="Text_20_body">Não deve haver acesso direto pela internet.</text:p>
      <text:p text:style-name="Horizontal_20_Line"/>
      <text:h text:style-name="Heading_20_2" text:outline-level="2">5.4. Sub-rede de Mensageria</text:h>
      <text:p text:style-name="Text_20_body">Responsável por processar eventos assíncronos.</text:p>
      <text:p text:style-name="Text_20_body">Componentes:</text:p>
      <text:p text:style-name="P9">Kafka<text:line-break/>RabbitMQ<text:line-break/>SQS<text:line-break/>Pub/Sub<text:line-break/>Event Bus</text:p>
      <text:p text:style-name="Text_20_body">Eventos típicos:</text:p>
      <text:p text:style-name="P9">PedidoCriado<text:line-break/>MotoristaAceitou<text:line-break/>CargaColetada<text:line-break/>LocalizacaoAtualizada<text:line-break/>ETAAtualizado<text:line-break/>EntregaFinalizada<text:line-break/>PagamentoConfirmado<text:line-break/>OcorrenciaRegistrada</text:p>
      <text:p text:style-name="Text_20_body">Essa sub-rede é importante para o rastreamento em tempo real.</text:p>
      <text:p text:style-name="Horizontal_20_Line"/>
      <text:h text:style-name="Heading_20_2" text:outline-level="2">5.5. Sub-rede de Observabilidade</text:h>
      <text:p text:style-name="Text_20_body">Usada para monitoramento técnico, auditoria e segurança.</text:p>
      <text:p text:style-name="Text_20_body">Componentes:</text:p>
      <text:p text:style-name="P9">Central de logs<text:line-break/>Métricas<text:line-break/>Tracing distribuído<text:line-break/>APM<text:line-break/>SIEM<text:line-break/>Alertas<text:line-break/>Dashboards</text:p>
      <text:p text:style-name="Text_20_body"><text:soft-page-break/>Ferramentas possíveis:</text:p>
      <text:p text:style-name="P9">Prometheus<text:line-break/>Grafana<text:line-break/>ELK Stack<text:line-break/>OpenSearch<text:line-break/>Datadog<text:line-break/>New Relic<text:line-break/>CloudWatch<text:line-break/>Azure Monitor<text:line-break/>Google Cloud Operations</text:p>
      <text:p text:style-name="Horizontal_20_Line"/>
      <text:h text:style-name="Heading_20_2" text:outline-level="2">5.6. Sub-rede de Integrações</text:h>
      <text:p text:style-name="Text_20_body">Camada controlada para comunicação com serviços externos.</text:p>
      <text:p text:style-name="Text_20_body">Integrações:</text:p>
      <text:p text:style-name="P9">Google Maps<text:line-break/>Mapbox<text:line-break/>HERE Maps<text:line-break/>Gateway de pagamento<text:line-break/>Pix<text:line-break/>SEFAZ<text:line-break/>Consulta CPF/CNPJ<text:line-break/>APIs de clima<text:line-break/>APIs de pedágio<text:line-break/>Firebase Cloud Messaging<text:line-break/>SMS<text:line-break/>E-mail<text:line-break/>WhatsApp Business API<text:line-break/>Seguro de carga</text:p>
      <text:p text:style-name="Text_20_body">Essa comunicação deve passar por:</text:p>
      <text:p text:style-name="P9">NAT Gateway<text:line-break/>Firewall de saída<text:line-break/>Controle de domínios permitidos<text:line-break/>Logs de integração</text:p>
      <text:p text:style-name="Horizontal_20_Line"/>
      <text:h text:style-name="Heading_20_1" text:outline-level="1">6. Arquitetura de Rede por Ambiente</text:h>
      <text:p text:style-name="Text_20_body">O ideal é separar os ambientes.</text:p>
      <text:p text:style-name="P9">Desenvolvimento<text:line-break/>Homologação<text:line-break/>Produção</text:p>
      <text:h text:style-name="Heading_20_2" text:outline-level="2">Estrutura recomendada</text:h>
      <text:p text:style-name="P9">Conta/Projeto de Desenvolvimento<text:line-break/>Conta/Projeto de Homologação<text:line-break/>Conta/Projeto de Produção</text:p>
      <text:p text:style-name="Text_20_body">Ou, no mínimo:</text:p>
      <text:p text:style-name="P9"><text:soft-page-break/>VPC de Desenvolvimento<text:line-break/>VPC de Homologação<text:line-break/>VPC de Produção</text:p>
      <text:p text:style-name="Text_20_body">Benefícios:</text:p>
      <text:p text:style-name="P9">Evita impacto em produção<text:line-break/>Melhora segurança<text:line-break/>Permite testes controlados<text:line-break/>Facilita auditoria</text:p>
      <text:p text:style-name="Horizontal_20_Line"/>
      <text:h text:style-name="Heading_20_1" text:outline-level="1">7. Comunicação dos Aplicativos Mobile</text:h>
      <text:h text:style-name="Heading_20_2" text:outline-level="2">Aplicativo do Cliente</text:h>
      <text:p text:style-name="P9">App Cliente<text:line-break/> <text:s text:c="3"/>|<text:line-break/> <text:s text:c="3"/>v<text:line-break/>Internet<text:line-break/> <text:s text:c="3"/>|<text:line-break/> <text:s text:c="3"/>v<text:line-break/>HTTPS/WSS<text:line-break/> <text:s text:c="3"/>|<text:line-break/> <text:s text:c="3"/>v<text:line-break/>API Gateway<text:line-break/> <text:s text:c="3"/>|<text:line-break/> <text:s text:c="3"/>v<text:line-break/>Serviços Backend</text:p>
      <text:p text:style-name="Text_20_body">Usa:</text:p>
      <text:p text:style-name="P9">HTTPS para login, pedidos, pagamentos e histórico<text:line-break/>WSS/WebSocket para rastreamento em tempo real<text:line-break/>Push Notification para atualizações importantes</text:p>
      <text:p text:style-name="Horizontal_20_Line"/>
      <text:h text:style-name="Heading_20_2" text:outline-level="2">Aplicativo do Motorista</text:h>
      <text:p text:style-name="Text_20_body">O app do motorista tem papel crítico, pois envia localização GPS.</text:p>
      <text:p text:style-name="P9">App Motorista<text:line-break/> <text:s text:c="3"/>|<text:line-break/> <text:s text:c="3"/>v<text:line-break/>HTTPS/WSS/MQTT<text:line-break/> <text:s text:c="3"/>|<text:line-break/> <text:s text:c="3"/>v<text:line-break/>API Gateway / Tracking Gateway<text:line-break/> <text:s text:c="3"/>|<text:line-break/> <text:s text:c="3"/>v<text:line-break/>Tracking Service<text:line-break/> <text:s text:c="3"/>|<text:line-break/> <text:s text:c="3"/>v<text:line-break/>Redis / Kafka / Banco de Eventos</text:p>
      <text:h text:style-name="Heading_20_3" text:outline-level="3"><text:soft-page-break/>Frequência de envio de localização</text:h>
      <text:p text:style-name="Text_20_body">Sugestão:</text:p>
      <text:p text:style-name="P9">A cada 5 a 15 segundos durante entrega ativa<text:line-break/>A cada 30 a 60 segundos quando online sem entrega<text:line-break/>Sem envio quando offline</text:p>
      <text:p text:style-name="Text_20_body">Dados enviados:</text:p>
      <text:p text:style-name="P9">{<text:line-break/> <text:s/>"driver_id": "DRV123",<text:line-break/> <text:s/>"freight_order_id": "FRT456",<text:line-break/> <text:s/>"latitude": -15.601,<text:line-break/> <text:s/>"longitude": -56.097,<text:line-break/> <text:s/>"speed": 62,<text:line-break/> <text:s/>"heading": 180,<text:line-break/> <text:s/>"timestamp": "2026-05-30T09:33:25-04:00"<text:line-break/>}</text:p>
      <text:p text:style-name="Horizontal_20_Line"/>
      <text:h text:style-name="Heading_20_1" text:outline-level="1">8. Fluxo de Rastreamento em Tempo Real</text:h>
      <text:p text:style-name="P9">1. Motorista envia localização pelo app.<text:line-break/>2. API Gateway recebe a requisição.<text:line-break/>3. Tracking Service valida o token e o pedido.<text:line-break/>4. Localização atual é gravada no Redis.<text:line-break/>5. Evento é publicado no Kafka/RabbitMQ.<text:line-break/>6. Serviço de ETA recalcula previsão de chegada.<text:line-break/>7. Portal/App do cliente recebe atualização em tempo real.<text:line-break/>8. Evento é salvo no banco de rastreabilidade.</text:p>
      <text:p text:style-name="Text_20_body">Diagrama:</text:p>
      <text:p text:style-name="P9">[App Motorista]<text:line-break/> <text:s text:c="5"/>|<text:line-break/> <text:s text:c="5"/>v<text:line-break/>[Tracking Gateway]<text:line-break/> <text:s text:c="5"/>|<text:line-break/> <text:s text:c="5"/>v<text:line-break/>[Tracking Service]<text:line-break/> <text:s text:c="5"/>|<text:line-break/> <text:s text:c="5"/>├── [Redis - posição atual]<text:line-break/> <text:s text:c="5"/>├── [Kafka - evento de localização]<text:line-break/> <text:s text:c="5"/>├── [PostGIS - trilha geográfica]<text:line-break/> <text:s text:c="5"/>└── [ETA Service]<text:line-break/> <text:s text:c="13"/>|<text:line-break/> <text:s text:c="13"/>v<text:line-break/> <text:s text:c="6"/>[App/Portal Cliente]</text:p>
      <text:p text:style-name="Horizontal_20_Line"/>
      <text:h text:style-name="Heading_20_1" text:outline-level="1">9. Fluxo de Solicitação de Frete</text:h>
      <text:p text:style-name="P9">[Cliente Portal/App]<text:line-break/> <text:s text:c="7"/>|<text:line-break/> <text:s text:c="7"/>v<text:line-break/>[HTTPS]<text:line-break/> <text:s text:c="7"/>|<text:line-break/><text:soft-page-break/> <text:s text:c="7"/>v<text:line-break/>[CDN/WAF]<text:line-break/> <text:s text:c="7"/>|<text:line-break/> <text:s text:c="7"/>v<text:line-break/>[Load Balancer]<text:line-break/> <text:s text:c="7"/>|<text:line-break/> <text:s text:c="7"/>v<text:line-break/>[API Gateway]<text:line-break/> <text:s text:c="7"/>|<text:line-break/> <text:s text:c="7"/>v<text:line-break/>[Freight Service]<text:line-break/> <text:s text:c="7"/>|<text:line-break/> <text:s text:c="7"/>├── [Pricing Service]<text:line-break/> <text:s text:c="7"/>├── [Vehicle Recommendation Service]<text:line-break/> <text:s text:c="7"/>├── [Routing Service]<text:line-break/> <text:s text:c="7"/>├── [Matching Service]<text:line-break/> <text:s text:c="7"/>└── [Notification Service]</text:p>
      <text:p text:style-name="Horizontal_20_Line"/>
      <text:h text:style-name="Heading_20_1" text:outline-level="1">10. Fluxo de Matching de Motorista</text:h>
      <text:p text:style-name="P9">1. Cliente cria pedido de frete.<text:line-break/>2. Sistema identifica tipo de carga.<text:line-break/>3. Sistema define tipo de veículo necessário.<text:line-break/>4. Matching Service consulta motoristas próximos.<text:line-break/>5. Redis/PostGIS retorna motoristas compatíveis.<text:line-break/>6. Motoristas recebem notificação no app.<text:line-break/>7. Primeiro motorista qualificado aceita.<text:line-break/>8. Pedido é vinculado ao motorista e ao veículo.</text:p>
      <text:p text:style-name="Text_20_body">Diagrama:</text:p>
      <text:p text:style-name="P9">[Freight Service]<text:line-break/> <text:s text:c="6"/>|<text:line-break/> <text:s text:c="6"/>v<text:line-break/>[Matching Service]<text:line-break/> <text:s text:c="6"/>|<text:line-break/> <text:s text:c="6"/>├── [Redis - motoristas online]<text:line-break/> <text:s text:c="6"/>├── [PostGIS - busca geográfica]<text:line-break/> <text:s text:c="6"/>├── [Vehicle Service - compatibilidade]<text:line-break/> <text:s text:c="6"/>└── [Notification Service]<text:line-break/> <text:s text:c="19"/>|<text:line-break/> <text:s text:c="19"/>v<text:line-break/> <text:s text:c="12"/>[App Motorista]</text:p>
      <text:p text:style-name="Horizontal_20_Line"/>
      <text:h text:style-name="Heading_20_1" text:outline-level="1">11. Portas e Protocolos Recomendados</text:h>
      <text:p text:style-name="P9">HTTPS 443<text:line-break/>- Portal Web<text:line-break/>- APIs<text:line-break/>- Aplicativos Mobile<text:line-break/>- Integrações externas<text:line-break/><text:line-break/>HTTP 80<text:line-break/>- Apenas redirecionamento para HTTPS<text:line-break/><text:line-break/>WSS 443<text:line-break/><text:soft-page-break/>- Rastreamento em tempo real<text:line-break/>- Atualizações de status<text:line-break/>- Comunicação bidirecional<text:line-break/><text:line-break/>TCP interno<text:line-break/>- Comunicação entre microsserviços<text:line-break/><text:line-break/>PostgreSQL 5432<text:line-break/>- Somente rede privada<text:line-break/><text:line-break/>Redis 6379<text:line-break/>- Somente rede privada<text:line-break/><text:line-break/>Kafka 9092<text:line-break/>- Somente rede privada<text:line-break/><text:line-break/>MongoDB 27017<text:line-break/>- Somente rede privada</text:p>
      <text:p text:style-name="Horizontal_20_Line"/>
      <text:h text:style-name="Heading_20_1" text:outline-level="1">12. Segurança de Rede</text:h>
      <text:h text:style-name="Heading_20_2" text:outline-level="2">12.1. Regras principais</text:h>
      <text:p text:style-name="P9">Nenhum banco de dados exposto à internet<text:line-break/>Todo tráfego externo deve usar HTTPS<text:line-break/>APIs protegidas por autenticação<text:line-break/>Comunicação interna controlada por Security Groups<text:line-break/>Ambientes separados<text:line-break/>Acesso administrativo via VPN ou Bastion<text:line-break/>Logs centralizados<text:line-break/>Criptografia em trânsito e em repouso</text:p>
      <text:p text:style-name="Horizontal_20_Line"/>
      <text:h text:style-name="Heading_20_2" text:outline-level="2">12.2. Security Groups</text:h>
      <text:h text:style-name="Heading_20_3" text:outline-level="3">Load Balancer</text:h>
      <text:p text:style-name="Text_20_body">Entrada:</text:p>
      <text:p text:style-name="P9">443 de qualquer origem<text:line-break/>80 de qualquer origem, apenas redirecionamento</text:p>
      <text:p text:style-name="Text_20_body">Saída:</text:p>
      <text:p text:style-name="P9">443 para API Gateway/Ingress</text:p>
      <text:p text:style-name="Horizontal_20_Line"/>
      <text:h text:style-name="Heading_20_3" text:outline-level="3">API Gateway</text:h>
      <text:p text:style-name="Text_20_body">Entrada:</text:p>
      <text:p text:style-name="P9">443 somente do Load Balancer</text:p>
      <text:p text:style-name="Text_20_body">Saída:</text:p>
      <text:p text:style-name="P9"><text:soft-page-break/>Portas internas para serviços backend</text:p>
      <text:p text:style-name="Horizontal_20_Line"/>
      <text:h text:style-name="Heading_20_3" text:outline-level="3">Serviços Backend</text:h>
      <text:p text:style-name="Text_20_body">Entrada:</text:p>
      <text:p text:style-name="P9">Somente do API Gateway<text:line-break/>Somente de outros serviços autorizados</text:p>
      <text:p text:style-name="Text_20_body">Saída:</text:p>
      <text:p text:style-name="P9">Banco de dados<text:line-break/>Redis<text:line-break/>Mensageria<text:line-break/>Integrações externas via NAT</text:p>
      <text:p text:style-name="Horizontal_20_Line"/>
      <text:h text:style-name="Heading_20_3" text:outline-level="3">Banco de Dados</text:h>
      <text:p text:style-name="Text_20_body">Entrada:</text:p>
      <text:p text:style-name="P9">Somente dos serviços backend autorizados</text:p>
      <text:p text:style-name="Text_20_body">Saída:</text:p>
      <text:p text:style-name="P9">Restrita ao necessário para backup e monitoramento</text:p>
      <text:p text:style-name="Horizontal_20_Line"/>
      <text:h text:style-name="Heading_20_3" text:outline-level="3">Monitoramento</text:h>
      <text:p text:style-name="Text_20_body">Entrada:</text:p>
      <text:p text:style-name="P9">Somente dos agentes autorizados<text:line-break/>VPN administrativa</text:p>
      <text:p text:style-name="Text_20_body">Saída:</text:p>
      <text:p text:style-name="P9">Serviços de alerta<text:line-break/>E-mail<text:line-break/>SMS<text:line-break/>Dashboards</text:p>
      <text:p text:style-name="Horizontal_20_Line"/>
      <text:h text:style-name="Heading_20_1" text:outline-level="1">13. VPN e Acesso Administrativo</text:h>
      <text:p text:style-name="Text_20_body">A administração do ambiente deve ser feita por acesso seguro.</text:p>
      <text:h text:style-name="Heading_20_2" text:outline-level="2">Opções</text:h>
      <text:p text:style-name="P9">VPN Site-to-Site<text:line-break/>VPN Client-to-Site<text:line-break/>Bastion Host<text:line-break/>Zero Trust Access</text:p>
      <text:h text:style-name="Heading_20_2" text:outline-level="2"><text:soft-page-break/>Usuários autorizados</text:h>
      <text:p text:style-name="P9">Equipe de infraestrutura<text:line-break/>Equipe de desenvolvimento autorizada<text:line-break/>Equipe de segurança<text:line-break/>Equipe de suporte nível 2/3</text:p>
      <text:h text:style-name="Heading_20_2" text:outline-level="2">Regras</text:h>
      <text:p text:style-name="P9">MFA obrigatório<text:line-break/>Acesso por perfil<text:line-break/>Registro de sessão<text:line-break/>Logs de comandos<text:line-break/>Bloqueio por IP ou geolocalização, se necessário</text:p>
      <text:p text:style-name="Horizontal_20_Line"/>
      <text:h text:style-name="Heading_20_1" text:outline-level="1">14. Alta Disponibilidade</text:h>
      <text:p text:style-name="Text_20_body">A produção deve rodar em múltiplas zonas de disponibilidade.</text:p>
      <text:p text:style-name="P9">Região Cloud<text:line-break/> <text:s text:c="3"/>|<text:line-break/> <text:s text:c="3"/>├── Zona A<text:line-break/> <text:s text:c="3"/>| <text:s text:c="4"/>├── Aplicações<text:line-break/> <text:s text:c="3"/>| <text:s text:c="4"/>├── Redis réplica<text:line-break/> <text:s text:c="3"/>| <text:s text:c="4"/>└── Workers<text:line-break/> <text:s text:c="3"/>|<text:line-break/> <text:s text:c="3"/>├── Zona B<text:line-break/> <text:s text:c="3"/>| <text:s text:c="4"/>├── Aplicações<text:line-break/> <text:s text:c="3"/>| <text:s text:c="4"/>├── Banco standby<text:line-break/> <text:s text:c="3"/>| <text:s text:c="4"/>└── Workers<text:line-break/> <text:s text:c="3"/>|<text:line-break/> <text:s text:c="3"/>└── Zona C<text:line-break/> <text:s text:c="9"/>├── Aplicações<text:line-break/> <text:s text:c="9"/>├── Mensageria<text:line-break/> <text:s text:c="9"/>└── Monitoramento</text:p>
      <text:p text:style-name="Text_20_body">Benefícios:</text:p>
      <text:p text:style-name="P9">Continuidade em caso de falha<text:line-break/>Escalabilidade horizontal<text:line-break/>Menor risco de indisponibilidade<text:line-break/>Melhor distribuição de carga</text:p>
      <text:p text:style-name="Horizontal_20_Line"/>
      <text:h text:style-name="Heading_20_1" text:outline-level="1">15. Arquitetura de Produção Recomendada</text:h>
      <text:p text:style-name="P9"><text:s text:c="24"/>Usuários<text:line-break/> <text:s text:c="26"/>|<text:line-break/> <text:s text:c="26"/>v<text:line-break/> <text:s text:c="19"/>DNS Gerenciado<text:line-break/> <text:s text:c="26"/>|<text:line-break/> <text:s text:c="26"/>v<text:line-break/> <text:s text:c="16"/>CDN + WAF + DDoS Shield<text:line-break/> <text:s text:c="26"/>|<text:line-break/> <text:s text:c="26"/>v<text:line-break/> <text:s text:c="18"/>Load Balancer Público<text:line-break/><text:soft-page-break/> <text:s text:c="26"/>|<text:line-break/> <text:s text:c="26"/>v<text:line-break/> <text:s text:c="19"/>API Gateway / Ingress<text:line-break/> <text:s text:c="26"/>|<text:line-break/> <text:s text:c="26"/>v<text:line-break/> <text:s text:c="7"/>+-----------------------------------------+<text:line-break/> <text:s text:c="7"/>| Kubernetes / Cluster de Aplicações <text:s text:c="5"/>|<text:line-break/> <text:s text:c="7"/>| <text:s text:c="40"/>|<text:line-break/> <text:s text:c="7"/>| Auth Service <text:s text:c="27"/>|<text:line-break/> <text:s text:c="7"/>| User Service <text:s text:c="27"/>|<text:line-break/> <text:s text:c="7"/>| Vehicle Service <text:s text:c="24"/>|<text:line-break/> <text:s text:c="7"/>| Freight Service <text:s text:c="24"/>|<text:line-break/> <text:s text:c="7"/>| Pricing Service <text:s text:c="24"/>|<text:line-break/> <text:s text:c="7"/>| Matching Service <text:s text:c="23"/>|<text:line-break/> <text:s text:c="7"/>| Routing Service <text:s text:c="24"/>|<text:line-break/> <text:s text:c="7"/>| ETA Service <text:s text:c="28"/>|<text:line-break/> <text:s text:c="7"/>| Tracking Service <text:s text:c="23"/>|<text:line-break/> <text:s text:c="7"/>| Notification Service <text:s text:c="19"/>|<text:line-break/> <text:s text:c="7"/>| Payment Service <text:s text:c="24"/>|<text:line-break/> <text:s text:c="7"/>| Document Service <text:s text:c="23"/>|<text:line-break/> <text:s text:c="7"/>| Admin Service <text:s text:c="26"/>|<text:line-break/> <text:s text:c="7"/>+-----------------------------------------+<text:line-break/> <text:s text:c="26"/>|<text:line-break/> <text:s text:c="6"/>-------------------------------------------------<text:line-break/> <text:s text:c="6"/>| <text:s text:c="19"/>| <text:s text:c="25"/>|<text:line-break/> <text:s text:c="6"/>v <text:s text:c="19"/>v <text:s text:c="25"/>v<text:line-break/> PostgreSQL/PostGIS <text:s text:c="6"/>Redis <text:s text:c="16"/>Kafka/RabbitMQ<text:line-break/> <text:s text:c="6"/>| <text:s text:c="19"/>| <text:s text:c="25"/>|<text:line-break/> <text:s text:c="6"/>v <text:s text:c="19"/>v <text:s text:c="25"/>v<text:line-break/> Backups <text:s text:c="13"/>Cache GPS Atual <text:s text:c="6"/>Eventos Assíncronos</text:p>
      <text:p text:style-name="Horizontal_20_Line"/>
      <text:h text:style-name="Heading_20_1" text:outline-level="1">16. Separação dos Portais na Rede</text:h>
      <text:p text:style-name="Text_20_body">Os portais podem estar separados por domínio e controle de acesso.</text:p>
      <text:p text:style-name="P9">www.uberdalogistica.com.br<text:line-break/>- Portal institucional e cliente<text:line-break/><text:line-break/>app.uberdalogistica.com.br<text:line-break/>- Portal operacional do cliente<text:line-break/><text:line-break/>admin.uberdalogistica.com.br<text:line-break/>- Portal administrativo<text:line-break/><text:line-break/>transportadora.uberdalogistica.com.br<text:line-break/>- Portal das transportadoras<text:line-break/><text:line-break/>api.uberdalogistica.com.br<text:line-break/>- APIs públicas controladas<text:line-break/><text:line-break/>tracking.uberdalogistica.com.br<text:line-break/>- Canal de rastreamento em tempo real</text:p>
      <text:p text:style-name="Horizontal_20_Line"/>
      <text:h text:style-name="Heading_20_1" text:outline-level="1">17. Comunicação com Serviços Externos</text:h>
      <text:p text:style-name="P9">Serviços Backend<text:line-break/> <text:s text:c="5"/>|<text:line-break/><text:soft-page-break/> <text:s text:c="5"/>v<text:line-break/>NAT Gateway / Firewall de Saída<text:line-break/> <text:s text:c="5"/>|<text:line-break/> <text:s text:c="5"/>v<text:line-break/>Internet<text:line-break/> <text:s text:c="5"/>|<text:line-break/> <text:s text:c="5"/>├── Google Maps / Mapbox / HERE<text:line-break/> <text:s text:c="5"/>├── Gateway de Pagamento<text:line-break/> <text:s text:c="5"/>├── Pix<text:line-break/> <text:s text:c="5"/>├── SEFAZ<text:line-break/> <text:s text:c="5"/>├── Consulta CNPJ<text:line-break/> <text:s text:c="5"/>├── Firebase<text:line-break/> <text:s text:c="5"/>├── SMS<text:line-break/> <text:s text:c="5"/>├── E-mail<text:line-break/> <text:s text:c="5"/>└── APIs de Seguro</text:p>
      <text:h text:style-name="Heading_20_2" text:outline-level="2">Recomendação</text:h>
      <text:p text:style-name="Text_20_body">A saída para internet deve ser controlada por:</text:p>
      <text:p text:style-name="P9">Lista de domínios permitidos<text:line-break/>Firewall de aplicação<text:line-break/>Logs de requisição<text:line-break/>Timeouts<text:line-break/>Retentativas controladas<text:line-break/>Circuit breaker</text:p>
      <text:p text:style-name="Horizontal_20_Line"/>
      <text:h text:style-name="Heading_20_1" text:outline-level="1">18. Armazenamento de Arquivos</text:h>
      <text:p text:style-name="Text_20_body">Fotos, documentos e comprovantes devem ficar em armazenamento de objetos.</text:p>
      <text:p text:style-name="Text_20_body">Exemplos:</text:p>
      <text:p text:style-name="P9">Foto da CNH<text:line-break/>Documento do veículo<text:line-break/>Foto da carga<text:line-break/>Foto da entrega<text:line-break/>Assinatura digital<text:line-break/>Comprovante de pagamento<text:line-break/>Nota fiscal<text:line-break/>Romaneio</text:p>
      <text:p text:style-name="Text_20_body">Arquitetura:</text:p>
      <text:p text:style-name="P9">Aplicativo/Portal<text:line-break/> <text:s text:c="5"/>|<text:line-break/> <text:s text:c="5"/>v<text:line-break/>API Gateway<text:line-break/> <text:s text:c="5"/>|<text:line-break/> <text:s text:c="5"/>v<text:line-break/>Document Service<text:line-break/> <text:s text:c="5"/>|<text:line-break/> <text:s text:c="5"/>v<text:line-break/>Object Storage Privado<text:line-break/> <text:s text:c="5"/>|<text:line-break/> <text:s text:c="5"/>v<text:line-break/>URL temporária assinada</text:p>
      <text:p text:style-name="Text_20_body"><text:soft-page-break/>Regras:</text:p>
      <text:p text:style-name="P9">Arquivos privados<text:line-break/>URLs com tempo de expiração<text:line-break/>Criptografia<text:line-break/>Antivírus para uploads<text:line-break/>Controle de acesso por perfil</text:p>
      <text:p text:style-name="Horizontal_20_Line"/>
      <text:h text:style-name="Heading_20_1" text:outline-level="1">19. Backup e Recuperação</text:h>
      <text:h text:style-name="Heading_20_2" text:outline-level="2">Backup dos bancos</text:h>
      <text:p text:style-name="P9">Backup diário completo<text:line-break/>Backup incremental<text:line-break/>Retenção de 30, 60 ou 90 dias<text:line-break/>Criptografia dos backups<text:line-break/>Teste periódico de restauração</text:p>
      <text:h text:style-name="Heading_20_2" text:outline-level="2">Recuperação</text:h>
      <text:p text:style-name="Text_20_body">Indicadores sugeridos:</text:p>
      <text:p text:style-name="P9">RPO: até 15 minutos para dados críticos<text:line-break/>RTO: até 1 hora para produção</text:p>
      <text:p text:style-name="Text_20_body">Onde:</text:p>
      <text:p text:style-name="Text_20_body">$$ RPO = \text{quanto dado a empresa aceita perder} $$</text:p>
      <text:p text:style-name="Text_20_body">$$ RTO = \text{quanto tempo o sistema pode ficar indisponível} $$</text:p>
      <text:p text:style-name="Horizontal_20_Line"/>
      <text:h text:style-name="Heading_20_1" text:outline-level="1">20. Monitoramento de Rede</text:h>
      <text:p text:style-name="Text_20_body">Monitorar:</text:p>
      <text:p text:style-name="P9">Disponibilidade dos serviços<text:line-break/>Latência das APIs<text:line-break/>Tempo de resposta do portal<text:line-break/>Taxa de erro HTTP<text:line-break/>Uso de CPU e memória<text:line-break/>Conexões no banco<text:line-break/>Fila de eventos<text:line-break/>Atraso no processamento de localização<text:line-break/>Falhas em integrações externas<text:line-break/>Tráfego suspeito<text:line-break/>Tentativas de login inválidas</text:p>
      <text:p text:style-name="Text_20_body">Alertas:</text:p>
      <text:p text:style-name="P9">API fora do ar<text:line-break/>Banco indisponível<text:line-break/>Muitos erros 500<text:line-break/>Muitas tentativas de login<text:line-break/>Motoristas sem enviar localização<text:line-break/><text:soft-page-break/>Fila de eventos crescendo<text:line-break/>Latência alta no rastreamento<text:line-break/>Falha em pagamento<text:line-break/>Falha em mapas</text:p>
      <text:p text:style-name="Horizontal_20_Line"/>
      <text:h text:style-name="Heading_20_1" text:outline-level="1">21. Modelo Simplificado de CIDR</text:h>
      <text:p text:style-name="Text_20_body">Exemplo de endereçamento interno:</text:p>
      <text:p text:style-name="P9">VPC Produção: 10.0.0.0/16<text:line-break/><text:line-break/>Sub-rede Pública A: <text:s text:c="13"/>10.0.1.0/24<text:line-break/>Sub-rede Pública B: <text:s text:c="13"/>10.0.2.0/24<text:line-break/><text:line-break/>Sub-rede Aplicação A: <text:s text:c="11"/>10.0.10.0/24<text:line-break/>Sub-rede Aplicação B: <text:s text:c="11"/>10.0.11.0/24<text:line-break/><text:line-break/>Sub-rede Dados A: <text:s text:c="15"/>10.0.20.0/24<text:line-break/>Sub-rede Dados B: <text:s text:c="15"/>10.0.21.0/24<text:line-break/><text:line-break/>Sub-rede Mensageria A: <text:s text:c="10"/>10.0.30.0/24<text:line-break/>Sub-rede Mensageria B: <text:s text:c="10"/>10.0.31.0/24<text:line-break/><text:line-break/>Sub-rede Observabilidade A: <text:s text:c="5"/>10.0.40.0/24<text:line-break/>Sub-rede Observabilidade B: <text:s text:c="5"/>10.0.41.0/24<text:line-break/><text:line-break/>Sub-rede Integrações/NAT A: <text:s text:c="5"/>10.0.50.0/24<text:line-break/>Sub-rede Integrações/NAT B: <text:s text:c="5"/>10.0.51.0/24</text:p>
      <text:p text:style-name="Horizontal_20_Line"/>
      <text:h text:style-name="Heading_20_1" text:outline-level="1">22. Arquitetura para MVP</text:h>
      <text:p text:style-name="Text_20_body">Para começar de forma mais simples, o MVP pode usar:</text:p>
      <text:p text:style-name="P9">DNS<text:line-break/>CDN/WAF<text:line-break/>Load Balancer<text:line-break/>Backend em containers<text:line-break/>PostgreSQL/PostGIS<text:line-break/>Redis<text:line-break/>Object Storage<text:line-break/>Gateway de pagamento<text:line-break/>Google Maps ou Mapbox<text:line-break/>Firebase para notificações</text:p>
      <text:p text:style-name="Text_20_body">Diagrama do MVP:</text:p>
      <text:p text:style-name="P9">[Portal Web / Apps]<text:line-break/> <text:s text:c="7"/>|<text:line-break/> <text:s text:c="7"/>v<text:line-break/>[DNS + CDN + WAF]<text:line-break/> <text:s text:c="7"/>|<text:line-break/> <text:s text:c="7"/>v<text:line-break/>[Load Balancer]<text:line-break/> <text:s text:c="7"/>|<text:line-break/> <text:s text:c="7"/>v<text:line-break/>[Backend API]<text:line-break/><text:soft-page-break/> <text:s text:c="7"/>|<text:line-break/> <text:s text:c="7"/>├── PostgreSQL/PostGIS<text:line-break/> <text:s text:c="7"/>├── Redis<text:line-break/> <text:s text:c="7"/>├── Object Storage<text:line-break/> <text:s text:c="7"/>├── Serviço de Mapas<text:line-break/> <text:s text:c="7"/>└── Gateway de Pagamento</text:p>
      <text:p text:style-name="Text_20_body">Depois, conforme o sistema crescer, incluir:</text:p>
      <text:p text:style-name="P9">Kubernetes<text:line-break/>Kafka<text:line-break/>Data Lake<text:line-break/>IA para ETA<text:line-break/>IA para matching<text:line-break/>SIEM<text:line-break/>Multi-região<text:line-break/>Alta disponibilidade avançada</text:p>
      <text:p text:style-name="Horizontal_20_Line"/>
      <text:h text:style-name="Heading_20_1" text:outline-level="1">23. Resumo da Arquitetura de Rede</text:h>
      <text:p text:style-name="Text_20_body">A arquitetura recomendada para o <text:span text:style-name="T1">Uber da Logística</text:span> deve conter:</text:p>
      <text:p text:style-name="P9">DNS para gerenciamento dos domínios<text:line-break/>CDN para acelerar o portal<text:line-break/>WAF para proteção das aplicações<text:line-break/>Load Balancer para distribuição de tráfego<text:line-break/>API Gateway para controle das APIs<text:line-break/>VPC privada na nuvem<text:line-break/>Sub-redes públicas e privadas<text:line-break/>Backend isolado da internet<text:line-break/>Banco de dados em sub-rede privada<text:line-break/>Redis para rastreamento rápido<text:line-break/>Mensageria para eventos de logística<text:line-break/>VPN para acesso administrativo<text:line-break/>Monitoramento e logs centralizados<text:line-break/>Integração segura com mapas, pagamentos e SEFAZ<text:line-break/>Backup e recuperação de desastre</text:p>
      <text:p text:style-name="Text_20_body">Essa arquitetura permite que o sistema funcione com segurança tanto no <text:span text:style-name="T1">Portal Web</text:span> quanto nos <text:span text:style-name="T1">Aplicativos Mobile</text:span>, garantindo rastreabilidade, previsão de chegada, melhor rota e controle completo das entregas.</text:p>
      <text:p text:style-name="P24"><text:span text:style-name="T3">Q</text:span><text:span text:style-name="T4">uero também nessa aplicação seja utilizado uma IA embutido que o cliente possa interagir e tirar suas duvidas durante a utilização. Faça a Arquitetura incluindo esse Item</text:span></text:p>
      <text:p text:style-name="P25"/>
      <text:h text:style-name="Heading_20_1" text:outline-level="1">Arquitetura do Sistema com <text:span text:style-name="T1">IA Embutida para Atendimento ao Cliente</text:span></text:h>
      <text:p text:style-name="Text_20_body">Roberto, para incluir uma <text:span text:style-name="T1">IA embutida</text:span> no Portal e no Aplicativo, a arquitetura do <text:span text:style-name="T1">Uber da Logística</text:span> deve ganhar uma nova camada chamada <text:span text:style-name="T1">Assistente Inteligente</text:span>, que permitirá ao cliente <text:soft-page-break/>interagir durante o uso do sistema para tirar dúvidas, consultar pedidos, entender preços, acompanhar entregas e receber orientação.</text:p>
      <text:p text:style-name="Text_20_body">Essa IA funcionará como um <text:span text:style-name="T1">chat inteligente dentro do portal e do aplicativo</text:span>.</text:p>
      <text:p text:style-name="Horizontal_20_Line"/>
      <text:h text:style-name="Heading_20_1" text:outline-level="1">1. Objetivo da IA Embutida</text:h>
      <text:p text:style-name="Text_20_body">A IA terá a função de ajudar clientes, motoristas, transportadoras e administradores com dúvidas e operações do sistema.</text:p>
      <text:h text:style-name="Heading_20_2" text:outline-level="2">Exemplos de perguntas do cliente</text:h>
      <text:p text:style-name="P9">Como faço para solicitar um frete?<text:line-break/>Qual veículo é ideal para transportar uma geladeira?<text:line-break/>Quanto tempo falta para minha entrega chegar?<text:line-break/>Onde está meu motorista?<text:line-break/>Posso transportar soja nesse tipo de veículo?<text:line-break/>Como acompanho minha carga?<text:line-break/>Quais documentos preciso para transportar grãos?<text:line-break/>Como funciona o pagamento?<text:line-break/>Meu pedido atrasou, o que aconteceu?<text:line-break/>Como cadastro uma empresa?</text:p>
      <text:p text:style-name="Horizontal_20_Line"/>
      <text:h text:style-name="Heading_20_1" text:outline-level="1">2. Visão Geral da Nova Arquitetura</text:h>
      <text:p text:style-name="Text_20_body">Agora o sistema passa a ter uma camada adicional de IA:</text:p>
      <text:p text:style-name="P9">Portal Web / Aplicativos Mobile<text:line-break/> <text:s text:c="7"/>|<text:line-break/> <text:s text:c="7"/>v<text:line-break/>API Gateway<text:line-break/> <text:s text:c="7"/>|<text:line-break/> <text:s text:c="7"/>v<text:line-break/>Backend Principal<text:line-break/> <text:s text:c="7"/>|<text:line-break/> <text:s text:c="7"/>├── Serviços de Logística<text:line-break/> <text:s text:c="7"/>├── Serviços de Rastreamento<text:line-break/> <text:s text:c="7"/>├── Serviços de Pagamento<text:line-break/> <text:s text:c="7"/>├── Serviços de Cadastro<text:line-break/> <text:s text:c="7"/>└── Serviço de IA Embutida</text:p>
      <text:p text:style-name="Horizontal_20_Line"/>
      <text:h text:style-name="Heading_20_1" text:outline-level="1">3. Arquitetura Geral com IA Embutida</text:h>
      <text:p text:style-name="P9"><text:s text:c="25"/>Usuários<text:line-break/> <text:s text:c="27"/>|<text:line-break/> <text:s text:c="7"/>------------------------------------------------<text:line-break/> <text:s text:c="7"/>| <text:s text:c="21"/>| <text:s text:c="22"/>|<text:line-break/> <text:s text:c="7"/>v <text:s text:c="21"/>v <text:s text:c="22"/>v<text:line-break/>[Portal Web Cliente] <text:s text:c="2"/>[App Cliente] <text:s text:c="9"/>[App Motorista]<text:line-break/> <text:s text:c="7"/>| <text:s text:c="21"/>| <text:s text:c="22"/>|<text:line-break/> <text:s text:c="7"/>-----------------------|------------------------<text:line-break/><text:soft-page-break/> <text:s text:c="30"/>|<text:line-break/> <text:s text:c="30"/>v<text:line-break/> <text:s text:c="24"/>[Internet]<text:line-break/> <text:s text:c="30"/>|<text:line-break/> <text:s text:c="30"/>v<text:line-break/> <text:s text:c="23"/>[DNS + CDN + WAF]<text:line-break/> <text:s text:c="30"/>|<text:line-break/> <text:s text:c="30"/>v<text:line-break/> <text:s text:c="22"/>[Load Balancer]<text:line-break/> <text:s text:c="30"/>|<text:line-break/> <text:s text:c="30"/>v<text:line-break/> <text:s text:c="23"/>[API Gateway]<text:line-break/> <text:s text:c="30"/>|<text:line-break/> <text:s text:c="30"/>v<text:line-break/> <text:s text:c="7"/>+------------------------------------------------------+<text:line-break/> <text:s text:c="7"/>| <text:s text:c="17"/>VPC / Rede Privada <text:s text:c="17"/>|<text:line-break/> <text:s text:c="7"/>| <text:s text:c="53"/>|<text:line-break/> <text:s text:c="7"/>| <text:s/>+------------------------------------------------+ <text:s/>|<text:line-break/> <text:s text:c="7"/>| <text:s/>| <text:s text:c="13"/>Camada de Aplicação <text:s text:c="14"/>| <text:s/>|<text:line-break/> <text:s text:c="7"/>| <text:s/>| <text:s text:c="47"/>| <text:s/>|<text:line-break/> <text:s text:c="7"/>| <text:s/>| <text:s/>Auth Service <text:s text:c="33"/>| <text:s/>|<text:line-break/> <text:s text:c="7"/>| <text:s/>| <text:s/>User Service <text:s text:c="33"/>| <text:s/>|<text:line-break/> <text:s text:c="7"/>| <text:s/>| <text:s/>Vehicle Service <text:s text:c="30"/>| <text:s/>|<text:line-break/> <text:s text:c="7"/>| <text:s/>| <text:s/>Freight Service <text:s text:c="30"/>| <text:s/>|<text:line-break/> <text:s text:c="7"/>| <text:s/>| <text:s/>Pricing Service <text:s text:c="30"/>| <text:s/>|<text:line-break/> <text:s text:c="7"/>| <text:s/>| <text:s/>Matching Service <text:s text:c="29"/>| <text:s/>|<text:line-break/> <text:s text:c="7"/>| <text:s/>| <text:s/>Routing Service <text:s text:c="30"/>| <text:s/>|<text:line-break/> <text:s text:c="7"/>| <text:s/>| <text:s/>Tracking Service <text:s text:c="29"/>| <text:s/>|<text:line-break/> <text:s text:c="7"/>| <text:s/>| <text:s/>ETA Service <text:s text:c="34"/>| <text:s/>|<text:line-break/> <text:s text:c="7"/>| <text:s/>| <text:s/>Payment Service <text:s text:c="30"/>| <text:s/>|<text:line-break/> <text:s text:c="7"/>| <text:s/>| <text:s/>Notification Service <text:s text:c="25"/>| <text:s/>|<text:line-break/> <text:s text:c="7"/>| <text:s/>| <text:s/>Document Service <text:s text:c="29"/>| <text:s/>|<text:line-break/> <text:s text:c="7"/>| <text:s/>| <text:s text:c="47"/>| <text:s/>|<text:line-break/> <text:s text:c="7"/>| <text:s/>| <text:s/>AI Assistant Service <text:s text:c="25"/>| <text:s/>|<text:line-break/> <text:s text:c="7"/>| <text:s/>| <text:s/>AI Orchestrator <text:s text:c="30"/>| <text:s/>|<text:line-break/> <text:s text:c="7"/>| <text:s/>| <text:s/>RAG / Base de Conhecimento <text:s text:c="19"/>| <text:s/>|<text:line-break/> <text:s text:c="7"/>| <text:s/>| <text:s/>Human Escalation Service <text:s text:c="21"/>| <text:s/>|<text:line-break/> <text:s text:c="7"/>| <text:s/>+------------------------------------------------+ <text:s/>|<text:line-break/> <text:s text:c="7"/>| <text:s text:c="53"/>|<text:line-break/> <text:s text:c="7"/>| <text:s/>+------------------------------------------------+ <text:s/>|<text:line-break/> <text:s text:c="7"/>| <text:s/>| <text:s text:c="17"/>Dados <text:s text:c="24"/>| <text:s/>|<text:line-break/> <text:s text:c="7"/>| <text:s/>| <text:s text:c="47"/>| <text:s/>|<text:line-break/> <text:s text:c="7"/>| <text:s/>| <text:s/>PostgreSQL/PostGIS <text:s text:c="27"/>| <text:s/>|<text:line-break/> <text:s text:c="7"/>| <text:s/>| <text:s/>Redis <text:s text:c="40"/>| <text:s/>|<text:line-break/> <text:s text:c="7"/>| <text:s/>| <text:s/>MongoDB/Event Store <text:s text:c="26"/>| <text:s/>|<text:line-break/> <text:s text:c="7"/>| <text:s/>| <text:s/>Vector Database <text:s text:c="30"/>| <text:s/>|<text:line-break/> <text:s text:c="7"/>| <text:s/>| <text:s/>Object Storage <text:s text:c="31"/>| <text:s/>|<text:line-break/> <text:s text:c="7"/>| <text:s/>| <text:s/>Logs de Conversas <text:s text:c="28"/>| <text:s/>|<text:line-break/> <text:s text:c="7"/>| <text:s/>+------------------------------------------------+ <text:s/>|<text:line-break/> <text:s text:c="7"/>| <text:s text:c="53"/>|<text:line-break/> <text:s text:c="7"/>| <text:s/>+------------------------------------------------+ <text:s/>|<text:line-break/> <text:s text:c="7"/>| <text:s/>| <text:s text:c="13"/>Mensageria/Eventos <text:s text:c="15"/>| <text:s/>|<text:line-break/> <text:s text:c="7"/>| <text:s/>| <text:s text:c="47"/>| <text:s/>|<text:line-break/> <text:s text:c="7"/>| <text:s/>| <text:s/>Kafka / RabbitMQ / SQS <text:s text:c="23"/>| <text:s/>|<text:line-break/> <text:s text:c="7"/>| <text:s/>+------------------------------------------------+ <text:s/>|<text:line-break/> <text:s text:c="7"/>| <text:s text:c="53"/>|<text:line-break/> <text:s text:c="7"/>+------------------------------------------------------+<text:line-break/> <text:s text:c="30"/>|<text:line-break/> <text:s text:c="30"/>v<text:line-break/> <text:s text:c="17"/>+-------------------------------+<text:line-break/> <text:s text:c="17"/>| Integrações Externas <text:s text:c="9"/>|<text:line-break/> <text:s text:c="17"/>| Mapas, Pagamentos, SEFAZ, <text:s text:c="4"/>|<text:line-break/> <text:s text:c="17"/>| Clima, Pedágios, LLM, SMS <text:s text:c="4"/>|<text:line-break/> <text:s text:c="17"/>+-------------------------------+</text:p>
      <text:p text:style-name="Horizontal_20_Line"><text:soft-page-break/></text:p>
      <text:h text:style-name="Heading_20_1" text:outline-level="1">4. Componentes da IA Embutida</text:h>
      <text:p text:style-name="Text_20_body">A IA deve ser tratada como um conjunto de serviços próprios.</text:p>
      <text:h text:style-name="Heading_20_2" text:outline-level="2">4.1. AI Assistant Service</text:h>
      <text:p text:style-name="Text_20_body">É o serviço responsável por receber as mensagens do usuário e devolver respostas.</text:p>
      <text:p text:style-name="Text_20_body">Funções:</text:p>
      <text:p text:style-name="P9">Receber perguntas do cliente<text:line-break/>Identificar intenção da pergunta<text:line-break/>Consultar dados do sistema, se autorizado<text:line-break/>Responder em linguagem natural<text:line-break/>Acionar serviços internos quando necessário<text:line-break/>Encaminhar para atendimento humano em casos críticos</text:p>
      <text:p text:style-name="Text_20_body">Exemplo:</text:p>
      <text:p text:style-name="P9">Cliente: Onde está minha entrega?<text:line-break/><text:line-break/>IA:<text:line-break/>Sua entrega está em trânsito. O motorista está próximo à Av. Principal e a previsão de chegada é 14h35.</text:p>
      <text:p text:style-name="Horizontal_20_Line"/>
      <text:h text:style-name="Heading_20_2" text:outline-level="2">4.2. AI Orchestrator</text:h>
      <text:p text:style-name="Text_20_body">É o cérebro operacional da IA.</text:p>
      <text:p text:style-name="Text_20_body">Ele decide se a resposta virá de:</text:p>
      <text:p text:style-name="P9">Base de conhecimento<text:line-break/>Dados do pedido<text:line-break/>Serviço de rastreamento<text:line-break/>Serviço de ETA<text:line-break/>Serviço de preços<text:line-break/>Serviço de veículos<text:line-break/>Atendente humano</text:p>
      <text:p text:style-name="Text_20_body">Exemplo de decisão:</text:p>
      <text:p text:style-name="P9">Pergunta: "Qual veículo serve para transportar soja?"<text:line-break/><text:line-break/>Fonte da resposta:<text:line-break/>Base de conhecimento + Vehicle Service</text:p>
      <text:p text:style-name="Text_20_body">Outro exemplo:</text:p>
      <text:p text:style-name="P9">Pergunta: "Onde está minha carga?"<text:line-break/><text:line-break/>Fonte da resposta:<text:line-break/>Tracking Service + ETA Service</text:p>
      <text:p text:style-name="Horizontal_20_Line"/>
      <text:h text:style-name="Heading_20_2" text:outline-level="2"><text:soft-page-break/>4.3. Base de Conhecimento</text:h>
      <text:p text:style-name="Text_20_body">A base de conhecimento contém informações oficiais do sistema.</text:p>
      <text:p text:style-name="Text_20_body">Conteúdos:</text:p>
      <text:p text:style-name="P9">Perguntas frequentes<text:line-break/>Políticas da plataforma<text:line-break/>Tipos de veículos<text:line-break/>Tipos de carga permitida<text:line-break/>Regras para transporte de equipamentos<text:line-break/>Regras para transporte de grãos secos<text:line-break/>Documentação necessária<text:line-break/>Regras de pagamento<text:line-break/>Regras de cancelamento<text:line-break/>Como funciona o rastreamento<text:line-break/>Como funciona a previsão de chegada<text:line-break/>Termos de uso<text:line-break/>Política de privacidade</text:p>
      <text:p text:style-name="Horizontal_20_Line"/>
      <text:h text:style-name="Heading_20_2" text:outline-level="2">4.4. RAG — Recuperação Aumentada por Conhecimento</text:h>
      <text:p text:style-name="Text_20_body">Para a IA responder com base nas regras reais da empresa, recomenda-se usar <text:span text:style-name="T1">RAG</text:span>.</text:p>
      <text:p text:style-name="Text_20_body">RAG significa que a IA consulta documentos da empresa antes de responder.</text:p>
      <text:p text:style-name="Text_20_body">Fluxo:</text:p>
      <text:p text:style-name="P9">Usuário faz pergunta<text:line-break/> <text:s text:c="7"/>|<text:line-break/> <text:s text:c="7"/>v<text:line-break/>IA identifica o assunto<text:line-break/> <text:s text:c="7"/>|<text:line-break/> <text:s text:c="7"/>v<text:line-break/>Busca trechos relevantes na base de conhecimento<text:line-break/> <text:s text:c="7"/>|<text:line-break/> <text:s text:c="7"/>v<text:line-break/>Gera resposta com base nas informações encontradas</text:p>
      <text:p text:style-name="Text_20_body">Exemplo:</text:p>
      <text:p text:style-name="P9">Cliente: Posso transportar milho em caminhão baú?<text:line-break/><text:line-break/>IA:<text:line-break/>Para grãos secos, como milho e soja, o veículo recomendado é graneleiro ou carroceria adequada com proteção contra umidade. Caminhão baú comum não é o mais indicado, salvo regra específica aprovada pela operação.</text:p>
      <text:p text:style-name="Horizontal_20_Line"/>
      <text:h text:style-name="Heading_20_2" text:outline-level="2">4.5. Vector Database</text:h>
      <text:p text:style-name="Text_20_body">Para funcionar bem com RAG, a arquitetura deve incluir um banco vetorial.</text:p>
      <text:p text:style-name="Text_20_body">Opções:</text:p>
      <text:p text:style-name="P9">Pinecone<text:line-break/>Weaviate<text:line-break/>Milvus<text:line-break/><text:soft-page-break/>Qdrant<text:line-break/>PostgreSQL com pgvector<text:line-break/>OpenSearch Vector</text:p>
      <text:p text:style-name="Text_20_body">Sugestão prática para MVP:</text:p>
      <text:p text:style-name="P9">PostgreSQL + pgvector</text:p>
      <text:p text:style-name="Text_20_body">Esse banco armazenará os documentos convertidos em vetores para busca inteligente.</text:p>
      <text:p text:style-name="Horizontal_20_Line"/>
      <text:h text:style-name="Heading_20_2" text:outline-level="2">4.6. LLM — Modelo de Linguagem</text:h>
      <text:p text:style-name="Text_20_body">O LLM é o modelo que gera as respostas em linguagem natural.</text:p>
      <text:p text:style-name="Text_20_body">Pode ser utilizado de duas formas:</text:p>
      <text:p text:style-name="P9">API externa de IA<text:line-break/>Modelo hospedado em infraestrutura própria</text:p>
      <text:h text:style-name="Heading_20_2" text:outline-level="2">Opção 1 — API externa de IA</text:h>
      <text:p text:style-name="P9">Aplicação<text:line-break/> <text:s text:c="2"/>|<text:line-break/> <text:s text:c="2"/>v<text:line-break/>AI Assistant Service<text:line-break/> <text:s text:c="2"/>|<text:line-break/> <text:s text:c="2"/>v<text:line-break/>Provedor de IA externo</text:p>
      <text:p text:style-name="Text_20_body">Vantagens:</text:p>
      <text:p text:style-name="P9">Menor custo inicial<text:line-break/>Implantação mais rápida<text:line-break/>Qualidade alta nas respostas<text:line-break/>Menor complexidade operacional</text:p>
      <text:h text:style-name="Heading_20_2" text:outline-level="2">Opção 2 — Modelo próprio</text:h>
      <text:p text:style-name="P9">Aplicação<text:line-break/> <text:s text:c="2"/>|<text:line-break/> <text:s text:c="2"/>v<text:line-break/>AI Assistant Service<text:line-break/> <text:s text:c="2"/>|<text:line-break/> <text:s text:c="2"/>v<text:line-break/>Servidor GPU / Cluster de IA</text:p>
      <text:p text:style-name="Text_20_body">Vantagens:</text:p>
      <text:p text:style-name="P9">Maior controle dos dados<text:line-break/>Customização avançada<text:line-break/>Menor dependência externa</text:p>
      <text:p text:style-name="Text_20_body">Para o início, recomendo usar <text:span text:style-name="T1">API externa de IA com controle de segurança</text:span>, e depois avaliar modelo próprio conforme escala e necessidade.</text:p>
      <text:p text:style-name="Horizontal_20_Line"/>
      <text:h text:style-name="Heading_20_1" text:outline-level="1"><text:soft-page-break/>5. Arquitetura do Chat com IA no Portal e App</text:h>
      <text:h text:style-name="Heading_20_2" text:outline-level="2">No Portal Web</text:h>
      <text:p text:style-name="Text_20_body">O portal terá um componente de chat fixo.</text:p>
      <text:p text:style-name="P9">Botão: Precisa de ajuda?<text:line-break/> <text:s text:c="7"/>|<text:line-break/> <text:s text:c="7"/>v<text:line-break/>Janela de Chat IA<text:line-break/> <text:s text:c="7"/>|<text:line-break/> <text:s text:c="7"/>v<text:line-break/>Perguntas e respostas em tempo real</text:p>
      <text:p text:style-name="Text_20_body">Funcionalidades:</text:p>
      <text:p text:style-name="P9">Chat lateral ou flutuante<text:line-break/>Sugestões automáticas de perguntas<text:line-break/>Histórico da conversa<text:line-break/>Envio de arquivos, se permitido<text:line-break/>Consulta de pedido<text:line-break/>Encaminhamento para suporte humano</text:p>
      <text:p text:style-name="Horizontal_20_Line"/>
      <text:h text:style-name="Heading_20_2" text:outline-level="2">No Aplicativo Mobile</text:h>
      <text:p text:style-name="Text_20_body">O aplicativo terá uma aba ou botão de ajuda.</text:p>
      <text:p text:style-name="P9">Menu inferior:<text:line-break/>Início | Entregas | Rastreio | Ajuda IA | Perfil</text:p>
      <text:p text:style-name="Text_20_body">Funcionalidades:</text:p>
      <text:p text:style-name="P9">Perguntar por texto<text:line-break/>Perguntar por voz, futuramente<text:line-break/>Receber resposta em texto<text:line-break/>Receber cards com ações<text:line-break/>Consultar status da entrega<text:line-break/>Abrir chamado de suporte</text:p>
      <text:p text:style-name="Horizontal_20_Line"/>
      <text:h text:style-name="Heading_20_1" text:outline-level="1">6. Tipos de Atendimento da IA</text:h>
      <text:p text:style-name="Text_20_body">A IA pode atender diferentes perfis.</text:p>
      <text:h text:style-name="Heading_20_2" text:outline-level="2">6.1. Cliente Pessoa Física</text:h>
      <text:p text:style-name="Text_20_body">Exemplos:</text:p>
      <text:p text:style-name="P9">Como transportar uma geladeira?<text:line-break/>Quanto custa levar um fogão?<text:line-break/>Preciso de ajudante para mover móveis?<text:line-break/>Como acompanhar minha entrega?<text:line-break/>Como confirmo o recebimento?</text:p>
      <text:p text:style-name="Horizontal_20_Line"/>
      <text:h text:style-name="Heading_20_2" text:outline-level="2"><text:soft-page-break/>6.2. Cliente Pessoa Jurídica</text:h>
      <text:p text:style-name="Text_20_body">Exemplos:</text:p>
      <text:p text:style-name="P9">Como faço várias entregas?<text:line-break/>Posso cadastrar mais de um endereço?<text:line-break/>Como baixo comprovantes?<text:line-break/>Como solicito transporte de peças?<text:line-break/>Como faço transporte recorrente?</text:p>
      <text:p text:style-name="Horizontal_20_Line"/>
      <text:h text:style-name="Heading_20_2" text:outline-level="2">6.3. Produtor Rural / Cooperativa</text:h>
      <text:p text:style-name="Text_20_body">Exemplos:</text:p>
      <text:p text:style-name="P9">Qual veículo preciso para transportar soja?<text:line-break/>Preciso informar peso de saída?<text:line-break/>Como registro romaneio?<text:line-break/>Preciso de nota fiscal?<text:line-break/>O motorista precisa de veículo graneleiro?</text:p>
      <text:p text:style-name="Horizontal_20_Line"/>
      <text:h text:style-name="Heading_20_2" text:outline-level="2">6.4. Motorista</text:h>
      <text:p text:style-name="Text_20_body">Exemplos:</text:p>
      <text:p text:style-name="P9">Como cadastro meu veículo?<text:line-break/>Por que meu documento foi recusado?<text:line-break/>Como recebo meus pagamentos?<text:line-break/>Como fico online?<text:line-break/>Como registro a entrega?</text:p>
      <text:p text:style-name="Horizontal_20_Line"/>
      <text:h text:style-name="Heading_20_2" text:outline-level="2">6.5. Administrador</text:h>
      <text:p text:style-name="Text_20_body">Exemplos:</text:p>
      <text:p text:style-name="P9">Quais entregas estão atrasadas?<text:line-break/>Quantos motoristas estão online?<text:line-break/>Quais pedidos estão em disputa?<text:line-break/>Mostre ocorrências de hoje.</text:p>
      <text:p text:style-name="Text_20_body">Para administradores, a IA pode funcionar como <text:span text:style-name="T1">assistente operacional</text:span>, desde que tenha controle forte de permissões.</text:p>
      <text:p text:style-name="Horizontal_20_Line"/>
      <text:h text:style-name="Heading_20_1" text:outline-level="1">7. Fluxos de Uso da IA</text:h>
      <text:h text:style-name="Heading_20_2" text:outline-level="2">7.1. Dúvida geral</text:h>
      <text:p text:style-name="P9">Cliente pergunta:<text:line-break/>"Como funciona o rastreamento?"<text:line-break/><text:line-break/><text:soft-page-break/> <text:s text:c="7"/>|<text:line-break/> <text:s text:c="7"/>v<text:line-break/><text:line-break/>AI Assistant Service recebe a pergunta<text:line-break/><text:line-break/> <text:s text:c="7"/>|<text:line-break/> <text:s text:c="7"/>v<text:line-break/><text:line-break/>AI Orchestrator consulta a Base de Conhecimento<text:line-break/><text:line-break/> <text:s text:c="7"/>|<text:line-break/> <text:s text:c="7"/>v<text:line-break/><text:line-break/>LLM gera resposta<text:line-break/><text:line-break/> <text:s text:c="7"/>|<text:line-break/> <text:s text:c="7"/>v<text:line-break/><text:line-break/>Cliente recebe explicação no chat</text:p>
      <text:p text:style-name="Horizontal_20_Line"/>
      <text:h text:style-name="Heading_20_2" text:outline-level="2">7.2. Consulta de pedido</text:h>
      <text:p text:style-name="P9">Cliente pergunta:<text:line-break/>"Onde está minha entrega?"<text:line-break/><text:line-break/> <text:s text:c="7"/>|<text:line-break/> <text:s text:c="7"/>v<text:line-break/><text:line-break/>IA verifica se usuário está autenticado<text:line-break/><text:line-break/> <text:s text:c="7"/>|<text:line-break/> <text:s text:c="7"/>v<text:line-break/><text:line-break/>IA consulta Freight Service<text:line-break/><text:line-break/> <text:s text:c="7"/>|<text:line-break/> <text:s text:c="7"/>v<text:line-break/><text:line-break/>IA consulta Tracking Service<text:line-break/><text:line-break/> <text:s text:c="7"/>|<text:line-break/> <text:s text:c="7"/>v<text:line-break/><text:line-break/>IA consulta ETA Service<text:line-break/><text:line-break/> <text:s text:c="7"/>|<text:line-break/> <text:s text:c="7"/>v<text:line-break/><text:line-break/>IA responde com status, localização e previsão</text:p>
      <text:p text:style-name="Text_20_body">Resposta exemplo:</text:p>
      <text:p text:style-name="P9">Sua entrega está em trânsito. O motorista saiu da origem às 10h20. <text:line-break/>A previsão atual de chegada é 14h35. Houve uma parada de 12 minutos, mas o pedido segue dentro do prazo.</text:p>
      <text:p text:style-name="Horizontal_20_Line"/>
      <text:h text:style-name="Heading_20_2" text:outline-level="2"><text:soft-page-break/>7.3. Recomendação de veículo</text:h>
      <text:p text:style-name="P9">Cliente pergunta:<text:line-break/>"Qual veículo preciso para transportar uma geladeira?"<text:line-break/><text:line-break/> <text:s text:c="7"/>|<text:line-break/> <text:s text:c="7"/>v<text:line-break/><text:line-break/>IA identifica tipo de carga: equipamento<text:line-break/><text:line-break/> <text:s text:c="7"/>|<text:line-break/> <text:s text:c="7"/>v<text:line-break/><text:line-break/>Consulta regras de carga<text:line-break/><text:line-break/> <text:s text:c="7"/>|<text:line-break/> <text:s text:c="7"/>v<text:line-break/><text:line-break/>Consulta Vehicle Recommendation Service<text:line-break/><text:line-break/> <text:s text:c="7"/>|<text:line-break/> <text:s text:c="7"/>v<text:line-break/><text:line-break/>Responde recomendando veículo adequado</text:p>
      <text:p text:style-name="Text_20_body">Resposta exemplo:</text:p>
      <text:p text:style-name="P9">Para transportar uma geladeira, o ideal é usar um veículo fechado ou coberto, como Fiorino baú, caminhonete coberta ou caminhão baú pequeno. Também é recomendado manter o item em pé e protegido contra impacto.</text:p>
      <text:p text:style-name="Horizontal_20_Line"/>
      <text:h text:style-name="Heading_20_2" text:outline-level="2">7.4. Suporte com escalonamento humano</text:h>
      <text:p text:style-name="P9">Cliente pergunta:<text:line-break/>"Minha carga chegou danificada. O que faço?"<text:line-break/><text:line-break/> <text:s text:c="7"/>|<text:line-break/> <text:s text:c="7"/>v<text:line-break/><text:line-break/>IA identifica caso sensível<text:line-break/><text:line-break/> <text:s text:c="7"/>|<text:line-break/> <text:s text:c="7"/>v<text:line-break/><text:line-break/>IA orienta o cliente<text:line-break/><text:line-break/> <text:s text:c="7"/>|<text:line-break/> <text:s text:c="7"/>v<text:line-break/><text:line-break/>Abre ocorrência automaticamente<text:line-break/><text:line-break/> <text:s text:c="7"/>|<text:line-break/> <text:s text:c="7"/>v<text:line-break/><text:line-break/>Encaminha para atendente humano</text:p>
      <text:p text:style-name="Text_20_body">Resposta exemplo:</text:p>
      <text:p text:style-name="P9"><text:soft-page-break/>Sinto muito pelo ocorrido. Vou abrir uma ocorrência para análise. Por favor, envie fotos da carga e do comprovante de entrega. Um atendente acompanhará seu caso.</text:p>
      <text:p text:style-name="Horizontal_20_Line"/>
      <text:h text:style-name="Heading_20_1" text:outline-level="1">8. Serviços Internos que a IA Pode Consultar</text:h>
      <text:p text:style-name="Text_20_body">A IA não deve acessar diretamente o banco de dados. Ela deve consultar APIs internas autorizadas.</text:p>
      <text:p text:style-name="P9">AI Assistant Service<text:line-break/> <text:s text:c="7"/>|<text:line-break/> <text:s text:c="7"/>v<text:line-break/>APIs internas autorizadas<text:line-break/> <text:s text:c="7"/>|<text:line-break/> <text:s text:c="7"/>├── User Service<text:line-break/> <text:s text:c="7"/>├── Freight Service<text:line-break/> <text:s text:c="7"/>├── Vehicle Service<text:line-break/> <text:s text:c="7"/>├── Tracking Service<text:line-break/> <text:s text:c="7"/>├── ETA Service<text:line-break/> <text:s text:c="7"/>├── Pricing Service<text:line-break/> <text:s text:c="7"/>├── Payment Service<text:line-break/> <text:s text:c="7"/>├── Document Service<text:line-break/> <text:s text:c="7"/>└── Support Ticket Service</text:p>
      <text:p text:style-name="Horizontal_20_Line"/>
      <text:h text:style-name="Heading_20_1" text:outline-level="1">9. Permissões da IA</text:h>
      <text:p text:style-name="Text_20_body">A IA deve respeitar o perfil do usuário.</text:p>
      <text:h text:style-name="Heading_20_2" text:outline-level="2">Cliente</text:h>
      <text:p text:style-name="Text_20_body">Pode consultar:</text:p>
      <text:p text:style-name="P9">Seus próprios pedidos<text:line-break/>Seus próprios pagamentos<text:line-break/>Suas próprias entregas<text:line-break/>Status do motorista vinculado ao pedido<text:line-break/>Comprovantes dos seus pedidos</text:p>
      <text:p text:style-name="Text_20_body">Não pode consultar:</text:p>
      <text:p text:style-name="P9">Pedidos de outros clientes<text:line-break/>Dados financeiros de motoristas<text:line-break/>Documentos de terceiros<text:line-break/>Dados administrativos internos</text:p>
      <text:p text:style-name="Horizontal_20_Line"/>
      <text:h text:style-name="Heading_20_2" text:outline-level="2">Motorista</text:h>
      <text:p text:style-name="Text_20_body">Pode consultar:</text:p>
      <text:p text:style-name="P9">Seus próprios fretes<text:line-break/>Seus ganhos<text:line-break/>Seus documentos<text:line-break/><text:soft-page-break/>Seu veículo<text:line-break/>Status dos pedidos atribuídos a ele</text:p>
      <text:p text:style-name="Horizontal_20_Line"/>
      <text:h text:style-name="Heading_20_2" text:outline-level="2">Administrador</text:h>
      <text:p text:style-name="Text_20_body">Pode consultar conforme perfil:</text:p>
      <text:p text:style-name="P9">Operação<text:line-break/>Financeiro<text:line-break/>Suporte<text:line-break/>Gestão de motoristas<text:line-break/>Gestão de clientes<text:line-break/>Relatórios</text:p>
      <text:p text:style-name="Horizontal_20_Line"/>
      <text:h text:style-name="Heading_20_1" text:outline-level="1">10. Segurança da IA</text:h>
      <text:p text:style-name="Text_20_body">A IA deve possuir regras específicas de segurança.</text:p>
      <text:h text:style-name="Heading_20_2" text:outline-level="2">Regras essenciais</text:h>
      <text:p text:style-name="P9">Autenticação obrigatória para consultar dados pessoais<text:line-break/>Controle de permissões por perfil<text:line-break/>Mascaramento de dados sensíveis<text:line-break/>Logs de conversas<text:line-break/>Bloqueio de comandos indevidos<text:line-break/>Filtro contra prompt injection<text:line-break/>Validação das respostas antes de executar ações críticas<text:line-break/>Não expor dados internos do sistema<text:line-break/>Não revelar documentos de outros usuários<text:line-break/>Não executar pagamentos sem confirmação explícita<text:line-break/>Não cancelar pedidos sem confirmação explícita</text:p>
      <text:p text:style-name="Horizontal_20_Line"/>
      <text:h text:style-name="Heading_20_2" text:outline-level="2">Exemplos de ações que exigem confirmação</text:h>
      <text:p text:style-name="P9">Cancelar pedido<text:line-break/>Alterar endereço de entrega<text:line-break/>Alterar forma de pagamento<text:line-break/>Abrir disputa<text:line-break/>Solicitar reembolso<text:line-break/>Finalizar ocorrência</text:p>
      <text:p text:style-name="Text_20_body">Fluxo seguro:</text:p>
      <text:p text:style-name="P9">Usuário pede cancelamento<text:line-break/> <text:s text:c="7"/>|<text:line-break/> <text:s text:c="7"/>v<text:line-break/>IA explica consequências<text:line-break/> <text:s text:c="7"/>|<text:line-break/> <text:s text:c="7"/>v<text:line-break/>Usuário confirma<text:line-break/> <text:s text:c="7"/>|<text:line-break/> <text:s text:c="7"/>v<text:line-break/>Sistema executa ação<text:line-break/><text:soft-page-break/> <text:s text:c="7"/>|<text:line-break/> <text:s text:c="7"/>v<text:line-break/>IA informa resultado</text:p>
      <text:p text:style-name="Horizontal_20_Line"/>
      <text:h text:style-name="Heading_20_1" text:outline-level="1">11. Arquitetura de Rede com IA</text:h>
      <text:p text:style-name="Text_20_body">A nova arquitetura de rede fica assim:</text:p>
      <text:p text:style-name="P9">[Portal Web / Apps Mobile]<text:line-break/> <text:s text:c="7"/>|<text:line-break/> <text:s text:c="7"/>v<text:line-break/>[DNS]<text:line-break/> <text:s text:c="7"/>|<text:line-break/> <text:s text:c="7"/>v<text:line-break/>[CDN + WAF + DDoS Protection]<text:line-break/> <text:s text:c="7"/>|<text:line-break/> <text:s text:c="7"/>v<text:line-break/>[Load Balancer]<text:line-break/> <text:s text:c="7"/>|<text:line-break/> <text:s text:c="7"/>v<text:line-break/>[API Gateway]<text:line-break/> <text:s text:c="7"/>|<text:line-break/> <text:s text:c="7"/>v<text:line-break/>[VPC Privada]<text:line-break/> <text:s text:c="7"/>|<text:line-break/> <text:s text:c="7"/>├── Sub-rede de Aplicação<text:line-break/> <text:s text:c="7"/>| <text:s text:c="6"/>├── Serviços de Logística<text:line-break/> <text:s text:c="7"/>| <text:s text:c="6"/>├── Serviços de Rastreamento<text:line-break/> <text:s text:c="7"/>| <text:s text:c="6"/>├── Serviços de Pagamento<text:line-break/> <text:s text:c="7"/>| <text:s text:c="6"/>├── AI Assistant Service<text:line-break/> <text:s text:c="7"/>| <text:s text:c="6"/>├── AI Orchestrator<text:line-break/> <text:s text:c="7"/>| <text:s text:c="6"/>└── Support Service<text:line-break/> <text:s text:c="7"/>|<text:line-break/> <text:s text:c="7"/>├── Sub-rede de Dados<text:line-break/> <text:s text:c="7"/>| <text:s text:c="6"/>├── PostgreSQL/PostGIS<text:line-break/> <text:s text:c="7"/>| <text:s text:c="6"/>├── Redis<text:line-break/> <text:s text:c="7"/>| <text:s text:c="6"/>├── MongoDB/Event Store<text:line-break/> <text:s text:c="7"/>| <text:s text:c="6"/>├── Vector Database<text:line-break/> <text:s text:c="7"/>| <text:s text:c="6"/>└── Object Storage<text:line-break/> <text:s text:c="7"/>|<text:line-break/> <text:s text:c="7"/>├── Sub-rede de Mensageria<text:line-break/> <text:s text:c="7"/>| <text:s text:c="6"/>└── Kafka/RabbitMQ/SQS<text:line-break/> <text:s text:c="7"/>|<text:line-break/> <text:s text:c="7"/>├── Sub-rede de Observabilidade<text:line-break/> <text:s text:c="7"/>| <text:s text:c="6"/>├── Logs<text:line-break/> <text:s text:c="7"/>| <text:s text:c="6"/>├── Métricas<text:line-break/> <text:s text:c="7"/>| <text:s text:c="6"/>├── Traces<text:line-break/> <text:s text:c="7"/>| <text:s text:c="6"/>└── Auditoria IA<text:line-break/> <text:s text:c="7"/>|<text:line-break/> <text:s text:c="7"/>└── Sub-rede de Integração Externa<text:line-break/> <text:s text:c="15"/>├── APIs de Mapas<text:line-break/> <text:s text:c="15"/>├── APIs de Pagamento<text:line-break/> <text:s text:c="15"/>├── SEFAZ<text:line-break/> <text:s text:c="15"/>├── Clima<text:line-break/> <text:s text:c="15"/>├── Pedágios<text:line-break/> <text:s text:c="15"/>└── Provedor LLM</text:p>
      <text:p text:style-name="Horizontal_20_Line"/>
      <text:h text:style-name="Heading_20_1" text:outline-level="1"><text:soft-page-break/>12. Diagrama Específico da IA</text:h>
      <text:p text:style-name="P9">[Usuário no Portal/App]<text:line-break/> <text:s text:c="7"/>|<text:line-break/> <text:s text:c="7"/>v<text:line-break/>[Chat UI]<text:line-break/> <text:s text:c="7"/>|<text:line-break/> <text:s text:c="7"/>v<text:line-break/>[API Gateway]<text:line-break/> <text:s text:c="7"/>|<text:line-break/> <text:s text:c="7"/>v<text:line-break/>[AI Assistant Service]<text:line-break/> <text:s text:c="7"/>|<text:line-break/> <text:s text:c="7"/>v<text:line-break/>[AI Orchestrator]<text:line-break/> <text:s text:c="7"/>|<text:line-break/> <text:s text:c="7"/>├── [RAG Service]<text:line-break/> <text:s text:c="7"/>| <text:s text:c="7"/>|<text:line-break/> <text:s text:c="7"/>| <text:s text:c="7"/>└── [Vector Database]<text:line-break/> <text:s text:c="7"/>|<text:line-break/> <text:s text:c="7"/>├── [Freight Service]<text:line-break/> <text:s text:c="7"/>├── [Tracking Service]<text:line-break/> <text:s text:c="7"/>├── [ETA Service]<text:line-break/> <text:s text:c="7"/>├── [Vehicle Service]<text:line-break/> <text:s text:c="7"/>├── [Pricing Service]<text:line-break/> <text:s text:c="7"/>├── [Payment Service]<text:line-break/> <text:s text:c="7"/>├── [Support Ticket Service]<text:line-break/> <text:s text:c="7"/>|<text:line-break/> <text:s text:c="7"/>v<text:line-break/>[LLM / Modelo de IA]<text:line-break/> <text:s text:c="7"/>|<text:line-break/> <text:s text:c="7"/>v<text:line-break/>[Resposta ao Usuário]</text:p>
      <text:p text:style-name="Horizontal_20_Line"/>
      <text:h text:style-name="Heading_20_1" text:outline-level="1">13. Banco de Dados para Conversas</text:h>
      <text:p text:style-name="Text_20_body">Criar uma estrutura para armazenar as interações da IA.</text:p>
      <text:h text:style-name="Heading_20_2" text:outline-level="2">Tabela: <text:span text:style-name="T5">ai_conversations</text:span></text:h>
      <text:p text:style-name="P9">id<text:line-break/>user_id<text:line-break/>user_type<text:line-break/>channel<text:line-break/>status<text:line-break/>created_at<text:line-break/>updated_at</text:p>
      <text:h text:style-name="Heading_20_2" text:outline-level="2">Tabela: <text:span text:style-name="T5">ai_messages</text:span></text:h>
      <text:p text:style-name="P9">id<text:line-break/>conversation_id<text:line-break/>sender<text:line-break/>message_text<text:line-break/>intent<text:line-break/>confidence_score<text:line-break/>created_at</text:p>
      <text:h text:style-name="Heading_20_2" text:outline-level="2"><text:soft-page-break/>Tabela: <text:span text:style-name="T5">ai_actions</text:span></text:h>
      <text:p text:style-name="P9">id<text:line-break/>conversation_id<text:line-break/>user_id<text:line-break/>action_type<text:line-break/>target_entity<text:line-break/>target_id<text:line-break/>status<text:line-break/>requires_confirmation<text:line-break/>created_at</text:p>
      <text:h text:style-name="Heading_20_2" text:outline-level="2">Tabela: <text:span text:style-name="T5">knowledge_documents</text:span></text:h>
      <text:p text:style-name="P9">id<text:line-break/>title<text:line-break/>category<text:line-break/>content<text:line-break/>version<text:line-break/>status<text:line-break/>created_at<text:line-break/>updated_at</text:p>
      <text:h text:style-name="Heading_20_2" text:outline-level="2">Tabela: <text:span text:style-name="T5">knowledge_embeddings</text:span></text:h>
      <text:p text:style-name="P9">id<text:line-break/>document_id<text:line-break/>embedding_vector<text:line-break/>metadata<text:line-break/>created_at</text:p>
      <text:p text:style-name="Horizontal_20_Line"/>
      <text:h text:style-name="Heading_20_1" text:outline-level="1">14. Intenções que a IA Deve Reconhecer</text:h>
      <text:p text:style-name="Text_20_body">A IA deve identificar o objetivo da pergunta.</text:p>
      <text:p text:style-name="P9">Solicitar ajuda geral<text:line-break/>Explicar funcionamento do sistema<text:line-break/>Consultar status de entrega<text:line-break/>Consultar previsão de chegada<text:line-break/>Consultar localização do motorista<text:line-break/>Explicar preço do frete<text:line-break/>Recomendar tipo de veículo<text:line-break/>Explicar documentos necessários<text:line-break/>Explicar transporte de grãos<text:line-break/>Explicar transporte de equipamentos<text:line-break/>Abrir ocorrência<text:line-break/>Cancelar pedido<text:line-break/>Falar com atendente humano<text:line-break/>Consultar pagamento<text:line-break/>Consultar comprovante<text:line-break/>Cadastrar veículo<text:line-break/>Cadastrar empresa</text:p>
      <text:p text:style-name="Horizontal_20_Line"/>
      <text:h text:style-name="Heading_20_1" text:outline-level="1"><text:soft-page-break/>15. Exemplos de Respostas da IA</text:h>
      <text:h text:style-name="Heading_20_2" text:outline-level="2">Exemplo 1 — Rastreio</text:h>
      <text:p text:style-name="P9">Cliente:<text:line-break/>Onde está minha carga?<text:line-break/><text:line-break/>IA:<text:line-break/>Sua carga está em trânsito. O motorista está a aproximadamente 18 km do destino. <text:line-break/>A previsão de chegada é 15h10. O último evento registrado foi às 14h32.</text:p>
      <text:p text:style-name="Horizontal_20_Line"/>
      <text:h text:style-name="Heading_20_2" text:outline-level="2">Exemplo 2 — Melhor veículo</text:h>
      <text:p text:style-name="P9">Cliente:<text:line-break/>Quero transportar uma geladeira. Qual veículo devo escolher?<text:line-break/><text:line-break/>IA:<text:line-break/>Para uma geladeira, recomendo um veículo fechado ou coberto, como uma Fiorino baú, caminhonete coberta ou caminhão baú pequeno. <text:line-break/>Também é importante manter a geladeira em pé e protegida contra impactos.</text:p>
      <text:p text:style-name="Horizontal_20_Line"/>
      <text:h text:style-name="Heading_20_2" text:outline-level="2">Exemplo 3 — Grãos secos</text:h>
      <text:p text:style-name="P9">Cliente:<text:line-break/>Posso transportar soja?<text:line-break/><text:line-break/>IA:<text:line-break/>Sim. Para soja, o sistema recomenda veículo graneleiro ou carroceria adequada para grãos secos, com proteção contra umidade e, quando necessário, lona. <text:line-break/>Também podem ser exigidos nota fiscal, romaneio e registro de pesagem.</text:p>
      <text:p text:style-name="Horizontal_20_Line"/>
      <text:h text:style-name="Heading_20_2" text:outline-level="2">Exemplo 4 — Preço</text:h>
      <text:p text:style-name="P9">Cliente:<text:line-break/>Por que o valor do frete ficou alto?<text:line-break/><text:line-break/>IA:<text:line-break/>O preço pode variar conforme distância, peso, volume, tipo de veículo, disponibilidade de motoristas, pedágios, seguro, urgência e risco da rota. <text:line-break/>Neste pedido, os principais fatores foram distância, tipo de veículo e baixa disponibilidade próxima à origem.</text:p>
      <text:p text:style-name="Horizontal_20_Line"/>
      <text:h text:style-name="Heading_20_1" text:outline-level="1">16. IA com Ações Guiadas</text:h>
      <text:p text:style-name="Text_20_body">Além de responder perguntas, a IA pode conduzir o cliente por ações.</text:p>
      <text:h text:style-name="Heading_20_2" text:outline-level="2"><text:soft-page-break/>Exemplo: solicitar frete pelo chat</text:h>
      <text:p text:style-name="P9">IA:<text:line-break/>Vamos solicitar seu frete. Qual é o endereço de origem?<text:line-break/><text:line-break/>Cliente:<text:line-break/>Rua A, 100.<text:line-break/><text:line-break/>IA:<text:line-break/>Qual é o destino?<text:line-break/><text:line-break/>Cliente:<text:line-break/>Rua B, 500.<text:line-break/><text:line-break/>IA:<text:line-break/>Qual carga será transportada?<text:line-break/><text:line-break/>Cliente:<text:line-break/>Uma geladeira.<text:line-break/><text:line-break/>IA:<text:line-break/>Perfeito. Recomendo um veículo baú pequeno ou caminhonete coberta. Deseja calcular o valor agora?</text:p>
      <text:p text:style-name="Horizontal_20_Line"/>
      <text:h text:style-name="Heading_20_1" text:outline-level="1">17. Ações que a IA Pode Executar</text:h>
      <text:p text:style-name="Text_20_body">Com permissão e confirmação, a IA pode:</text:p>
      <text:p text:style-name="P9">Criar solicitação de frete<text:line-break/>Consultar pedido<text:line-break/>Consultar ETA<text:line-break/>Consultar localização<text:line-break/>Recomendar veículo<text:line-break/>Abrir chamado de suporte<text:line-break/>Registrar reclamação<text:line-break/>Solicitar reenvio de comprovante<text:line-break/>Orientar cadastro de veículo<text:line-break/>Orientar cadastro de empresa</text:p>
      <text:p text:style-name="Text_20_body">Ações mais sensíveis devem exigir confirmação:</text:p>
      <text:p text:style-name="P9">Cancelar frete<text:line-break/>Alterar destino<text:line-break/>Alterar dados cadastrais<text:line-break/>Solicitar reembolso<text:line-break/>Registrar disputa</text:p>
      <text:p text:style-name="Horizontal_20_Line"/>
      <text:h text:style-name="Heading_20_1" text:outline-level="1">18. Observabilidade da IA</text:h>
      <text:p text:style-name="Text_20_body">Monitorar o uso da IA é importante.</text:p>
      <text:p text:style-name="Text_20_body">Indicadores:</text:p>
      <text:p text:style-name="P9">Quantidade de conversas por dia<text:line-break/>Principais dúvidas dos usuários<text:line-break/>Taxa de resolução automática<text:line-break/><text:soft-page-break/>Taxa de encaminhamento para humano<text:line-break/>Tempo médio de resposta<text:line-break/>Avaliação das respostas<text:line-break/>Erros da IA<text:line-break/>Intenções não reconhecidas<text:line-break/>Perguntas sem resposta<text:line-break/>Uso por canal: portal ou app</text:p>
      <text:p text:style-name="Horizontal_20_Line"/>
      <text:h text:style-name="Heading_20_1" text:outline-level="1">19. Atendimento Humano Integrado</text:h>
      <text:p text:style-name="Text_20_body">A IA deve poder transferir a conversa para um atendente humano.</text:p>
      <text:p text:style-name="Text_20_body">Fluxo:</text:p>
      <text:p text:style-name="P9">Cliente conversa com IA<text:line-break/> <text:s text:c="7"/>|<text:line-break/> <text:s text:c="7"/>v<text:line-break/>IA identifica necessidade de humano<text:line-break/> <text:s text:c="7"/>|<text:line-break/> <text:s text:c="7"/>v<text:line-break/>Cria ticket de atendimento<text:line-break/> <text:s text:c="7"/>|<text:line-break/> <text:s text:c="7"/>v<text:line-break/>Envia histórico da conversa<text:line-break/> <text:s text:c="7"/>|<text:line-break/> <text:s text:c="7"/>v<text:line-break/>Atendente assume o caso</text:p>
      <text:p text:style-name="Text_20_body">Casos para atendimento humano:</text:p>
      <text:p text:style-name="P9">Carga danificada<text:line-break/>Pagamento com problema<text:line-break/>Suspeita de fraude<text:line-break/>Motorista não localizado<text:line-break/>Entrega muito atrasada<text:line-break/>Cancelamento com cobrança<text:line-break/>Divergência de peso<text:line-break/>Disputa entre cliente e motorista</text:p>
      <text:p text:style-name="Horizontal_20_Line"/>
      <text:h text:style-name="Heading_20_1" text:outline-level="1">20. MVP da IA Embutida</text:h>
      <text:p text:style-name="Text_20_body">Para a primeira versão, recomendo começar com uma IA mais controlada.</text:p>
      <text:h text:style-name="Heading_20_2" text:outline-level="2">MVP da IA</text:h>
      <text:p text:style-name="P9">Chat no Portal Web<text:line-break/>Chat no Aplicativo Cliente<text:line-break/>Perguntas frequentes inteligentes<text:line-break/>Consulta de status do pedido<text:line-break/>Consulta de previsão de chegada<text:line-break/>Recomendação básica de veículo<text:line-break/>Explicação de preço<text:line-break/>Abertura de chamado<text:line-break/>Encaminhamento para humano</text:p>
      <text:h text:style-name="Heading_20_2" text:outline-level="2"><text:soft-page-break/>Não colocar no MVP inicialmente</text:h>
      <text:p text:style-name="P9">Cancelamento automático sem revisão<text:line-break/>Reembolso automático<text:line-break/>Alteração automática de destino<text:line-break/>Decisões financeiras complexas<text:line-break/>Aprovação automática de documentos</text:p>
      <text:p text:style-name="Horizontal_20_Line"/>
      <text:h text:style-name="Heading_20_1" text:outline-level="1">21. Tecnologias Sugeridas para IA</text:h>
      <text:h text:style-name="Heading_20_2" text:outline-level="2">Interface de Chat</text:h>
      <text:p text:style-name="P9">React/Next.js para Portal Web<text:line-break/>Flutter ou React Native para Aplicativo<text:line-break/>WebSocket ou HTTP streaming para respostas em tempo real</text:p>
      <text:h text:style-name="Heading_20_2" text:outline-level="2">Backend de IA</text:h>
      <text:p text:style-name="P9">Python FastAPI<text:line-break/>Node.js/NestJS<text:line-break/>Java Spring Boot</text:p>
      <text:h text:style-name="Heading_20_2" text:outline-level="2">Banco Vetorial</text:h>
      <text:p text:style-name="P9">PostgreSQL + pgvector para MVP<text:line-break/>Qdrant ou Weaviate para escala maior</text:p>
      <text:h text:style-name="Heading_20_2" text:outline-level="2">Mensageria</text:h>
      <text:p text:style-name="P9">Kafka<text:line-break/>RabbitMQ<text:line-break/>AWS SQS<text:line-break/>Google Pub/Sub</text:p>
      <text:h text:style-name="Heading_20_2" text:outline-level="2">Observabilidade</text:h>
      <text:p text:style-name="P9">Grafana<text:line-break/>Prometheus<text:line-break/>OpenSearch<text:line-break/>ELK<text:line-break/>Datadog<text:line-break/>New Relic</text:p>
      <text:p text:style-name="Horizontal_20_Line"/>
      <text:h text:style-name="Heading_20_1" text:outline-level="1">22. Arquitetura Final Consolidada</text:h>
      <text:p text:style-name="P9">Usuários<text:line-break/> <text:s text:c="2"/>|<text:line-break/> <text:s text:c="2"/>├── Portal Web Cliente<text:line-break/> <text:s text:c="2"/>├── Portal Transportadora<text:line-break/> <text:s text:c="2"/>├── Portal Administrativo<text:line-break/><text:soft-page-break/> <text:s text:c="2"/>├── App Cliente<text:line-break/> <text:s text:c="2"/>└── App Motorista<text:line-break/> <text:s text:c="9"/>|<text:line-break/> <text:s text:c="9"/>v<text:line-break/>Internet<text:line-break/> <text:s text:c="9"/>|<text:line-break/> <text:s text:c="9"/>v<text:line-break/>DNS + CDN + WAF<text:line-break/> <text:s text:c="9"/>|<text:line-break/> <text:s text:c="9"/>v<text:line-break/>Load Balancer<text:line-break/> <text:s text:c="9"/>|<text:line-break/> <text:s text:c="9"/>v<text:line-break/>API Gateway<text:line-break/> <text:s text:c="9"/>|<text:line-break/> <text:s text:c="9"/>v<text:line-break/>Backend em Rede Privada<text:line-break/> <text:s text:c="9"/>|<text:line-break/> <text:s text:c="9"/>├── Auth Service<text:line-break/> <text:s text:c="9"/>├── User Service<text:line-break/> <text:s text:c="9"/>├── Vehicle Service<text:line-break/> <text:s text:c="9"/>├── Freight Service<text:line-break/> <text:s text:c="9"/>├── Pricing Service<text:line-break/> <text:s text:c="9"/>├── Matching Service<text:line-break/> <text:s text:c="9"/>├── Routing Service<text:line-break/> <text:s text:c="9"/>├── Tracking Service<text:line-break/> <text:s text:c="9"/>├── ETA Service<text:line-break/> <text:s text:c="9"/>├── Payment Service<text:line-break/> <text:s text:c="9"/>├── Notification Service<text:line-break/> <text:s text:c="9"/>├── Document Service<text:line-break/> <text:s text:c="9"/>├── Support Service<text:line-break/> <text:s text:c="9"/>├── AI Assistant Service<text:line-break/> <text:s text:c="9"/>├── AI Orchestrator<text:line-break/> <text:s text:c="9"/>└── RAG Service<text:line-break/> <text:s text:c="9"/>|<text:line-break/> <text:s text:c="9"/>v<text:line-break/>Dados<text:line-break/> <text:s text:c="9"/>|<text:line-break/> <text:s text:c="9"/>├── PostgreSQL/PostGIS<text:line-break/> <text:s text:c="9"/>├── Redis<text:line-break/> <text:s text:c="9"/>├── MongoDB/Event Store<text:line-break/> <text:s text:c="9"/>├── Vector Database<text:line-break/> <text:s text:c="9"/>├── Object Storage<text:line-break/> <text:s text:c="9"/>└── Logs de Conversas<text:line-break/> <text:s text:c="9"/>|<text:line-break/> <text:s text:c="9"/>v<text:line-break/>Integrações Externas<text:line-break/> <text:s text:c="9"/>|<text:line-break/> <text:s text:c="9"/>├── Mapas<text:line-break/> <text:s text:c="9"/>├── Pagamentos<text:line-break/> <text:s text:c="9"/>├── Pix<text:line-break/> <text:s text:c="9"/>├── SEFAZ<text:line-break/> <text:s text:c="9"/>├── Clima<text:line-break/> <text:s text:c="9"/>├── Pedágios<text:line-break/> <text:s text:c="9"/>├── Notificações<text:line-break/> <text:s text:c="9"/>└── Provedor de IA/LLM</text:p>
      <text:p text:style-name="Horizontal_20_Line"/>
      <text:h text:style-name="Heading_20_1" text:outline-level="1"><text:soft-page-break/>23. Resumo Executivo</text:h>
      <text:p text:style-name="Text_20_body">Com a IA embutida, o <text:span text:style-name="T1">Uber da Logística</text:span> passa a ter um assistente inteligente disponível no <text:span text:style-name="T1">Portal Web</text:span> e no <text:span text:style-name="T1">Aplicativo Mobile</text:span>.</text:p>
      <text:p text:style-name="Text_20_body">A IA poderá:</text:p>
      <text:p text:style-name="P9">Responder dúvidas dos clientes<text:line-break/>Explicar como usar o sistema<text:line-break/>Consultar status de entregas<text:line-break/>Informar previsão de chegada<text:line-break/>Recomendar tipo de veículo<text:line-break/>Explicar regras para cargas e grãos<text:line-break/>Ajudar no cadastro<text:line-break/>Abrir chamados<text:line-break/>Encaminhar para atendimento humano</text:p>
      <text:p text:style-name="Text_20_body">A arquitetura deve incluir:</text:p>
      <text:p text:style-name="P9">AI Assistant Service<text:line-break/>AI Orchestrator<text:line-break/>Base de Conhecimento<text:line-break/>RAG Service<text:line-break/>Vector Database<text:line-break/>Logs de conversas<text:line-break/>Integração com serviços internos<text:line-break/>Controle de permissões<text:line-break/>Segurança contra exposição de dados<text:line-break/>Escalonamento para suporte humano</text:p>
      <text:p text:style-name="Text_20_body">Dessa forma, o sistema fica mais moderno, reduz a necessidade de atendimento manual e melhora a experiência do cliente durante toda a jornada logística.</text:p>
      <text:p text:style-name="P26">Conforme Todas as informações anteriores faça um prompt poderoso para o Antigravity desenvolver esse sistema usando o framework do Django. Levar em consideração tudo que foi abordado anteriormente</text:p>
      <text:p text:style-name="P27"/>
      <text:p text:style-name="P25"/>
      <text:h text:style-name="Heading_20_1" text:outline-level="1">Prompt Poderoso para o Antigravity Desenvolver o Sistema em Django</text:h>
      <text:p text:style-name="Text_20_body">Roberto, abaixo está um <text:span text:style-name="T1">prompt completo e estruturado</text:span> para você copiar e colar no <text:span text:style-name="T1">Antigravity</text:span> para orientar o desenvolvimento do sistema <text:span text:style-name="T1">Uber da Logística</text:span> usando <text:span text:style-name="T1">Django</text:span>.</text:p>
      <text:p text:style-name="Horizontal_20_Line"/>
      <text:p text:style-name="P9">Você é um arquiteto e desenvolvedor full stack sênior especialista em Django, Django REST Framework, PostgreSQL/PostGIS, Redis, Celery, WebSocket, IA/RAG e sistemas logísticos em tempo real.<text:line-break/><text:line-break/>Quero que você desenvolva uma aplicação chamada:<text:line-break/><text:line-break/>Uber da Logística — Sistema Inteligente de Logística<text:line-break/><text:soft-page-break/><text:line-break/>O sistema deve funcionar como uma plataforma semelhante ao Uber, porém voltada para logística e transporte de cargas, permitindo que clientes Pessoa Física e Pessoa Jurídica solicitem fretes, motoristas/transportadores aceitem entregas, veículos sejam cadastrados, entregas sejam rastreadas em tempo real, rotas sejam calculadas, previsão de chegada seja exibida e uma IA embutida ajude os usuários durante a utilização.<text:line-break/><text:line-break/>A aplicação deve ser desenvolvida usando Django como framework principal.<text:line-break/><text:line-break/>====================================================================<text:line-break/>1. OBJETIVO GERAL DO SISTEMA<text:line-break/>====================================================================<text:line-break/><text:line-break/>Criar um Sistema Inteligente de Logística para:<text:line-break/><text:line-break/>1. Transporte de equipamentos em geral, móveis e peças:<text:line-break/> <text:s text:c="2"/>- Fogão<text:line-break/> <text:s text:c="2"/>- Geladeira<text:line-break/> <text:s text:c="2"/>- Motor<text:line-break/> <text:s text:c="2"/>- Peças em geral<text:line-break/> <text:s text:c="2"/>- Ventilador<text:line-break/> <text:s text:c="2"/>- Móveis<text:line-break/> <text:s text:c="2"/>- Máquinas pequenas<text:line-break/><text:line-break/>2. Transporte de grãos secos:<text:line-break/> <text:s text:c="2"/>- Milho<text:line-break/> <text:s text:c="2"/>- Soja<text:line-break/> <text:s text:c="2"/>- Sorgo<text:line-break/> <text:s text:c="2"/>- Feijão seco<text:line-break/> <text:s text:c="2"/>- Arroz em casca<text:line-break/><text:line-break/>O sistema deve permitir:<text:line-break/><text:line-break/>- Cadastro de clientes Pessoa Física<text:line-break/>- Cadastro de clientes Pessoa Jurídica<text:line-break/>- Cadastro de motoristas autônomos<text:line-break/>- Cadastro de transportadoras<text:line-break/>- Cadastro de veículos<text:line-break/>- Solicitação de frete<text:line-break/>- Recomendação do veículo adequado<text:line-break/>- Cálculo estimado de preço<text:line-break/>- Matching entre carga e motorista/veículo<text:line-break/>- Melhor caminho<text:line-break/>- Previsão de chegada<text:line-break/>- Rastreabilidade da carga<text:line-break/>- Portal Web<text:line-break/>- APIs para Aplicativo Mobile<text:line-break/>- Portal Administrativo<text:line-break/>- Portal da Transportadora<text:line-break/>- IA embutida para atendimento ao cliente<text:line-break/>- Atendimento humano integrado quando necessário<text:line-break/><text:line-break/>====================================================================<text:line-break/>2. STACK TÉCNICA OBRIGATÓRIA<text:line-break/>====================================================================<text:line-break/><text:line-break/>Backend principal:<text:line-break/><text:line-break/>- Python<text:line-break/>- Django<text:line-break/>- Django REST Framework<text:line-break/>- Django Channels para WebSocket<text:line-break/>- Celery para tarefas assíncronas<text:line-break/><text:soft-page-break/>- Redis para cache, filas e localização em tempo real<text:line-break/>- PostgreSQL como banco principal<text:line-break/>- PostGIS para dados geoespaciais<text:line-break/>- pgvector para base vetorial da IA/RAG<text:line-break/>- JWT para autenticação via API<text:line-break/>- Django Admin customizado<text:line-break/>- Docker e Docker Compose<text:line-break/>- Arquitetura preparada para Kubernetes futuramente<text:line-break/><text:line-break/>Frontend inicial:<text:line-break/><text:line-break/>- Django Templates para portal web administrativo e MVP<text:line-break/>- APIs REST para futuro aplicativo mobile<text:line-break/>- WebSocket para rastreamento em tempo real<text:line-break/>- Estrutura preparada para integração com React, Next.js, Flutter ou React Native<text:line-break/><text:line-break/>Integrações externas devem ser criadas com camada de abstração/adapters:<text:line-break/><text:line-break/>- Google Maps, Mapbox ou HERE Maps<text:line-break/>- Gateway de pagamento<text:line-break/>- Pix<text:line-break/>- SEFAZ<text:line-break/>- Consulta CNPJ<text:line-break/>- APIs de clima<text:line-break/>- APIs de pedágio<text:line-break/>- Firebase Cloud Messaging<text:line-break/>- SMS<text:line-break/>- E-mail<text:line-break/>- WhatsApp Business API<text:line-break/>- Provedor de IA/LLM<text:line-break/><text:line-break/>Caso as integrações reais não estejam disponíveis, criar serviços simulados/mocks bem estruturados.<text:line-break/><text:line-break/>====================================================================<text:line-break/>3. ARQUITETURA GERAL DO SISTEMA<text:line-break/>====================================================================<text:line-break/><text:line-break/>Criar uma arquitetura modular usando Django Apps.<text:line-break/><text:line-break/>Apps sugeridos:<text:line-break/><text:line-break/>- accounts<text:line-break/>- companies<text:line-break/>- drivers<text:line-break/>- vehicles<text:line-break/>- freight<text:line-break/>- cargo<text:line-break/>- pricing<text:line-break/>- matching<text:line-break/>- routing<text:line-break/>- tracking<text:line-break/>- eta<text:line-break/>- payments<text:line-break/>- documents<text:line-break/>- notifications<text:line-break/>- support<text:line-break/>- ai_assistant<text:line-break/>- audit<text:line-break/>- core<text:line-break/><text:line-break/>Cada app deve conter:<text:line-break/><text:line-break/><text:soft-page-break/>- models.py<text:line-break/>- serializers.py<text:line-break/>- views.py ou viewsets.py<text:line-break/>- urls.py<text:line-break/>- services.py<text:line-break/>- permissions.py quando necessário<text:line-break/>- tests.py<text:line-break/>- admin.py<text:line-break/><text:line-break/>Usar Django REST Framework com ViewSets e Routers sempre que fizer sentido.<text:line-break/><text:line-break/>====================================================================<text:line-break/>4. TIPOS DE USUÁRIOS E PERFIS<text:line-break/>====================================================================<text:line-break/><text:line-break/>O sistema deve suportar os seguintes perfis:<text:line-break/><text:line-break/>1. Cliente Pessoa Física<text:line-break/>2. Cliente Pessoa Jurídica<text:line-break/>3. Motorista Autônomo<text:line-break/>4. Transportadora<text:line-break/>5. Administrador<text:line-break/>6. Operador de Suporte<text:line-break/>7. Operador Financeiro<text:line-break/>8. Operador Logístico<text:line-break/><text:line-break/>Implementar permissões por perfil.<text:line-break/><text:line-break/>Clientes só podem visualizar seus próprios pedidos.<text:line-break/><text:line-break/>Motoristas só podem visualizar fretes atribuídos a eles.<text:line-break/><text:line-break/>Transportadoras podem visualizar seus motoristas, veículos e fretes vinculados.<text:line-break/><text:line-break/>Administradores podem visualizar toda a operação.<text:line-break/><text:line-break/>A IA também deve respeitar essas permissões.<text:line-break/><text:line-break/>====================================================================<text:line-break/>5. CADASTRO DE USUÁRIOS<text:line-break/>====================================================================<text:line-break/><text:line-break/>Criar modelo de usuário customizado baseado em AbstractUser ou AbstractBaseUser.<text:line-break/><text:line-break/>Campos principais:<text:line-break/><text:line-break/>- id<text:line-break/>- name<text:line-break/>- email<text:line-break/>- phone<text:line-break/>- document_type: CPF ou CNPJ<text:line-break/>- document_number<text:line-break/>- user_type:<text:line-break/> <text:s/>- PF<text:line-break/> <text:s/>- PJ<text:line-break/> <text:s/>- DRIVER<text:line-break/> <text:s/>- CARRIER<text:line-break/> <text:s/>- ADMIN<text:line-break/> <text:s/>- SUPPORT<text:line-break/>- is_verified<text:line-break/>- is_active<text:line-break/>- created_at<text:line-break/>- updated_at<text:line-break/><text:line-break/><text:soft-page-break/>Para Pessoa Física:<text:line-break/><text:line-break/>- nome completo<text:line-break/>- CPF<text:line-break/>- telefone<text:line-break/>- e-mail<text:line-break/>- endereço<text:line-break/>- documento de identidade, se aplicável<text:line-break/><text:line-break/>Para Pessoa Jurídica:<text:line-break/><text:line-break/>- razão social<text:line-break/>- nome fantasia<text:line-break/>- CNPJ<text:line-break/>- inscrição estadual<text:line-break/>- responsável legal<text:line-break/>- telefone<text:line-break/>- e-mail<text:line-break/>- endereço fiscal<text:line-break/>- endereço operacional<text:line-break/>- dados de faturamento<text:line-break/><text:line-break/>====================================================================<text:line-break/>6. CADASTRO DE MOTORISTAS<text:line-break/>====================================================================<text:line-break/><text:line-break/>Criar modelo DriverProfile.<text:line-break/><text:line-break/>Campos:<text:line-break/><text:line-break/>- user<text:line-break/>- cnh_number<text:line-break/>- cnh_category<text:line-break/>- cnh_expiration_date<text:line-break/>- rating<text:line-break/>- status:<text:line-break/> <text:s/>- pending<text:line-break/> <text:s/>- approved<text:line-break/> <text:s/>- rejected<text:line-break/> <text:s/>- suspended<text:line-break/>- current_latitude<text:line-break/>- current_longitude<text:line-break/>- is_online<text:line-break/>- accepts_equipment<text:line-break/>- accepts_dry_grains<text:line-break/>- pix_key<text:line-break/>- bank_data<text:line-break/>- created_at<text:line-break/>- updated_at<text:line-break/><text:line-break/>O motorista deve poder:<text:line-break/><text:line-break/>- cadastrar-se<text:line-break/>- enviar documentos<text:line-break/>- cadastrar veículo<text:line-break/>- ficar online/offline<text:line-break/>- receber fretes<text:line-break/>- aceitar/recusar fretes<text:line-break/>- atualizar status da entrega<text:line-break/>- enviar localização GPS<text:line-break/>- registrar coleta<text:line-break/>- registrar entrega<text:line-break/>- consultar ganhos<text:line-break/><text:line-break/><text:soft-page-break/>====================================================================<text:line-break/>7. CADASTRO DE TRANSPORTADORAS<text:line-break/>====================================================================<text:line-break/><text:line-break/>Criar modelo CarrierCompany.<text:line-break/><text:line-break/>Campos:<text:line-break/><text:line-break/>- owner_user<text:line-break/>- legal_name<text:line-break/>- trade_name<text:line-break/>- cnpj<text:line-break/>- state_registration<text:line-break/>- responsible_name<text:line-break/>- responsible_phone<text:line-break/>- billing_address<text:line-break/>- operational_address<text:line-break/>- status<text:line-break/>- created_at<text:line-break/>- updated_at<text:line-break/><text:line-break/>Transportadora deve poder:<text:line-break/><text:line-break/>- cadastrar vários motoristas<text:line-break/>- cadastrar vários veículos<text:line-break/>- acompanhar frota<text:line-break/>- receber fretes<text:line-break/>- controlar ganhos<text:line-break/>- visualizar desempenho dos motoristas<text:line-break/><text:line-break/>====================================================================<text:line-break/>8. CADASTRO DE VEÍCULOS<text:line-break/>====================================================================<text:line-break/><text:line-break/>Criar modelo Vehicle.<text:line-break/><text:line-break/>Campos:<text:line-break/><text:line-break/>- owner_driver<text:line-break/>- carrier_company, opcional<text:line-break/>- plate<text:line-break/>- renavam<text:line-break/>- brand<text:line-break/>- model<text:line-break/>- year<text:line-break/>- vehicle_type<text:line-break/>- body_type<text:line-break/>- max_weight_kg<text:line-break/>- max_volume_m3<text:line-break/>- allowed_cargo_types<text:line-break/>- has_insurance<text:line-break/>- insurance_policy_number<text:line-break/>- status:<text:line-break/> <text:s/>- pending<text:line-break/> <text:s/>- approved<text:line-break/> <text:s/>- rejected<text:line-break/> <text:s/>- suspended<text:line-break/>- current_latitude<text:line-break/>- current_longitude<text:line-break/>- photos<text:line-break/>- created_at<text:line-break/>- updated_at<text:line-break/><text:line-break/>Tipos de veículos:<text:line-break/><text:soft-page-break/><text:line-break/>Para equipamentos, móveis e peças:<text:line-break/><text:line-break/>- utilitário pequeno<text:line-break/>- caminhonete<text:line-break/>- fiorino<text:line-break/>- van<text:line-break/>- caminhão 3/4<text:line-break/>- caminhão toco<text:line-break/>- caminhão truck<text:line-break/>- caminhão baú<text:line-break/>- caminhão sider<text:line-break/><text:line-break/>Para grãos secos:<text:line-break/><text:line-break/>- caminhão graneleiro<text:line-break/>- carreta graneleira<text:line-break/>- bitrem graneleiro<text:line-break/>- rodotrem graneleiro<text:line-break/>- caçamba graneleira<text:line-break/><text:line-break/>Tipos de carroceria:<text:line-break/><text:line-break/>- baú<text:line-break/>- aberta<text:line-break/>- sider<text:line-break/>- graneleira<text:line-break/>- caçamba<text:line-break/>- plataforma<text:line-break/>- refrigerada<text:line-break/>- tanque, se futuramente necessário<text:line-break/><text:line-break/>Regras:<text:line-break/><text:line-break/>- Grãos secos devem exigir veículo graneleiro ou adequado.<text:line-break/>- Equipamentos frágeis devem priorizar veículo fechado ou coberto.<text:line-break/>- Geladeira deve recomendar veículo fechado/coberto e transporte em pé.<text:line-break/>- Motor pode exigir amarração e cuidado com vazamento.<text:line-break/>- Móveis podem exigir ajudante.<text:line-break/>- Grãos podem exigir lona, limpeza da carroceria, pesagem, nota fiscal e romaneio.<text:line-break/><text:line-break/>====================================================================<text:line-break/>9. TIPOS DE CARGA<text:line-break/>====================================================================<text:line-break/><text:line-break/>Criar modelos CargoType e CargoItem.<text:line-break/><text:line-break/>Categorias principais:<text:line-break/><text:line-break/>1. EQUIPMENTS<text:line-break/>2. DRY_GRAINS<text:line-break/><text:line-break/>Subtipos para equipamentos:<text:line-break/><text:line-break/>- fogão<text:line-break/>- geladeira<text:line-break/>- motor<text:line-break/>- peças<text:line-break/>- ventilador<text:line-break/>- móveis<text:line-break/>- máquinas pequenas<text:line-break/>- outros<text:line-break/><text:line-break/><text:soft-page-break/>Subtipos para grãos secos:<text:line-break/><text:line-break/>- milho<text:line-break/>- soja<text:line-break/>- sorgo<text:line-break/>- feijão seco<text:line-break/>- arroz em casca<text:line-break/>- outros<text:line-break/><text:line-break/>CargoItem deve conter:<text:line-break/><text:line-break/>- freight_order<text:line-break/>- cargo_type<text:line-break/>- description<text:line-break/>- estimated_weight_kg<text:line-break/>- estimated_volume_m3<text:line-break/>- quantity<text:line-break/>- is_fragile<text:line-break/>- requires_helper<text:line-break/>- requires_insurance<text:line-break/>- requires_covered_vehicle<text:line-break/>- requires_grain_body<text:line-break/>- photos<text:line-break/>- notes<text:line-break/><text:line-break/>====================================================================<text:line-break/>10. SOLICITAÇÃO DE FRETE<text:line-break/>====================================================================<text:line-break/><text:line-break/>Criar modelo FreightOrder.<text:line-break/><text:line-break/>Campos:<text:line-break/><text:line-break/>- id<text:line-break/>- customer<text:line-break/>- driver<text:line-break/>- vehicle<text:line-break/>- carrier_company<text:line-break/>- origin_address<text:line-break/>- origin_latitude<text:line-break/>- origin_longitude<text:line-break/>- destination_address<text:line-break/>- destination_latitude<text:line-break/>- destination_longitude<text:line-break/>- cargo_category<text:line-break/>- cargo_description<text:line-break/>- estimated_weight_kg<text:line-break/>- estimated_volume_m3<text:line-break/>- required_vehicle_type<text:line-break/>- required_body_type<text:line-break/>- requires_helper<text:line-break/>- requires_insurance<text:line-break/>- scheduled_pickup_at<text:line-break/>- estimated_distance_km<text:line-break/>- estimated_duration_minutes<text:line-break/>- estimated_price<text:line-break/>- final_price<text:line-break/>- status<text:line-break/>- estimated_arrival_time<text:line-break/>- accepted_at<text:line-break/>- picked_up_at<text:line-break/>- delivered_at<text:line-break/>- cancelled_at<text:line-break/>- created_at<text:line-break/><text:soft-page-break/>- updated_at<text:line-break/><text:line-break/>Status possíveis:<text:line-break/><text:line-break/>- requested<text:line-break/>- waiting_driver<text:line-break/>- driver_found<text:line-break/>- driver_going_to_pickup<text:line-break/>- arrived_at_origin<text:line-break/>- cargo_collected<text:line-break/>- in_transit<text:line-break/>- temporarily_stopped<text:line-break/>- route_deviation_detected<text:line-break/>- near_destination<text:line-break/>- arrived_at_destination<text:line-break/>- delivered<text:line-break/>- completed<text:line-break/>- cancelled<text:line-break/>- disputed<text:line-break/><text:line-break/>Fluxo:<text:line-break/><text:line-break/>1. Cliente cria solicitação.<text:line-break/>2. Sistema recomenda veículo ideal.<text:line-break/>3. Sistema calcula rota e preço estimado.<text:line-break/>4. Sistema procura motoristas compatíveis.<text:line-break/>5. Motorista recebe solicitação.<text:line-break/>6. Motorista aceita ou recusa.<text:line-break/>7. Motorista vai até a origem.<text:line-break/>8. Motorista registra coleta.<text:line-break/>9. Cliente acompanha rastreamento.<text:line-break/>10. ETA é atualizado.<text:line-break/>11. Motorista registra entrega.<text:line-break/>12. Cliente confirma.<text:line-break/>13. Sistema finaliza.<text:line-break/>14. Pagamento e avaliação são processados.<text:line-break/><text:line-break/>====================================================================<text:line-break/>11. PRECIFICAÇÃO<text:line-break/>====================================================================<text:line-break/><text:line-break/>Criar PricingService.<text:line-break/><text:line-break/>A fórmula inicial deve considerar:<text:line-break/><text:line-break/>Preço = Tarifa Base + Distância x Valor por Km + Tempo x Valor Hora + Adicionais<text:line-break/><text:line-break/>Adicionais:<text:line-break/><text:line-break/>- seguro<text:line-break/>- pedágios<text:line-break/>- ajudante<text:line-break/>- taxa de urgência<text:line-break/>- taxa de risco<text:line-break/>- tipo de carga<text:line-break/>- tipo de veículo<text:line-break/>- baixa disponibilidade de motoristas<text:line-break/>- localidade remota<text:line-break/><text:line-break/>Criar endpoint:<text:line-break/><text:line-break/>POST /api/pricing/estimate/<text:line-break/><text:line-break/>Entrada:<text:line-break/><text:soft-page-break/><text:line-break/>- origem<text:line-break/>- destino<text:line-break/>- tipo de carga<text:line-break/>- peso<text:line-break/>- volume<text:line-break/>- tipo de veículo requerido<text:line-break/>- urgência<text:line-break/>- seguro<text:line-break/>- ajudante<text:line-break/><text:line-break/>Saída:<text:line-break/><text:line-break/>- preço estimado<text:line-break/>- distância estimada<text:line-break/>- tempo estimado<text:line-break/>- veículo recomendado<text:line-break/>- composição do preço<text:line-break/><text:line-break/>====================================================================<text:line-break/>12. MATCHING INTELIGENTE<text:line-break/>====================================================================<text:line-break/><text:line-break/>Criar MatchingService.<text:line-break/><text:line-break/>Critérios:<text:line-break/><text:line-break/>- motorista online<text:line-break/>- localização próxima da origem<text:line-break/>- veículo compatível<text:line-break/>- capacidade em kg<text:line-break/>- capacidade em m3<text:line-break/>- documentos válidos<text:line-break/>- avaliação do motorista<text:line-break/>- taxa de cancelamento<text:line-break/>- experiência com tipo de carga<text:line-break/>- disponibilidade<text:line-break/>- distância até coleta<text:line-break/>- transportadora, se aplicável<text:line-break/><text:line-break/>Criar score:<text:line-break/><text:line-break/>Score = Compatibilidade + Proximidade + Avaliação + Pontualidade - Risco<text:line-break/><text:line-break/>Implementar função para buscar motoristas próximos usando PostGIS e/ou Redis.<text:line-break/><text:line-break/>Endpoint:<text:line-break/><text:line-break/>POST /api/freight-orders/{id}/match/<text:line-break/><text:line-break/>Retornar lista ranqueada de motoristas e veículos compatíveis.<text:line-break/><text:line-break/>====================================================================<text:line-break/>13. ROTEIRIZAÇÃO E MELHOR CAMINHO<text:line-break/>====================================================================<text:line-break/><text:line-break/>Criar RoutingService.<text:line-break/><text:line-break/>Deve abstrair APIs externas como Google Maps, Mapbox ou HERE.<text:line-break/><text:line-break/>No MVP, se não houver chave de API, usar cálculo simulado baseado em distância geográfica.<text:line-break/><text:line-break/>Considerar:<text:line-break/><text:soft-page-break/><text:line-break/>- distância<text:line-break/>- tempo<text:line-break/>- trânsito<text:line-break/>- pedágios<text:line-break/>- restrições para caminhões<text:line-break/>- altura máxima<text:line-break/>- peso máximo permitido<text:line-break/>- áreas urbanas restritas<text:line-break/>- segurança da rota<text:line-break/>- postos de combustível<text:line-break/>- pontos de parada<text:line-break/>- condições climáticas<text:line-break/>- histórico de atrasos<text:line-break/><text:line-break/>Endpoints:<text:line-break/><text:line-break/>POST /api/routing/calculate/<text:line-break/>GET /api/freight-orders/{id}/route/<text:line-break/><text:line-break/>====================================================================<text:line-break/>14. PREVISÃO DE CHEGADA — ETA<text:line-break/>====================================================================<text:line-break/><text:line-break/>Criar ETAService.<text:line-break/><text:line-break/>ETA deve considerar:<text:line-break/><text:line-break/>- distância restante<text:line-break/>- velocidade média<text:line-break/>- trânsito atual<text:line-break/>- tipo de veículo<text:line-break/>- histórico da rota<text:line-break/>- paradas previstas<text:line-break/>- tempo de carga<text:line-break/>- tempo de descarga<text:line-break/>- clima<text:line-break/>- pedágios<text:line-break/>- tempo em balança, no caso de grãos<text:line-break/><text:line-break/>Fórmula inicial:<text:line-break/><text:line-break/>ETA = Tempo restante de viagem + Tempo de paradas + Tempo de descarga<text:line-break/><text:line-break/>Atualizar ETA sempre que:<text:line-break/><text:line-break/>- localização do motorista mudar<text:line-break/>- houver parada longa<text:line-break/>- houver desvio de rota<text:line-break/>- houver alteração de status<text:line-break/>- houver mudança climática ou trânsito, quando disponível<text:line-break/><text:line-break/>Endpoint:<text:line-break/><text:line-break/>GET /api/freight-orders/{id}/eta/<text:line-break/><text:line-break/>====================================================================<text:line-break/>15. RASTREAMENTO EM TEMPO REAL<text:line-break/>====================================================================<text:line-break/><text:line-break/>Criar TrackingService.<text:line-break/><text:line-break/>O app do motorista deve enviar localização GPS.<text:line-break/><text:line-break/><text:soft-page-break/>Endpoint:<text:line-break/><text:line-break/>POST /api/tracking/location/<text:line-break/><text:line-break/>Payload:<text:line-break/><text:line-break/>- freight_order_id<text:line-break/>- driver_id<text:line-break/>- latitude<text:line-break/>- longitude<text:line-break/>- speed<text:line-break/>- heading<text:line-break/>- timestamp<text:line-break/><text:line-break/>A localização atual deve ser armazenada em Redis para acesso rápido.<text:line-break/><text:line-break/>Eventos históricos devem ser salvos em banco.<text:line-break/><text:line-break/>Criar modelo TrackingEvent.<text:line-break/><text:line-break/>Campos:<text:line-break/><text:line-break/>- freight_order<text:line-break/>- event_type<text:line-break/>- latitude<text:line-break/>- longitude<text:line-break/>- speed<text:line-break/>- heading<text:line-break/>- description<text:line-break/>- image<text:line-break/>- signature<text:line-break/>- previous_status<text:line-break/>- new_status<text:line-break/>- created_by<text:line-break/>- created_at<text:line-break/><text:line-break/>Eventos:<text:line-break/><text:line-break/>- order_created<text:line-break/>- driver_accepted<text:line-break/>- driver_arrived_origin<text:line-break/>- cargo_collected<text:line-break/>- route_started<text:line-break/>- location_updated<text:line-break/>- stop_detected<text:line-break/>- route_deviation<text:line-break/>- risk_area_entered<text:line-break/>- arrived_destination<text:line-break/>- delivery_confirmed<text:line-break/>- occurrence_registered<text:line-break/><text:line-break/>Usar Django Channels para WebSocket:<text:line-break/><text:line-break/>- Cliente acompanha pedido em tempo real.<text:line-break/>- Portal administrativo acompanha entregas ativas.<text:line-break/>- Transportadora acompanha frota.<text:line-break/>- Motorista pode receber atualizações.<text:line-break/><text:line-break/>Canais sugeridos:<text:line-break/><text:line-break/>- tracking_order_{freight_order_id}<text:line-break/>- driver_{driver_id}<text:line-break/>- customer_{customer_id}<text:line-break/>- admin_operations<text:line-break/><text:soft-page-break/><text:line-break/>====================================================================<text:line-break/>16. DOCUMENTOS E COMPROVANTES<text:line-break/>====================================================================<text:line-break/><text:line-break/>Criar DocumentService.<text:line-break/><text:line-break/>Tipos de documentos:<text:line-break/><text:line-break/>Motorista:<text:line-break/><text:line-break/>- CNH<text:line-break/>- comprovante de endereço<text:line-break/>- dados bancários<text:line-break/>- foto do motorista<text:line-break/><text:line-break/>Veículo:<text:line-break/><text:line-break/>- documento do veículo<text:line-break/>- seguro<text:line-break/>- fotos do veículo<text:line-break/>- laudos, se aplicável<text:line-break/><text:line-break/>Carga:<text:line-break/><text:line-break/>- foto da coleta<text:line-break/>- foto da entrega<text:line-break/>- assinatura digital<text:line-break/>- nota fiscal<text:line-break/>- romaneio<text:line-break/>- comprovante de pesagem inicial<text:line-break/>- comprovante de pesagem final<text:line-break/><text:line-break/>Criar modelo Document.<text:line-break/><text:line-break/>Campos:<text:line-break/><text:line-break/>- owner_user<text:line-break/>- freight_order<text:line-break/>- vehicle<text:line-break/>- document_type<text:line-break/>- file<text:line-break/>- status<text:line-break/>- reviewed_by<text:line-break/>- reviewed_at<text:line-break/>- rejection_reason<text:line-break/>- created_at<text:line-break/><text:line-break/>Arquivos devem ser privados e acessados por URL temporária ou endpoint protegido.<text:line-break/><text:line-break/>====================================================================<text:line-break/>17. PAGAMENTOS<text:line-break/>====================================================================<text:line-break/><text:line-break/>Criar PaymentService.<text:line-break/><text:line-break/>No MVP, implementar pagamento simulado.<text:line-break/><text:line-break/>Campos:<text:line-break/><text:line-break/>- freight_order<text:line-break/>- payer<text:line-break/>- driver<text:line-break/><text:soft-page-break/>- amount<text:line-break/>- platform_fee<text:line-break/>- driver_amount<text:line-break/>- status<text:line-break/>- payment_method<text:line-break/>- transaction_id<text:line-break/>- created_at<text:line-break/>- paid_at<text:line-break/><text:line-break/>Métodos:<text:line-break/><text:line-break/>- Pix<text:line-break/>- Cartão<text:line-break/>- Boleto<text:line-break/>- Faturado para PJ, futuramente<text:line-break/><text:line-break/>Status:<text:line-break/><text:line-break/>- pending<text:line-break/>- authorized<text:line-break/>- paid<text:line-break/>- failed<text:line-break/>- refunded<text:line-break/>- cancelled<text:line-break/><text:line-break/>Criar endpoints:<text:line-break/><text:line-break/>POST /api/payments/create/<text:line-break/>GET /api/payments/{id}/<text:line-break/>POST /api/payments/{id}/simulate-confirmation/<text:line-break/><text:line-break/>====================================================================<text:line-break/>18. NOTIFICAÇÕES<text:line-break/>====================================================================<text:line-break/><text:line-break/>Criar NotificationService.<text:line-break/><text:line-break/>Canais:<text:line-break/><text:line-break/>- e-mail<text:line-break/>- push notification<text:line-break/>- SMS<text:line-break/>- WhatsApp, futuramente<text:line-break/>- notificação interna no portal/app<text:line-break/><text:line-break/>Eventos que geram notificação:<text:line-break/><text:line-break/>- frete solicitado<text:line-break/>- motorista encontrado<text:line-break/>- motorista aceitou<text:line-break/>- motorista chegou à origem<text:line-break/>- carga coletada<text:line-break/>- entrega em trânsito<text:line-break/>- previsão alterada<text:line-break/>- chegada próxima<text:line-break/>- entrega realizada<text:line-break/>- pagamento confirmado<text:line-break/>- ocorrência aberta<text:line-break/>- documento aprovado/rejeitado<text:line-break/><text:line-break/>Criar modelo Notification.<text:line-break/><text:line-break/>====================================================================<text:line-break/>19. PORTAIS DO SISTEMA<text:line-break/><text:soft-page-break/>====================================================================<text:line-break/><text:line-break/>Criar estrutura para os seguintes portais:<text:line-break/><text:line-break/>1. Portal Web do Cliente<text:line-break/>2. Portal da Transportadora<text:line-break/>3. Portal Administrativo<text:line-break/>4. APIs para Aplicativo Cliente<text:line-break/>5. APIs para Aplicativo Motorista<text:line-break/><text:line-break/>No MVP com Django Templates, criar páginas básicas:<text:line-break/><text:line-break/>Portal Cliente:<text:line-break/><text:line-break/>- cadastro/login<text:line-break/>- dashboard<text:line-break/>- nova solicitação de frete<text:line-break/>- minhas entregas<text:line-break/>- detalhe da entrega<text:line-break/>- rastreamento em mapa<text:line-break/>- histórico<text:line-break/>- pagamentos<text:line-break/>- chat com IA<text:line-break/><text:line-break/>Portal Motorista, se web for necessário:<text:line-break/><text:line-break/>- dashboard<text:line-break/>- meus fretes<text:line-break/>- meu veículo<text:line-break/>- documentos<text:line-break/>- ganhos<text:line-break/><text:line-break/>Portal Transportadora:<text:line-break/><text:line-break/>- dashboard<text:line-break/>- frota<text:line-break/>- motoristas<text:line-break/>- fretes<text:line-break/>- ganhos<text:line-break/>- documentos<text:line-break/><text:line-break/>Portal Administrativo:<text:line-break/><text:line-break/>- dashboard operacional<text:line-break/>- usuários<text:line-break/>- motoristas<text:line-break/>- transportadoras<text:line-break/>- veículos<text:line-break/>- fretes<text:line-break/>- mapa de entregas<text:line-break/>- documentos pendentes<text:line-break/>- pagamentos<text:line-break/>- ocorrências<text:line-break/>- relatórios<text:line-break/>- conversas da IA<text:line-break/><text:line-break/>====================================================================<text:line-break/>20. IA EMBUTIDA NO PORTAL E APLICATIVO<text:line-break/>====================================================================<text:line-break/><text:line-break/>Criar app ai_assistant.<text:line-break/><text:line-break/>Objetivo:<text:line-break/><text:line-break/><text:soft-page-break/>A IA deve permitir que clientes, motoristas, transportadoras e administradores tirem dúvidas durante a utilização do sistema.<text:line-break/><text:line-break/>A IA deve funcionar como chat dentro do portal e via API para aplicativo mobile.<text:line-break/><text:line-break/>Funcionalidades da IA:<text:line-break/><text:line-break/>- responder dúvidas gerais<text:line-break/>- explicar como solicitar frete<text:line-break/>- recomendar veículo adequado<text:line-break/>- explicar preço do frete<text:line-break/>- consultar status de entrega<text:line-break/>- consultar previsão de chegada<text:line-break/>- consultar localização da carga<text:line-break/>- explicar documentos necessários<text:line-break/>- explicar regras para transporte de grãos<text:line-break/>- explicar regras para transporte de equipamentos<text:line-break/>- abrir chamado de suporte<text:line-break/>- encaminhar para atendimento humano<text:line-break/>- ajudar no cadastro de veículo<text:line-break/>- ajudar no cadastro de empresa<text:line-break/>- orientar motorista<text:line-break/><text:line-break/>Criar componentes:<text:line-break/><text:line-break/>1. AI Assistant Service<text:line-break/>2. AI Orchestrator<text:line-break/>3. RAG Service<text:line-break/>4. Knowledge Base<text:line-break/>5. Vector Database com pgvector<text:line-break/>6. Conversation Logs<text:line-break/>7. Human Escalation Service<text:line-break/><text:line-break/>A IA não deve acessar banco de dados diretamente.<text:line-break/>Ela deve consultar APIs ou services internos autorizados.<text:line-break/><text:line-break/>Criar modelos:<text:line-break/><text:line-break/>AIConversation:<text:line-break/><text:line-break/>- id<text:line-break/>- user<text:line-break/>- channel:<text:line-break/> <text:s/>- web<text:line-break/> <text:s/>- mobile<text:line-break/> <text:s/>- admin<text:line-break/> <text:s/>- driver_app<text:line-break/>- status:<text:line-break/> <text:s/>- active<text:line-break/> <text:s/>- closed<text:line-break/> <text:s/>- escalated<text:line-break/>- created_at<text:line-break/>- updated_at<text:line-break/><text:line-break/>AIMessage:<text:line-break/><text:line-break/>- conversation<text:line-break/>- sender:<text:line-break/> <text:s/>- user<text:line-break/> <text:s/>- assistant<text:line-break/> <text:s/>- system<text:line-break/> <text:s/>- human_agent<text:line-break/>- message_text<text:line-break/>- intent<text:line-break/><text:soft-page-break/>- confidence_score<text:line-break/>- metadata<text:line-break/>- created_at<text:line-break/><text:line-break/>AIAction:<text:line-break/><text:line-break/>- conversation<text:line-break/>- user<text:line-break/>- action_type<text:line-break/>- target_entity<text:line-break/>- target_id<text:line-break/>- status<text:line-break/>- requires_confirmation<text:line-break/>- confirmed_at<text:line-break/>- created_at<text:line-break/><text:line-break/>KnowledgeDocument:<text:line-break/><text:line-break/>- title<text:line-break/>- category<text:line-break/>- content<text:line-break/>- version<text:line-break/>- status<text:line-break/>- created_at<text:line-break/>- updated_at<text:line-break/><text:line-break/>KnowledgeEmbedding:<text:line-break/><text:line-break/>- document<text:line-break/>- embedding_vector<text:line-break/>- metadata<text:line-break/>- created_at<text:line-break/><text:line-break/>Intenções da IA:<text:line-break/><text:line-break/>- help_general<text:line-break/>- explain_system<text:line-break/>- create_freight_guidance<text:line-break/>- track_order<text:line-break/>- get_eta<text:line-break/>- get_driver_location<text:line-break/>- explain_price<text:line-break/>- recommend_vehicle<text:line-break/>- required_documents<text:line-break/>- dry_grains_rules<text:line-break/>- equipment_rules<text:line-break/>- open_support_ticket<text:line-break/>- cancel_order_request<text:line-break/>- talk_to_human<text:line-break/>- payment_status<text:line-break/>- delivery_proof<text:line-break/>- vehicle_registration_help<text:line-break/>- company_registration_help<text:line-break/><text:line-break/>Ações permitidas com confirmação:<text:line-break/><text:line-break/>- cancelar pedido<text:line-break/>- alterar endereço<text:line-break/>- abrir disputa<text:line-break/>- solicitar reembolso<text:line-break/>- alterar dados cadastrais<text:line-break/><text:line-break/>Casos que exigem atendimento humano:<text:line-break/><text:line-break/><text:soft-page-break/>- carga danificada<text:line-break/>- pagamento com problema<text:line-break/>- suspeita de fraude<text:line-break/>- motorista não localizado<text:line-break/>- entrega muito atrasada<text:line-break/>- cancelamento com cobrança<text:line-break/>- divergência de peso<text:line-break/>- disputa entre cliente e motorista<text:line-break/><text:line-break/>Criar endpoint:<text:line-break/><text:line-break/>POST /api/ai/chat/<text:line-break/><text:line-break/>Payload:<text:line-break/><text:line-break/>- conversation_id, opcional<text:line-break/>- message<text:line-break/>- context, opcional<text:line-break/>- freight_order_id, opcional<text:line-break/><text:line-break/>Resposta:<text:line-break/><text:line-break/>- answer<text:line-break/>- intent<text:line-break/>- confidence<text:line-break/>- suggested_actions<text:line-break/>- requires_human<text:line-break/>- conversation_id<text:line-break/><text:line-break/>Criar endpoint:<text:line-break/><text:line-break/>POST /api/ai/conversations/{id}/escalate/<text:line-break/><text:line-break/>====================================================================<text:line-break/>21. BASE DE CONHECIMENTO INICIAL DA IA<text:line-break/>====================================================================<text:line-break/><text:line-break/>Criar seed inicial com documentos de conhecimento sobre:<text:line-break/><text:line-break/>- Como funciona o Uber da Logística<text:line-break/>- Como solicitar frete<text:line-break/>- Como acompanhar entrega<text:line-break/>- Como funciona a previsão de chegada<text:line-break/>- Como funciona o rastreamento<text:line-break/>- Como funciona o preço<text:line-break/>- Tipos de veículos<text:line-break/>- Regras para equipamentos<text:line-break/>- Regras para grãos secos<text:line-break/>- Documentos necessários para motoristas<text:line-break/>- Documentos necessários para veículos<text:line-break/>- Documentos necessários para cargas agrícolas<text:line-break/>- Como cadastrar Pessoa Física<text:line-break/>- Como cadastrar Pessoa Jurídica<text:line-break/>- Como cadastrar transportadora<text:line-break/>- Como cadastrar veículo<text:line-break/>- Regras de cancelamento<text:line-break/>- Regras de pagamento<text:line-break/>- Política de segurança<text:line-break/>- LGPD e privacidade<text:line-break/><text:line-break/>====================================================================<text:line-break/>22. SUPORTE E OCORRÊNCIAS<text:line-break/>====================================================================<text:line-break/><text:line-break/><text:soft-page-break/>Criar SupportTicket.<text:line-break/><text:line-break/>Campos:<text:line-break/><text:line-break/>- user<text:line-break/>- freight_order<text:line-break/>- assigned_to<text:line-break/>- category<text:line-break/>- priority<text:line-break/>- status<text:line-break/>- description<text:line-break/>- created_from:<text:line-break/> <text:s/>- portal<text:line-break/> <text:s/>- app<text:line-break/> <text:s/>- ai<text:line-break/> <text:s/>- admin<text:line-break/>- created_at<text:line-break/>- updated_at<text:line-break/>- closed_at<text:line-break/><text:line-break/>Categorias:<text:line-break/><text:line-break/>- atraso<text:line-break/>- carga danificada<text:line-break/>- pagamento<text:line-break/>- documento<text:line-break/>- motorista<text:line-break/>- cliente<text:line-break/>- divergência de peso<text:line-break/>- cancelamento<text:line-break/>- problema técnico<text:line-break/>- outro<text:line-break/><text:line-break/>====================================================================<text:line-break/>23. SEGURANÇA E LGPD<text:line-break/>====================================================================<text:line-break/><text:line-break/>Implementar:<text:line-break/><text:line-break/>- autenticação JWT<text:line-break/>- permissões por perfil<text:line-break/>- proteção CSRF nas páginas web<text:line-break/>- CORS configurável para apps<text:line-break/>- rate limit nos endpoints sensíveis<text:line-break/>- logs de auditoria<text:line-break/>- mascaramento de dados sensíveis<text:line-break/>- criptografia de dados sensíveis quando aplicável<text:line-break/>- controle de acesso a documentos<text:line-break/>- isolamento de dados por usuário<text:line-break/>- consentimento de uso de dados<text:line-break/>- política de privacidade<text:line-break/>- termos de uso<text:line-break/>- registro de ações críticas<text:line-break/><text:line-break/>A IA deve:<text:line-break/><text:line-break/>- respeitar permissões<text:line-break/>- não revelar dados de outros usuários<text:line-break/>- não executar ação crítica sem confirmação<text:line-break/>- não expor prompts internos<text:line-break/>- não retornar dados sensíveis sem necessidade<text:line-break/>- encaminhar casos críticos para humano<text:line-break/><text:line-break/>====================================================================<text:line-break/><text:soft-page-break/>24. AUDITORIA<text:line-break/>====================================================================<text:line-break/><text:line-break/>Criar AuditLog.<text:line-break/><text:line-break/>Campos:<text:line-break/><text:line-break/>- user<text:line-break/>- action<text:line-break/>- entity_type<text:line-break/>- entity_id<text:line-break/>- ip_address<text:line-break/>- user_agent<text:line-break/>- metadata<text:line-break/>- created_at<text:line-break/><text:line-break/>Auditar:<text:line-break/><text:line-break/>- login<text:line-break/>- criação de pedido<text:line-break/>- aceite de frete<text:line-break/>- cancelamento<text:line-break/>- alteração de endereço<text:line-break/>- pagamento<text:line-break/>- aprovação/rejeição de documentos<text:line-break/>- ações da IA<text:line-break/>- abertura de ocorrência<text:line-break/>- alterações administrativas<text:line-break/><text:line-break/>====================================================================<text:line-break/>25. RELATÓRIOS E INDICADORES<text:line-break/>====================================================================<text:line-break/><text:line-break/>Criar endpoints e páginas administrativas para:<text:line-break/><text:line-break/>- número de entregas realizadas<text:line-break/>- entregas em andamento<text:line-break/>- entregas atrasadas<text:line-break/>- tempo médio de entrega<text:line-break/>- cancelamentos<text:line-break/>- receita total<text:line-break/>- ticket médio<text:line-break/>- motoristas ativos<text:line-break/>- veículos disponíveis<text:line-break/>- avaliação média dos motoristas<text:line-break/>- ocorrências por tipo<text:line-break/>- rotas mais usadas<text:line-break/>- tipos de carga mais transportados<text:line-break/>- taxa de aceite<text:line-break/>- taxa de entrega no prazo<text:line-break/>- uso da IA<text:line-break/>- taxa de resolução automática da IA<text:line-break/>- taxa de escalonamento humano<text:line-break/><text:line-break/>====================================================================<text:line-break/>26. ENDPOINTS PRINCIPAIS<text:line-break/>====================================================================<text:line-break/><text:line-break/>Criar APIs REST para:<text:line-break/><text:line-break/>Autenticação:<text:line-break/><text:line-break/>- POST /api/auth/register/<text:line-break/>- POST /api/auth/login/<text:line-break/><text:soft-page-break/>- POST /api/auth/refresh/<text:line-break/>- POST /api/auth/logout/<text:line-break/>- GET /api/auth/me/<text:line-break/><text:line-break/>Usuários:<text:line-break/><text:line-break/>- GET /api/users/me/<text:line-break/>- PATCH /api/users/me/<text:line-break/><text:line-break/>Empresas:<text:line-break/><text:line-break/>- POST /api/companies/<text:line-break/>- GET /api/companies/me/<text:line-break/>- PATCH /api/companies/{id}/<text:line-break/><text:line-break/>Motoristas:<text:line-break/><text:line-break/>- POST /api/drivers/<text:line-break/>- GET /api/drivers/me/<text:line-break/>- PATCH /api/drivers/me/<text:line-break/>- POST /api/drivers/go-online/<text:line-break/>- POST /api/drivers/go-offline/<text:line-break/><text:line-break/>Veículos:<text:line-break/><text:line-break/>- POST /api/vehicles/<text:line-break/>- GET /api/vehicles/<text:line-break/>- GET /api/vehicles/{id}/<text:line-break/>- PATCH /api/vehicles/{id}/<text:line-break/>- POST /api/vehicles/{id}/submit-review/<text:line-break/><text:line-break/>Fretes:<text:line-break/><text:line-break/>- POST /api/freight-orders/<text:line-break/>- GET /api/freight-orders/<text:line-break/>- GET /api/freight-orders/{id}/<text:line-break/>- PATCH /api/freight-orders/{id}/<text:line-break/>- POST /api/freight-orders/{id}/cancel/<text:line-break/>- POST /api/freight-orders/{id}/accept/<text:line-break/>- POST /api/freight-orders/{id}/reject/<text:line-break/>- POST /api/freight-orders/{id}/collect/<text:line-break/>- POST /api/freight-orders/{id}/deliver/<text:line-break/><text:line-break/>Preço:<text:line-break/><text:line-break/>- POST /api/pricing/estimate/<text:line-break/><text:line-break/>Matching:<text:line-break/><text:line-break/>- POST /api/freight-orders/{id}/match/<text:line-break/><text:line-break/>Roteirização:<text:line-break/><text:line-break/>- POST /api/routing/calculate/<text:line-break/>- GET /api/freight-orders/{id}/route/<text:line-break/><text:line-break/>ETA:<text:line-break/><text:line-break/>- GET /api/freight-orders/{id}/eta/<text:line-break/><text:line-break/>Tracking:<text:line-break/><text:line-break/>- POST /api/tracking/location/<text:line-break/>- GET /api/freight-orders/{id}/tracking/<text:line-break/><text:soft-page-break/>- GET /api/freight-orders/{id}/events/<text:line-break/><text:line-break/>Documentos:<text:line-break/><text:line-break/>- POST /api/documents/<text:line-break/>- GET /api/documents/<text:line-break/>- PATCH /api/documents/{id}/review/<text:line-break/><text:line-break/>Pagamentos:<text:line-break/><text:line-break/>- POST /api/payments/create/<text:line-break/>- GET /api/payments/{id}/<text:line-break/>- POST /api/payments/{id}/simulate-confirmation/<text:line-break/><text:line-break/>Notificações:<text:line-break/><text:line-break/>- GET /api/notifications/<text:line-break/>- PATCH /api/notifications/{id}/read/<text:line-break/><text:line-break/>IA:<text:line-break/><text:line-break/>- POST /api/ai/chat/<text:line-break/>- GET /api/ai/conversations/<text:line-break/>- GET /api/ai/conversations/{id}/<text:line-break/>- POST /api/ai/conversations/{id}/escalate/<text:line-break/><text:line-break/>Suporte:<text:line-break/><text:line-break/>- POST /api/support/tickets/<text:line-break/>- GET /api/support/tickets/<text:line-break/>- GET /api/support/tickets/{id}/<text:line-break/>- PATCH /api/support/tickets/{id}/<text:line-break/><text:line-break/>Admin/Relatórios:<text:line-break/><text:line-break/>- GET /api/admin/dashboard/<text:line-break/>- GET /api/admin/reports/operations/<text:line-break/>- GET /api/admin/reports/financial/<text:line-break/>- GET /api/admin/reports/ai/<text:line-break/><text:line-break/>====================================================================<text:line-break/>27. WEBSOCKET<text:line-break/>====================================================================<text:line-break/><text:line-break/>Implementar Django Channels.<text:line-break/><text:line-break/>Rotas WebSocket:<text:line-break/><text:line-break/>- ws/tracking/order/{freight_order_id}/<text:line-break/>- ws/customer/{customer_id}/<text:line-break/>- ws/driver/{driver_id}/<text:line-break/>- ws/admin/operations/<text:line-break/>- ws/ai/conversation/{conversation_id}/<text:line-break/><text:line-break/>Usos:<text:line-break/><text:line-break/>- rastreamento em tempo real<text:line-break/>- atualização de ETA<text:line-break/>- status da entrega<text:line-break/>- notificações operacionais<text:line-break/>- chat com IA em tempo real<text:line-break/>- monitoramento administrativo<text:line-break/><text:line-break/>====================================================================<text:line-break/><text:soft-page-break/>28. ARQUITETURA DE REDE CONSIDERADA<text:line-break/>====================================================================<text:line-break/><text:line-break/>Preparar o projeto para rodar em ambiente cloud com:<text:line-break/><text:line-break/>- DNS<text:line-break/>- CDN<text:line-break/>- WAF<text:line-break/>- Load Balancer<text:line-break/>- API Gateway ou Ingress<text:line-break/>- VPC privada<text:line-break/>- sub-rede pública<text:line-break/>- sub-rede privada de aplicação<text:line-break/>- sub-rede privada de dados<text:line-break/>- sub-rede de mensageria<text:line-break/>- sub-rede de observabilidade<text:line-break/>- NAT Gateway<text:line-break/>- VPN ou acesso Zero Trust para administração<text:line-break/><text:line-break/>No Docker Compose local, incluir:<text:line-break/><text:line-break/>- web Django<text:line-break/>- db PostgreSQL/PostGIS<text:line-break/>- redis<text:line-break/>- celery_worker<text:line-break/>- celery_beat<text:line-break/>- channels/daphne ou uvicorn<text:line-break/>- opcional: pgadmin<text:line-break/>- opcional: mailhog<text:line-break/><text:line-break/>====================================================================<text:line-break/>29. DOCKER E CONFIGURAÇÃO<text:line-break/>====================================================================<text:line-break/><text:line-break/>Criar:<text:line-break/><text:line-break/>- Dockerfile<text:line-break/>- docker-compose.yml<text:line-break/>- requirements.txt ou pyproject.toml<text:line-break/>- .env.example<text:line-break/>- README.md<text:line-break/>- scripts de inicialização<text:line-break/>- comandos Makefile, se útil<text:line-break/><text:line-break/>Variáveis .env:<text:line-break/><text:line-break/>- DEBUG<text:line-break/>- SECRET_KEY<text:line-break/>- DATABASE_URL<text:line-break/>- REDIS_URL<text:line-break/>- ALLOWED_HOSTS<text:line-break/>- CORS_ALLOWED_ORIGINS<text:line-break/>- JWT_SECRET<text:line-break/>- MAPS_PROVIDER<text:line-break/>- MAPS_API_KEY<text:line-break/>- PAYMENT_PROVIDER<text:line-break/>- PAYMENT_API_KEY<text:line-break/>- LLM_PROVIDER<text:line-break/>- LLM_API_KEY<text:line-break/>- EMAIL_HOST<text:line-break/>- EMAIL_PORT<text:line-break/>- EMAIL_USER<text:line-break/>- EMAIL_PASSWORD<text:line-break/>- DEFAULT_FROM_EMAIL<text:line-break/><text:soft-page-break/><text:line-break/>====================================================================<text:line-break/>30. TESTES<text:line-break/>====================================================================<text:line-break/><text:line-break/>Criar testes automatizados para:<text:line-break/><text:line-break/>- cadastro de usuário<text:line-break/>- login<text:line-break/>- criação de veículo<text:line-break/>- criação de frete<text:line-break/>- recomendação de veículo<text:line-break/>- cálculo de preço<text:line-break/>- matching<text:line-break/>- atualização de localização<text:line-break/>- ETA<text:line-break/>- rastreamento<text:line-break/>- permissões<text:line-break/>- documentos<text:line-break/>- pagamentos simulados<text:line-break/>- chat IA<text:line-break/>- escalonamento humano<text:line-break/>- auditoria<text:line-break/><text:line-break/>Usar pytest ou Django TestCase.<text:line-break/><text:line-break/>====================================================================<text:line-break/>31. SEEDS E DADOS INICIAIS<text:line-break/>====================================================================<text:line-break/><text:line-break/>Criar comando Django:<text:line-break/><text:line-break/>python manage.py seed_initial_data<text:line-break/><text:line-break/>O comando deve criar:<text:line-break/><text:line-break/>- tipos de carga<text:line-break/>- tipos de veículos<text:line-break/>- regras de compatibilidade<text:line-break/>- usuário admin<text:line-break/>- usuário cliente PF demo<text:line-break/>- usuário cliente PJ demo<text:line-break/>- motorista demo<text:line-break/>- transportadora demo<text:line-break/>- veículo baú demo<text:line-break/>- veículo graneleiro demo<text:line-break/>- documentos de conhecimento da IA<text:line-break/>- pedidos de frete demo<text:line-break/><text:line-break/>====================================================================<text:line-break/>32. REGRAS DE COMPATIBILIDADE DE CARGA E VEÍCULO<text:line-break/>====================================================================<text:line-break/><text:line-break/>Implementar regras iniciais:<text:line-break/><text:line-break/>1. Geladeira:<text:line-break/> <text:s text:c="2"/>- veículo recomendado: baú, caminhonete coberta, fiorino baú<text:line-break/> <text:s text:c="2"/>- requer proteção contra chuva<text:line-break/> <text:s text:c="2"/>- sugerir transporte em pé<text:line-break/> <text:s text:c="2"/>- pode exigir ajudante<text:line-break/><text:line-break/>2. Fogão:<text:line-break/> <text:s text:c="2"/>- veículo recomendado: baú ou caminhonete coberta<text:line-break/> <text:s text:c="2"/>- requer proteção contra chuva<text:line-break/><text:soft-page-break/><text:line-break/>3. Motor:<text:line-break/> <text:s text:c="2"/>- veículo recomendado: caminhonete, baú ou utilitário adequado<text:line-break/> <text:s text:c="2"/>- requer amarração<text:line-break/> <text:s text:c="2"/>- pode exigir cuidado contra vazamento<text:line-break/><text:line-break/>4. Móveis:<text:line-break/> <text:s text:c="2"/>- veículo recomendado: baú, sider ou caminhão adequado<text:line-break/> <text:s text:c="2"/>- pode exigir ajudante<text:line-break/> <text:s text:c="2"/>- requer proteção contra chuva<text:line-break/><text:line-break/>5. Peças:<text:line-break/> <text:s text:c="2"/>- veículo depende do peso e volume<text:line-break/> <text:s text:c="2"/>- pode exigir embalagem<text:line-break/><text:line-break/>6. Milho e soja:<text:line-break/> <text:s text:c="2"/>- veículo recomendado: graneleiro, carreta graneleira, bitrem graneleiro ou caçamba apropriada<text:line-break/> <text:s text:c="2"/>- requer proteção contra umidade<text:line-break/> <text:s text:c="2"/>- pode exigir lona<text:line-break/> <text:s text:c="2"/>- pode exigir nota fiscal, romaneio e pesagem<text:line-break/> <text:s text:c="2"/>- não recomendar baú comum como padrão<text:line-break/><text:line-break/>====================================================================<text:line-break/>33. MVP PRIORITÁRIO<text:line-break/>====================================================================<text:line-break/><text:line-break/>Entregar primeiro o MVP funcional com:<text:line-break/><text:line-break/>1. Backend Django organizado<text:line-break/>2. Autenticação JWT<text:line-break/>3. Cadastro PF/PJ<text:line-break/>4. Cadastro motorista<text:line-break/>5. Cadastro transportadora<text:line-break/>6. Cadastro veículo<text:line-break/>7. Criação de frete<text:line-break/>8. Recomendação simples de veículo<text:line-break/>9. Cálculo simples de preço<text:line-break/>10. Matching simples por distância e compatibilidade<text:line-break/>11. Atualização de localização<text:line-break/>12. Rastreamento básico<text:line-break/>13. ETA básico<text:line-break/>14. Portal administrativo<text:line-break/>15. Portal cliente básico<text:line-break/>16. Upload de documentos<text:line-break/>17. Pagamento simulado<text:line-break/>18. Notificações internas<text:line-break/>19. Chat IA básico com base de conhecimento<text:line-break/>20. Abertura de chamado via IA<text:line-break/><text:line-break/>Depois estruturar evolução para:<text:line-break/><text:line-break/>- IA mais avançada<text:line-break/>- preço dinâmico<text:line-break/>- integração real com mapas<text:line-break/>- integração real com pagamentos<text:line-break/>- integração fiscal<text:line-break/>- seguro de carga<text:line-break/>- análise de risco<text:line-break/>- detecção de desvio de rota<text:line-break/>- app mobile Flutter/React Native<text:line-break/><text:line-break/>====================================================================<text:line-break/>34. QUALIDADE DO CÓDIGO<text:line-break/><text:soft-page-break/>====================================================================<text:line-break/><text:line-break/>O código deve seguir boas práticas:<text:line-break/><text:line-break/>- arquitetura limpa<text:line-break/>- services para regras de negócio<text:line-break/>- serializers bem validados<text:line-break/>- permissões explícitas<text:line-break/>- models bem normalizados<text:line-break/>- nomes claros<text:line-break/>- docstrings em funções importantes<text:line-break/>- type hints quando possível<text:line-break/>- testes automatizados<text:line-break/>- README claro<text:line-break/>- separação de settings por ambiente<text:line-break/>- logs estruturados<text:line-break/>- tratamento de erros<text:line-break/>- respostas padronizadas nas APIs<text:line-break/><text:line-break/>Criar padrão de resposta:<text:line-break/><text:line-break/>Sucesso:<text:line-break/><text:line-break/>{<text:line-break/> <text:s/>"success": true,<text:line-break/> <text:s/>"data": {},<text:line-break/> <text:s/>"message": "Operação realizada com sucesso."<text:line-break/>}<text:line-break/><text:line-break/>Erro:<text:line-break/><text:line-break/>{<text:line-break/> <text:s/>"success": false,<text:line-break/> <text:s/>"errors": {},<text:line-break/> <text:s/>"message": "Erro ao processar solicitação."<text:line-break/>}<text:line-break/><text:line-break/>====================================================================<text:line-break/>35. ENTREGÁVEIS ESPERADOS<text:line-break/>====================================================================<text:line-break/><text:line-break/>Gere o projeto completo com:<text:line-break/><text:line-break/>- estrutura Django<text:line-break/>- apps modulares<text:line-break/>- models<text:line-break/>- serializers<text:line-break/>- viewsets<text:line-break/>- urls<text:line-break/>- services<text:line-break/>- permissions<text:line-break/>- admin customizado<text:line-break/>- migrations<text:line-break/>- testes<text:line-break/>- Docker<text:line-break/>- README<text:line-break/>- .env.example<text:line-break/>- seed inicial<text:line-break/>- templates básicos dos portais<text:line-break/>- endpoints REST<text:line-break/>- WebSocket básico<text:line-break/>- Celery configurado<text:line-break/>- Redis configurado<text:line-break/>- PostgreSQL/PostGIS configurado<text:line-break/><text:soft-page-break/>- pgvector preparado para IA<text:line-break/>- IA Assistant Service funcional em modo MVP<text:line-break/><text:line-break/>====================================================================<text:line-break/>36. CRITÉRIOS DE ACEITE<text:line-break/>====================================================================<text:line-break/><text:line-break/>O sistema será considerado funcional quando for possível:<text:line-break/><text:line-break/>1. Subir o ambiente com Docker Compose.<text:line-break/>2. Criar um usuário cliente PF.<text:line-break/>3. Criar um usuário cliente PJ.<text:line-break/>4. Criar um motorista.<text:line-break/>5. Cadastrar um veículo baú.<text:line-break/>6. Cadastrar um veículo graneleiro.<text:line-break/>7. Solicitar frete de geladeira.<text:line-break/>8. O sistema recomendar veículo baú/coberto.<text:line-break/>9. Solicitar frete de soja.<text:line-break/>10. O sistema recomendar veículo graneleiro.<text:line-break/>11. Calcular preço estimado.<text:line-break/>12. Encontrar motorista compatível.<text:line-break/>13. Motorista aceitar o frete.<text:line-break/>14. Motorista enviar localização.<text:line-break/>15. Cliente acompanhar status e localização.<text:line-break/>16. Sistema calcular ETA básico.<text:line-break/>17. Motorista registrar coleta.<text:line-break/>18. Motorista registrar entrega.<text:line-break/>19. Sistema gerar eventos de rastreabilidade.<text:line-break/>20. Cliente abrir o chat IA.<text:line-break/>21. Cliente perguntar sobre o pedido.<text:line-break/>22. IA responder status da entrega.<text:line-break/>23. Cliente perguntar qual veículo usar para soja.<text:line-break/>24. IA responder com base nas regras.<text:line-break/>25. Cliente abrir ocorrência pelo chat IA.<text:line-break/>26. Admin visualizar usuários, veículos, fretes, documentos e ocorrências.<text:line-break/>27. Testes principais passarem.<text:line-break/><text:line-break/>====================================================================<text:line-break/>37. IMPORTANTE<text:line-break/>====================================================================<text:line-break/><text:line-break/>Não desenvolva apenas protótipos soltos.<text:line-break/><text:line-break/>Crie uma base real, escalável e organizada, pronta para evoluir para produção.<text:line-break/><text:line-break/>Priorize primeiro o MVP funcional, mas deixe a arquitetura preparada para:<text:line-break/><text:line-break/>- portal web completo<text:line-break/>- aplicativo mobile<text:line-break/>- rastreamento em tempo real<text:line-break/>- IA embutida<text:line-break/>- integração com mapas<text:line-break/>- integração com pagamentos<text:line-break/>- integração fiscal<text:line-break/>- escala em cloud<text:line-break/>- segurança e LGPD<text:line-break/><text:line-break/>Comece criando a estrutura do projeto Django, Docker Compose e os apps principais.<text:line-break/>Depois implemente os models centrais, migrations, serializers, services e endpoints.<text:line-break/>Em seguida, implemente os fluxos principais de frete, tracking, matching, ETA e IA.<text:line-break/>Finalize com README, seed inicial e testes.</text:p>
      <text:p text:style-name="Horizontal_20_Line"><text:soft-page-break/></text:p>
      <text:h text:style-name="Heading_20_1" text:outline-level="1">Sugestão de Uso no Antigravity</text:h>
      <text:p text:style-name="Text_20_body">Você pode colar esse prompt em partes, se preferir:</text:p>
      <text:list text:style-name="L16">
        <text:list-item>
          <text:p text:style-name="P28"><text:span text:style-name="T1">Parte 1:</text:span> Criar estrutura Django + Docker + apps.</text:p>
        </text:list-item>
        <text:list-item>
          <text:p text:style-name="P28"><text:span text:style-name="T1">Parte 2:</text:span> Criar models e migrations.</text:p>
        </text:list-item>
        <text:list-item>
          <text:p text:style-name="P28"><text:span text:style-name="T1">Parte 3:</text:span> Criar APIs REST.</text:p>
        </text:list-item>
        <text:list-item>
          <text:p text:style-name="P28"><text:span text:style-name="T1">Parte 4:</text:span> Criar regras de negócio: frete, preço, matching, rota e ETA.</text:p>
        </text:list-item>
        <text:list-item>
          <text:p text:style-name="P28"><text:span text:style-name="T1">Parte 5:</text:span> Criar tracking com WebSocket.</text:p>
        </text:list-item>
        <text:list-item>
          <text:p text:style-name="P28"><text:span text:style-name="T1">Parte 6:</text:span> Criar IA embutida com RAG.</text:p>
        </text:list-item>
        <text:list-item>
          <text:p text:style-name="P28"><text:span text:style-name="T1">Parte 7:</text:span> Criar templates dos portais.</text:p>
        </text:list-item>
        <text:list-item>
          <text:p text:style-name="P28"><text:span text:style-name="T1">Parte 8:</text:span> Criar testes, seed e README.</text:p>
        </text:list-item>
      </text:list>
      <text:p text:style-name="Horizontal_20_Line"/>
      <text:h text:style-name="P29" text:outline-level="1">Prompt Curto para Continuação no Antigravity</text:h>
      <text:p text:style-name="Text_20_body">Depois que ele começar o projeto, você pode usar este comando para manter o padrão:</text:p>
      <text:p text:style-name="P9">Continue o desenvolvimento seguindo rigorosamente a arquitetura definida. <text:line-break/>Não remova funcionalidades existentes. <text:line-break/>Mantenha o projeto modular, seguro, testável e preparado para produção. <text:line-break/>Implemente a próxima etapa com código real, migrations, serializers, endpoints, services, permissões, testes e documentação no README.</text:p>
      <text:p text:style-name="Text_20_body"/>
      <text:p text:style-name="P30">Fazer em 5 Etapas</text:p>
      <text:p text:style-name="P31">Favor criar o em 5 módulos (prompts) do projeto do sistema para o Antigravity</text:p>
      <text:p text:style-name="P31"/>
      <text:h text:style-name="Heading_20_1" text:outline-level="1"><text:span text:style-name="T6">5 Módulos de Prompts para Desenvolver o Sistema no Antigravity</text:span> </text:h>
      <text:p text:style-name="Text_20_body">Roberto, abaixo está o projeto dividido em <text:span text:style-name="T1">5 módulos/prompts sequenciais</text:span> para você usar no <text:span text:style-name="T1">Antigravity</text:span>.</text:p>
      <text:p text:style-name="Text_20_body">A ideia é você executar <text:span text:style-name="T1">um prompt por vez</text:span>, validando cada etapa antes de seguir para a próxima.</text:p>
      <text:p text:style-name="Horizontal_20_Line"/>
      <text:h text:style-name="Heading_20_1" text:outline-level="1">Módulo 1 — Estrutura Base, <text:span text:style-name="T7">SQLite, </text:span>Django, Usuários, Perfis e Segurança</text:h>
      <text:p text:style-name="Text_20_body">Use este primeiro prompt para criar a base do projeto.</text:p>
      <text:p text:style-name="P9"><text:soft-page-break/>Você é um desenvolvedor full stack sênior especialista em Django, Django REST Framework, PostgreSQL/PostGIS, Redis, Celery, Django Channels, <text:span text:style-name="T7">SQLite, </text:span>APIs REST, segurança e arquitetura escalável.<text:line-break/><text:line-break/>Crie a estrutura inicial de um sistema chamado:<text:line-break/><text:line-break/>Uber da Logística — Sistema Inteligente de Logística<text:line-break/><text:line-break/>O sistema será uma plataforma tipo Uber, porém para transporte de cargas, com Portal Web, APIs para Aplicativo Mobile, Portal Administrativo, Portal da Transportadora, Aplicativo do Cliente, Aplicativo do Motorista e IA embutida.<text:line-break/><text:line-break/>Neste primeiro módulo, implemente a base do projeto em Django.<text:line-break/><text:line-break/>============================================================<text:line-break/>1. STACK OBRIGATÓRIA<text:line-break/>============================================================<text:line-break/><text:line-break/>Utilizar:<text:line-break/><text:line-break/>- Python<text:line-break/>- Django<text:line-break/>- Django REST Framework<text:line-break/>- PostgreSQL<text:line-break/>- PostGIS<text:line-break/>- Redis<text:line-break/>- Celery<text:line-break/>- Django Channels<text:line-break/>- JWT<text:line-break/>- <text:span text:style-name="T7">SQLite</text:span><text:line-break/>- Django Admin customizado<text:line-break/>- Arquitetura modular por Django Apps<text:line-break/><text:line-break/>Preparar o projeto para futuramente rodar em Kubernetes e cloud.<text:line-break/><text:line-break/>============================================================<text:line-break/>2. APPS DJANGO A SEREM CRIADOS<text:line-break/>============================================================<text:line-break/><text:line-break/>Crie os seguintes apps:<text:line-break/><text:line-break/>- core<text:line-break/>- accounts<text:line-break/>- companies<text:line-break/>- drivers<text:line-break/>- vehicles<text:line-break/>- cargo<text:line-break/>- freight<text:line-break/>- pricing<text:line-break/>- matching<text:line-break/>- routing<text:line-break/>- tracking<text:line-break/>- eta<text:line-break/>- payments<text:line-break/>- documents<text:line-break/>- notifications<text:line-break/>- support<text:line-break/>- ai_assistant<text:line-break/>- audit<text:line-break/><text:line-break/>Cada app deve conter estrutura organizada:<text:line-break/><text:line-break/>- models.py<text:line-break/>- serializers.py<text:line-break/><text:soft-page-break/>- views.py ou viewsets.py<text:line-break/>- urls.py<text:line-break/>- services.py<text:line-break/>- permissions.py quando necessário<text:line-break/>- admin.py<text:line-break/>- tests.py<text:line-break/><text:line-break/>============================================================<text:line-break/>3. CONFIGURAÇÃO DO PROJETO<text:line-break/>============================================================<text:line-break/><text:line-break/>Crie:<text:line-break/><text:line-break/>- <text:span text:style-name="T7">SQLite</text:span><text:line-break/>- requirements.txt ou pyproject.toml<text:line-break/>- .env.example<text:line-break/>- README.md<text:line-break/>- manage.py<text:line-break/>- settings separados por ambiente, se possível:<text:line-break/> <text:s/>- base.py<text:line-break/> <text:s/>- development.py<text:line-break/> <text:s/>- production.py<text:line-break/>- urls.py principal<text:line-break/>- ASGI configurado para WebSocket<text:line-break/>- WSGI configurado<text:line-break/>- Celery configurado<text:line-break/>- Redis configurado<text:line-break/>- PostgreSQL/PostGIS configurado<text:line-break/><text:line-break/>No <text:span text:style-name="T7">sQLite</text:span> local, incluir:<text:line-break/><text:line-break/>- web Django<text:line-break/>- db PostgreSQL com PostGIS<text:line-break/>- redis<text:line-break/>- celery_worker<text:line-break/>- celery_beat<text:line-break/>- daphne ou uvicorn para Channels<text:line-break/>- opcional: pgadmin<text:line-break/>- opcional: mailhog<text:line-break/><text:line-break/>============================================================<text:line-break/>4. VARIÁVEIS DE AMBIENTE<text:line-break/>============================================================<text:line-break/><text:line-break/>Criar .env.example com:<text:line-break/><text:line-break/>- DEBUG<text:line-break/>- SECRET_KEY<text:line-break/>- DATABASE_URL<text:line-break/>- REDIS_URL<text:line-break/>- ALLOWED_HOSTS<text:line-break/>- CORS_ALLOWED_ORIGINS<text:line-break/>- JWT_SECRET<text:line-break/>- MAPS_PROVIDER<text:line-break/>- MAPS_API_KEY<text:line-break/>- PAYMENT_PROVIDER<text:line-break/>- PAYMENT_API_KEY<text:line-break/>- LLM_PROVIDER<text:line-break/>- LLM_API_KEY<text:line-break/>- EMAIL_HOST<text:line-break/>- EMAIL_PORT<text:line-break/>- EMAIL_USER<text:line-break/>- EMAIL_PASSWORD<text:line-break/>- DEFAULT_FROM_EMAIL<text:line-break/><text:soft-page-break/><text:line-break/>============================================================<text:line-break/>5. MODELO DE USUÁRIO CUSTOMIZADO<text:line-break/>============================================================<text:line-break/><text:line-break/>Criar um modelo User customizado no app accounts.<text:line-break/><text:line-break/>Campos obrigatórios:<text:line-break/><text:line-break/>- id<text:line-break/>- name<text:line-break/>- email<text:line-break/>- phone<text:line-break/>- document_type:<text:line-break/> <text:s/>- CPF<text:line-break/> <text:s/>- CNPJ<text:line-break/>- document_number<text:line-break/>- user_type:<text:line-break/> <text:s/>- PF<text:line-break/> <text:s/>- PJ<text:line-break/> <text:s/>- DRIVER<text:line-break/> <text:s/>- CARRIER<text:line-break/> <text:s/>- ADMIN<text:line-break/> <text:s/>- SUPPORT<text:line-break/> <text:s/>- FINANCE<text:line-break/> <text:s/>- LOGISTICS<text:line-break/>- is_verified<text:line-break/>- is_active<text:line-break/>- is_staff<text:line-break/>- is_superuser<text:line-break/>- created_at<text:line-break/>- updated_at<text:line-break/><text:line-break/>O login principal deve ser por e-mail.<text:line-break/><text:line-break/>Implementar autenticação com JWT.<text:line-break/><text:line-break/>Endpoints obrigatórios:<text:line-break/><text:line-break/>- POST /api/auth/register/<text:line-break/>- POST /api/auth/login/<text:line-break/>- POST /api/auth/refresh/<text:line-break/>- POST /api/auth/logout/<text:line-break/>- GET /api/auth/me/<text:line-break/>- GET /api/users/me/<text:line-break/>- PATCH /api/users/me/<text:line-break/><text:line-break/>============================================================<text:line-break/>6. PERFIS E PERMISSÕES<text:line-break/>============================================================<text:line-break/><text:line-break/>Implementar permissões por perfil:<text:line-break/><text:line-break/>- Cliente PF só vê seus próprios dados e pedidos<text:line-break/>- Cliente PJ só vê seus próprios dados e pedidos<text:line-break/>- Motorista só vê seus fretes, veículo, documentos e ganhos<text:line-break/>- Transportadora vê motoristas, veículos e fretes vinculados a ela<text:line-break/>- Administrador vê toda operação<text:line-break/>- Suporte vê ocorrências e conversas<text:line-break/>- Financeiro vê pagamentos e repasses<text:line-break/>- Logística vê fretes, rastreamento e operação<text:line-break/><text:line-break/>Criar permissions.py com classes reutilizáveis.<text:line-break/><text:line-break/><text:soft-page-break/>============================================================<text:line-break/>7. EMPRESAS E TRANSPORTADORAS<text:line-break/>============================================================<text:line-break/><text:line-break/>No app companies, criar modelo CompanyProfile para Pessoa Jurídica:<text:line-break/><text:line-break/>Campos:<text:line-break/><text:line-break/>- user<text:line-break/>- legal_name<text:line-break/>- trade_name<text:line-break/>- cnpj<text:line-break/>- state_registration<text:line-break/>- responsible_name<text:line-break/>- responsible_phone<text:line-break/>- billing_address<text:line-break/>- operational_address<text:line-break/>- status<text:line-break/>- created_at<text:line-break/>- updated_at<text:line-break/><text:line-break/>Criar modelo CarrierCompany:<text:line-break/><text:line-break/>- owner_user<text:line-break/>- legal_name<text:line-break/>- trade_name<text:line-break/>- cnpj<text:line-break/>- state_registration<text:line-break/>- responsible_name<text:line-break/>- responsible_phone<text:line-break/>- billing_address<text:line-break/>- operational_address<text:line-break/>- status:<text:line-break/> <text:s/>- pending<text:line-break/> <text:s/>- approved<text:line-break/> <text:s/>- rejected<text:line-break/> <text:s/>- suspended<text:line-break/>- created_at<text:line-break/>- updated_at<text:line-break/><text:line-break/>Endpoints:<text:line-break/><text:line-break/>- POST /api/companies/<text:line-break/>- GET /api/companies/me/<text:line-break/>- PATCH /api/companies/{id}/<text:line-break/>- POST /api/carriers/<text:line-break/>- GET /api/carriers/me/<text:line-break/>- PATCH /api/carriers/{id}/<text:line-break/><text:line-break/>============================================================<text:line-break/>8. AUDITORIA<text:line-break/>============================================================<text:line-break/><text:line-break/>No app audit, criar modelo AuditLog:<text:line-break/><text:line-break/>Campos:<text:line-break/><text:line-break/>- user<text:line-break/>- action<text:line-break/>- entity_type<text:line-break/>- entity_id<text:line-break/>- ip_address<text:line-break/>- user_agent<text:line-break/>- metadata<text:line-break/><text:soft-page-break/>- created_at<text:line-break/><text:line-break/>Auditar:<text:line-break/><text:line-break/>- login<text:line-break/>- cadastro<text:line-break/>- alteração cadastral<text:line-break/>- criação de empresa<text:line-break/>- criação de transportadora<text:line-break/>- ações administrativas<text:line-break/><text:line-break/>============================================================<text:line-break/>9. PADRÃO DE RESPOSTA DAS APIs<text:line-break/>============================================================<text:line-break/><text:line-break/>Todas as APIs devem seguir este padrão.<text:line-break/><text:line-break/>Sucesso:<text:line-break/><text:line-break/>{<text:line-break/> <text:s/>"success": true,<text:line-break/> <text:s/>"data": {},<text:line-break/> <text:s/>"message": "Operação realizada com sucesso."<text:line-break/>}<text:line-break/><text:line-break/>Erro:<text:line-break/><text:line-break/>{<text:line-break/> <text:s/>"success": false,<text:line-break/> <text:s/>"errors": {},<text:line-break/> <text:s/>"message": "Erro ao processar solicitação."<text:line-break/>}<text:line-break/><text:line-break/>============================================================<text:line-break/>10. SEGURANÇA<text:line-break/>============================================================<text:line-break/><text:line-break/>Implementar:<text:line-break/><text:line-break/>- JWT<text:line-break/>- CORS configurável<text:line-break/>- CSRF nas páginas web<text:line-break/>- Rate limit básico em endpoints sensíveis<text:line-break/>- Validações de CPF/CNPJ em estrutura preparada<text:line-break/>- Logs estruturados<text:line-break/>- Permissões explícitas<text:line-break/>- Não expor dados sensíveis<text:line-break/>- LGPD preparada com termos e consentimento<text:line-break/><text:line-break/>============================================================<text:line-break/>11. ADMIN DJANGO<text:line-break/>============================================================<text:line-break/><text:line-break/>Customizar Django Admin para:<text:line-break/><text:line-break/>- Usuários<text:line-break/>- Empresas<text:line-break/>- Transportadoras<text:line-break/>- AuditLog<text:line-break/><text:line-break/>Com filtros, busca e visualização organizada.<text:line-break/><text:line-break/>============================================================<text:line-break/>12. TESTES<text:line-break/><text:soft-page-break/>============================================================<text:line-break/><text:line-break/>Criar testes para:<text:line-break/><text:line-break/>- registro de usuário<text:line-break/>- login<text:line-break/>- refresh token<text:line-break/>- permissões por perfil<text:line-break/>- criação de empresa<text:line-break/>- criação de transportadora<text:line-break/>- audit log<text:line-break/><text:line-break/>============================================================<text:line-break/>13. SEED INICIAL<text:line-break/>============================================================<text:line-break/><text:line-break/>Criar comando:<text:line-break/><text:line-break/>python manage.py seed_initial_data<text:line-break/><text:line-break/>Neste módulo, o seed deve criar:<text:line-break/><text:line-break/>- usuário admin<text:line-break/>- cliente PF demo<text:line-break/>- cliente PJ demo<text:line-break/>- motorista demo<text:line-break/>- transportadora demo<text:line-break/>- operador de suporte<text:line-break/>- operador financeiro<text:line-break/>- operador logístico<text:line-break/><text:line-break/>============================================================<text:line-break/>14. README<text:line-break/>============================================================<text:line-break/><text:line-break/>Criar README com:<text:line-break/><text:line-break/>- visão geral<text:line-break/>- stack<text:line-break/>- como rodar com <text:span text:style-name="T7">DJANGO</text:span><text:line-break/>- como executar migrations<text:line-break/>- como criar superusuário<text:line-break/>- como rodar seed<text:line-break/>- como rodar testes<text:line-break/>- lista de endpoints do módulo 1<text:line-break/><text:line-break/>============================================================<text:line-break/>15. CRITÉRIOS DE ACEITE DO MÓDULO 1<text:line-break/>============================================================<text:line-break/><text:line-break/>O módulo estará concluído quando:<text:line-break/><text:line-break/>1. O ambiente subir com <text:span text:style-name="T2">SQLite</text:span>.<text:line-break/>2. O Django conectar ao PostgreSQL/PostGIS.<text:line-break/>3. Redis estiver funcionando.<text:line-break/>4. Celery estiver configurado.<text:line-break/>5. Channels estiver configurado.<text:line-break/>6. JWT estiver funcionando.<text:line-break/>7. Usuários puderem se cadastrar e logar.<text:line-break/>8. Perfis básicos estiverem implementados.<text:line-break/>9. Empresas e transportadoras puderem ser cadastradas.<text:line-break/>10. Admin Django listar usuários, empresas, transportadoras e auditoria.<text:line-break/>11. Seed inicial funcionar.<text:line-break/>12. Testes principais passarem.<text:line-break/><text:soft-page-break/><text:line-break/>Comece implementando este módulo com código real, migrations, serializers, views, urls, services, permissions, tests e README.</text:p>
      <text:p text:style-name="Horizontal_20_Line"/>
      <text:h text:style-name="Heading_20_1" text:outline-level="1">Módulo 2 — Cargas, Veículos, Documentos, Motoristas e Transportadoras</text:h>
      <text:p text:style-name="Text_20_body">Use este segundo prompt após concluir a base.</text:p>
      <text:p text:style-name="P9">Continue o desenvolvimento do projeto Uber da Logística usando Django.<text:line-break/><text:line-break/>Não remova funcionalidades existentes do Módulo 1.<text:line-break/><text:line-break/>Neste Módulo 2, implemente:<text:line-break/><text:line-break/>- cadastro completo de motoristas<text:line-break/>- cadastro completo de veículos<text:line-break/>- tipos de carga<text:line-break/>- regras de compatibilidade entre carga e veículo<text:line-break/>- upload e validação de documentos<text:line-break/>- estrutura para transportadoras gerenciarem motoristas e veículos<text:line-break/><text:line-break/>============================================================<text:line-break/>1. MOTORISTAS<text:line-break/>============================================================<text:line-break/><text:line-break/>No app drivers, criar modelo DriverProfile.<text:line-break/><text:line-break/>Campos:<text:line-break/><text:line-break/>- user<text:line-break/>- carrier_company, opcional<text:line-break/>- cnh_number<text:line-break/>- cnh_category<text:line-break/>- cnh_expiration_date<text:line-break/>- rating<text:line-break/>- status:<text:line-break/> <text:s/>- pending<text:line-break/> <text:s/>- approved<text:line-break/> <text:s/>- rejected<text:line-break/> <text:s/>- suspended<text:line-break/>- current_latitude<text:line-break/>- current_longitude<text:line-break/>- is_online<text:line-break/>- accepts_equipment<text:line-break/>- accepts_dry_grains<text:line-break/>- pix_key<text:line-break/>- bank_data<text:line-break/>- created_at<text:line-break/>- updated_at<text:line-break/><text:line-break/>Funcionalidades:<text:line-break/><text:line-break/>- motorista cria perfil<text:line-break/>- motorista atualiza dados<text:line-break/>- motorista fica online<text:line-break/>- motorista fica offline<text:line-break/>- administrador aprova/rejeita motorista<text:line-break/>- transportadora pode vincular motoristas<text:line-break/><text:soft-page-break/>- motorista consulta seu perfil<text:line-break/><text:line-break/>Endpoints:<text:line-break/><text:line-break/>- POST /api/drivers/<text:line-break/>- GET /api/drivers/me/<text:line-break/>- PATCH /api/drivers/me/<text:line-break/>- POST /api/drivers/go-online/<text:line-break/>- POST /api/drivers/go-offline/<text:line-break/>- PATCH /api/admin/drivers/{id}/review/<text:line-break/><text:line-break/>============================================================<text:line-break/>2. VEÍCULOS<text:line-break/>============================================================<text:line-break/><text:line-break/>No app vehicles, criar modelo Vehicle.<text:line-break/><text:line-break/>Campos:<text:line-break/><text:line-break/>- owner_driver<text:line-break/>- carrier_company, opcional<text:line-break/>- plate<text:line-break/>- renavam<text:line-break/>- brand<text:line-break/>- model<text:line-break/>- year<text:line-break/>- vehicle_type<text:line-break/>- body_type<text:line-break/>- max_weight_kg<text:line-break/>- max_volume_m3<text:line-break/>- allowed_cargo_types<text:line-break/>- has_insurance<text:line-break/>- insurance_policy_number<text:line-break/>- status:<text:line-break/> <text:s/>- pending<text:line-break/> <text:s/>- approved<text:line-break/> <text:s/>- rejected<text:line-break/> <text:s/>- suspended<text:line-break/>- current_latitude<text:line-break/>- current_longitude<text:line-break/>- created_at<text:line-break/>- updated_at<text:line-break/><text:line-break/>Tipos de veículos para equipamentos, móveis e peças:<text:line-break/><text:line-break/>- SMALL_UTILITY<text:line-break/>- PICKUP<text:line-break/>- FIORINO<text:line-break/>- VAN<text:line-break/>- LIGHT_TRUCK<text:line-break/>- MEDIUM_TRUCK<text:line-break/>- TRUCK<text:line-break/>- BOX_TRUCK<text:line-break/>- SIDER_TRUCK<text:line-break/><text:line-break/>Tipos de veículos para grãos secos:<text:line-break/><text:line-break/>- GRAIN_TRUCK<text:line-break/>- GRAIN_TRAILER<text:line-break/>- GRAIN_BITREM<text:line-break/>- GRAIN_RODOTREM<text:line-break/>- GRAIN_DUMP_TRUCK<text:line-break/><text:line-break/>Tipos de carroceria:<text:line-break/><text:soft-page-break/><text:line-break/>- BOX<text:line-break/>- OPEN<text:line-break/>- SIDER<text:line-break/>- GRAIN<text:line-break/>- DUMP<text:line-break/>- PLATFORM<text:line-break/>- REFRIGERATED<text:line-break/><text:line-break/>Endpoints:<text:line-break/><text:line-break/>- POST /api/vehicles/<text:line-break/>- GET /api/vehicles/<text:line-break/>- GET /api/vehicles/{id}/<text:line-break/>- PATCH /api/vehicles/{id}/<text:line-break/>- POST /api/vehicles/{id}/submit-review/<text:line-break/>- PATCH /api/admin/vehicles/{id}/review/<text:line-break/><text:line-break/>Regras:<text:line-break/><text:line-break/>- Apenas dono do veículo, transportadora vinculada ou admin pode visualizar/editar.<text:line-break/>- Admin aprova ou rejeita veículo.<text:line-break/>- Veículos não aprovados não participam do matching.<text:line-break/><text:line-break/>============================================================<text:line-break/>3. TIPOS DE CARGA<text:line-break/>============================================================<text:line-break/><text:line-break/>No app cargo, criar modelos CargoType e CargoRule.<text:line-break/><text:line-break/>Categorias principais:<text:line-break/><text:line-break/>- EQUIPMENTS<text:line-break/>- DRY_GRAINS<text:line-break/><text:line-break/>Subtipos para equipamentos:<text:line-break/><text:line-break/>- fogão<text:line-break/>- geladeira<text:line-break/>- motor<text:line-break/>- peças<text:line-break/>- ventilador<text:line-break/>- móveis<text:line-break/>- máquinas pequenas<text:line-break/>- outros<text:line-break/><text:line-break/>Subtipos para grãos secos:<text:line-break/><text:line-break/>- milho<text:line-break/>- soja<text:line-break/>- sorgo<text:line-break/>- feijão seco<text:line-break/>- arroz em casca<text:line-break/>- outros<text:line-break/><text:line-break/>CargoType:<text:line-break/><text:line-break/>- name<text:line-break/>- category<text:line-break/>- slug<text:line-break/>- description<text:line-break/>- is_active<text:line-break/>- created_at<text:line-break/><text:soft-page-break/>- updated_at<text:line-break/><text:line-break/>CargoRule:<text:line-break/><text:line-break/>- cargo_type<text:line-break/>- recommended_vehicle_types<text:line-break/>- required_body_types<text:line-break/>- requires_covered_vehicle<text:line-break/>- requires_grain_body<text:line-break/>- requires_helper_recommended<text:line-break/>- requires_insurance_recommended<text:line-break/>- requires_lashing<text:line-break/>- requires_tarp<text:line-break/>- requires_invoice<text:line-break/>- requires_weighing<text:line-break/>- handling_instructions<text:line-break/>- created_at<text:line-break/>- updated_at<text:line-break/><text:line-break/>============================================================<text:line-break/>4. REGRAS DE COMPATIBILIDADE<text:line-break/>============================================================<text:line-break/><text:line-break/>Implementar CargoCompatibilityService.<text:line-break/><text:line-break/>Regras iniciais:<text:line-break/><text:line-break/>1. Geladeira:<text:line-break/> <text:s text:c="2"/>- recomendar FIORINO, PICKUP coberta, BOX_TRUCK<text:line-break/> <text:s text:c="2"/>- exigir veículo coberto ou baú<text:line-break/> <text:s text:c="2"/>- recomendar transporte em pé<text:line-break/> <text:s text:c="2"/>- pode exigir ajudante<text:line-break/><text:line-break/>2. Fogão:<text:line-break/> <text:s text:c="2"/>- recomendar FIORINO, PICKUP coberta, BOX_TRUCK<text:line-break/> <text:s text:c="2"/>- exigir proteção contra chuva<text:line-break/><text:line-break/>3. Motor:<text:line-break/> <text:s text:c="2"/>- recomendar PICKUP, LIGHT_TRUCK, BOX_TRUCK<text:line-break/> <text:s text:c="2"/>- exigir amarração<text:line-break/> <text:s text:c="2"/>- alertar sobre vazamento<text:line-break/><text:line-break/>4. Móveis:<text:line-break/> <text:s text:c="2"/>- recomendar BOX_TRUCK, SIDER_TRUCK ou caminhão adequado<text:line-break/> <text:s text:c="2"/>- recomendar ajudante<text:line-break/> <text:s text:c="2"/>- exigir proteção contra chuva<text:line-break/><text:line-break/>5. Peças:<text:line-break/> <text:s text:c="2"/>- veículo depende do peso e volume<text:line-break/> <text:s text:c="2"/>- pode exigir embalagem<text:line-break/><text:line-break/>6. Milho, soja, sorgo, feijão seco e arroz em casca:<text:line-break/> <text:s text:c="2"/>- recomendar GRAIN_TRUCK, GRAIN_TRAILER, GRAIN_BITREM, GRAIN_RODOTREM ou GRAIN_DUMP_TRUCK<text:line-break/> <text:s text:c="2"/>- exigir carroceria GRAIN ou DUMP apropriada<text:line-break/> <text:s text:c="2"/>- exigir proteção contra umidade<text:line-break/> <text:s text:c="2"/>- recomendar lona<text:line-break/> <text:s text:c="2"/>- pode exigir nota fiscal, romaneio e pesagem<text:line-break/> <text:s text:c="2"/>- não recomendar baú comum como padrão<text:line-break/><text:line-break/>Criar endpoint:<text:line-break/><text:line-break/>POST /api/cargo/recommend-vehicle/<text:line-break/><text:line-break/><text:soft-page-break/>Payload:<text:line-break/><text:line-break/>- cargo_type<text:line-break/>- weight_kg<text:line-break/>- volume_m3<text:line-break/>- quantity<text:line-break/>- is_fragile<text:line-break/>- origin<text:line-break/>- destination<text:line-break/><text:line-break/>Resposta:<text:line-break/><text:line-break/>- recommended_vehicle_types<text:line-break/>- required_body_types<text:line-break/>- warnings<text:line-break/>- handling_instructions<text:line-break/>- requires_helper<text:line-break/>- requires_insurance<text:line-break/>- requires_invoice<text:line-break/>- requires_weighing<text:line-break/><text:line-break/>============================================================<text:line-break/>5. DOCUMENTOS<text:line-break/>============================================================<text:line-break/><text:line-break/>No app documents, criar modelo Document.<text:line-break/><text:line-break/>Campos:<text:line-break/><text:line-break/>- owner_user<text:line-break/>- freight_order, opcional<text:line-break/>- vehicle, opcional<text:line-break/>- driver_profile, opcional<text:line-break/>- carrier_company, opcional<text:line-break/>- document_type<text:line-break/>- file<text:line-break/>- status:<text:line-break/> <text:s/>- pending<text:line-break/> <text:s/>- approved<text:line-break/> <text:s/>- rejected<text:line-break/>- reviewed_by<text:line-break/>- reviewed_at<text:line-break/>- rejection_reason<text:line-break/>- created_at<text:line-break/>- updated_at<text:line-break/><text:line-break/>Tipos de documentos:<text:line-break/><text:line-break/>Motorista:<text:line-break/><text:line-break/>- CNH<text:line-break/>- comprovante de endereço<text:line-break/>- foto do motorista<text:line-break/>- dados bancários<text:line-break/><text:line-break/>Veículo:<text:line-break/><text:line-break/>- documento do veículo<text:line-break/>- seguro<text:line-break/>- fotos do veículo<text:line-break/>- laudo<text:line-break/>- autorização especial, se aplicável<text:line-break/><text:line-break/>Transportadora:<text:line-break/><text:soft-page-break/><text:line-break/>- contrato social<text:line-break/>- CNPJ<text:line-break/>- inscrição estadual<text:line-break/>- comprovante de endereço<text:line-break/><text:line-break/>Carga:<text:line-break/><text:line-break/>- foto da coleta<text:line-break/>- foto da entrega<text:line-break/>- assinatura digital<text:line-break/>- nota fiscal<text:line-break/>- romaneio<text:line-break/>- comprovante de pesagem inicial<text:line-break/>- comprovante de pesagem final<text:line-break/><text:line-break/>Endpoints:<text:line-break/><text:line-break/>- POST /api/documents/<text:line-break/>- GET /api/documents/<text:line-break/>- GET /api/documents/{id}/<text:line-break/>- PATCH /api/documents/{id}/<text:line-break/>- PATCH /api/documents/{id}/review/<text:line-break/><text:line-break/>Regras:<text:line-break/><text:line-break/>- Arquivos devem ser protegidos.<text:line-break/>- Usuário só pode ver seus documentos.<text:line-break/>- Admin e suporte autorizado podem revisar.<text:line-break/>- Registrar auditoria na aprovação/rejeição.<text:line-break/><text:line-break/>============================================================<text:line-break/>6. PORTAL ADMINISTRATIVO<text:line-break/>============================================================<text:line-break/><text:line-break/>Customizar Django Admin para:<text:line-break/><text:line-break/>- DriverProfile<text:line-break/>- Vehicle<text:line-break/>- CargoType<text:line-break/>- CargoRule<text:line-break/>- Document<text:line-break/><text:line-break/>Com filtros por status, tipo, categoria, data e usuário.<text:line-break/><text:line-break/>============================================================<text:line-break/>7. SEED INICIAL<text:line-break/>============================================================<text:line-break/><text:line-break/>Atualizar comando:<text:line-break/><text:line-break/>python manage.py seed_initial_data<text:line-break/><text:line-break/>Adicionar:<text:line-break/><text:line-break/>- tipos de carga<text:line-break/>- regras de compatibilidade<text:line-break/>- veículo baú demo<text:line-break/>- veículo graneleiro demo<text:line-break/>- motorista com veículo baú<text:line-break/>- motorista com veículo graneleiro<text:line-break/>- documentos demo<text:line-break/><text:line-break/>============================================================<text:line-break/><text:soft-page-break/>8. TESTES<text:line-break/>============================================================<text:line-break/><text:line-break/>Criar testes para:<text:line-break/><text:line-break/>- criação de motorista<text:line-break/>- motorista online/offline<text:line-break/>- criação de veículo<text:line-break/>- aprovação/rejeição de veículo<text:line-break/>- criação de tipos de carga<text:line-break/>- recomendação de veículo para geladeira<text:line-break/>- recomendação de veículo para soja<text:line-break/>- upload de documento<text:line-break/>- revisão de documento<text:line-break/>- permissões de documento<text:line-break/><text:line-break/>============================================================<text:line-break/>9. CRITÉRIOS DE ACEITE DO MÓDULO 2<text:line-break/>============================================================<text:line-break/><text:line-break/>O módulo estará pronto quando:<text:line-break/><text:line-break/>1. Motorista puder criar perfil.<text:line-break/>2. Motorista puder ficar online/offline.<text:line-break/>3. Veículo puder ser cadastrado.<text:line-break/>4. Admin puder aprovar/rejeitar veículo.<text:line-break/>5. Cargas e regras forem cadastradas no seed.<text:line-break/>6. Geladeira recomendar veículo baú/coberto.<text:line-break/>7. Soja recomendar veículo graneleiro.<text:line-break/>8. Documentos puderem ser enviados e revisados.<text:line-break/>9. Transportadora puder vincular motoristas e veículos.<text:line-break/>10. Testes principais passarem.<text:line-break/><text:line-break/>Implemente este módulo com código real, migrations, serializers, services, permissions, endpoints, admin e testes.</text:p>
      <text:p text:style-name="Horizontal_20_Line"/>
      <text:h text:style-name="Heading_20_1" text:outline-level="1">Módulo 3 — Fretes, Precificação, Matching, Rotas, ETA e Pagamentos</text:h>
      <text:p text:style-name="Text_20_body">Use este prompt para criar o coração operacional do sistema.</text:p>
      <text:p text:style-name="P9">Continue o desenvolvimento do projeto Uber da Logística usando Django.<text:line-break/><text:line-break/>Não remova funcionalidades dos módulos anteriores.<text:line-break/><text:line-break/>Neste Módulo 3, implemente o fluxo principal de fretes, incluindo:<text:line-break/><text:line-break/>- solicitação de frete<text:line-break/>- itens de carga<text:line-break/>- recomendação automática de veículo<text:line-break/>- cálculo de preço<text:line-break/>- matching entre cliente e motorista<text:line-break/>- roteirização<text:line-break/>- previsão de chegada ETA<text:line-break/>- pagamento simulado<text:line-break/>- avaliações básicas<text:line-break/><text:line-break/>============================================================<text:line-break/>1. MODELO FREIGHT ORDER<text:line-break/><text:soft-page-break/>============================================================<text:line-break/><text:line-break/>No app freight, criar modelo FreightOrder.<text:line-break/><text:line-break/>Campos:<text:line-break/><text:line-break/>- id<text:line-break/>- customer<text:line-break/>- driver, opcional<text:line-break/>- vehicle, opcional<text:line-break/>- carrier_company, opcional<text:line-break/>- origin_address<text:line-break/>- origin_latitude<text:line-break/>- origin_longitude<text:line-break/>- destination_address<text:line-break/>- destination_latitude<text:line-break/>- destination_longitude<text:line-break/>- cargo_category<text:line-break/>- cargo_description<text:line-break/>- estimated_weight_kg<text:line-break/>- estimated_volume_m3<text:line-break/>- required_vehicle_type<text:line-break/>- required_body_type<text:line-break/>- requires_helper<text:line-break/>- requires_insurance<text:line-break/>- scheduled_pickup_at<text:line-break/>- estimated_distance_km<text:line-break/>- estimated_duration_minutes<text:line-break/>- estimated_price<text:line-break/>- final_price<text:line-break/>- status<text:line-break/>- estimated_arrival_time<text:line-break/>- accepted_at<text:line-break/>- picked_up_at<text:line-break/>- delivered_at<text:line-break/>- cancelled_at<text:line-break/>- cancellation_reason<text:line-break/>- created_at<text:line-break/>- updated_at<text:line-break/><text:line-break/>Status:<text:line-break/><text:line-break/>- requested<text:line-break/>- waiting_driver<text:line-break/>- driver_found<text:line-break/>- driver_going_to_pickup<text:line-break/>- arrived_at_origin<text:line-break/>- cargo_collected<text:line-break/>- in_transit<text:line-break/>- temporarily_stopped<text:line-break/>- route_deviation_detected<text:line-break/>- near_destination<text:line-break/>- arrived_at_destination<text:line-break/>- delivered<text:line-break/>- completed<text:line-break/>- cancelled<text:line-break/>- disputed<text:line-break/><text:line-break/>Criar modelo CargoItem:<text:line-break/><text:line-break/>- freight_order<text:line-break/>- cargo_type<text:line-break/>- description<text:line-break/>- estimated_weight_kg<text:line-break/><text:soft-page-break/>- estimated_volume_m3<text:line-break/>- quantity<text:line-break/>- is_fragile<text:line-break/>- requires_helper<text:line-break/>- requires_insurance<text:line-break/>- requires_covered_vehicle<text:line-break/>- requires_grain_body<text:line-break/>- photos<text:line-break/>- notes<text:line-break/>- created_at<text:line-break/>- updated_at<text:line-break/><text:line-break/>============================================================<text:line-break/>2. FLUXO DO FRETE<text:line-break/>============================================================<text:line-break/><text:line-break/>Implementar FreightService.<text:line-break/><text:line-break/>Fluxo:<text:line-break/><text:line-break/>1. Cliente cria solicitação.<text:line-break/>2. Sistema identifica tipo de carga.<text:line-break/>3. Sistema recomenda veículo usando CargoCompatibilityService.<text:line-break/>4. Sistema calcula rota.<text:line-break/>5. Sistema calcula preço estimado.<text:line-break/>6. Sistema muda status para waiting_driver.<text:line-break/>7. Sistema executa matching.<text:line-break/>8. Motorista recebe solicitação.<text:line-break/>9. Motorista aceita ou recusa.<text:line-break/>10. Ao aceitar, status muda para driver_found.<text:line-break/>11. Motorista vai para origem.<text:line-break/>12. Motorista registra chegada.<text:line-break/>13. Motorista registra coleta.<text:line-break/>14. Status muda para in_transit.<text:line-break/>15. Cliente acompanha rastreio.<text:line-break/>16. Motorista registra entrega.<text:line-break/>17. Cliente confirma.<text:line-break/>18. Sistema finaliza.<text:line-break/><text:line-break/>Endpoints:<text:line-break/><text:line-break/>- POST /api/freight-orders/<text:line-break/>- GET /api/freight-orders/<text:line-break/>- GET /api/freight-orders/{id}/<text:line-break/>- PATCH /api/freight-orders/{id}/<text:line-break/>- POST /api/freight-orders/{id}/cancel/<text:line-break/>- POST /api/freight-orders/{id}/accept/<text:line-break/>- POST /api/freight-orders/{id}/reject/<text:line-break/>- POST /api/freight-orders/{id}/arrived-origin/<text:line-break/>- POST /api/freight-orders/{id}/collect/<text:line-break/>- POST /api/freight-orders/{id}/start-transit/<text:line-break/>- POST /api/freight-orders/{id}/arrived-destination/<text:line-break/>- POST /api/freight-orders/{id}/deliver/<text:line-break/>- POST /api/freight-orders/{id}/complete/<text:line-break/><text:line-break/>Permissões:<text:line-break/><text:line-break/>- Cliente vê apenas seus pedidos.<text:line-break/>- Motorista vê pedidos atribuídos ou disponíveis para ele.<text:line-break/>- Transportadora vê fretes vinculados.<text:line-break/>- Admin vê todos.<text:line-break/><text:line-break/>============================================================<text:line-break/>3. PRECIFICAÇÃO<text:line-break/><text:soft-page-break/>============================================================<text:line-break/><text:line-break/>No app pricing, criar PricingService.<text:line-break/><text:line-break/>Fórmula inicial:<text:line-break/><text:line-break/>Preço = Tarifa Base + Distância x Valor por Km + Tempo x Valor Hora + Adicionais<text:line-break/><text:line-break/>Adicionais:<text:line-break/><text:line-break/>- seguro<text:line-break/>- pedágios<text:line-break/>- ajudante<text:line-break/>- taxa de urgência<text:line-break/>- taxa de risco<text:line-break/>- tipo de carga<text:line-break/>- tipo de veículo<text:line-break/>- baixa disponibilidade de motoristas<text:line-break/>- localidade remota<text:line-break/><text:line-break/>Criar modelo PriceEstimate:<text:line-break/><text:line-break/>- customer<text:line-break/>- origin_latitude<text:line-break/>- origin_longitude<text:line-break/>- destination_latitude<text:line-break/>- destination_longitude<text:line-break/>- cargo_type<text:line-break/>- vehicle_type<text:line-break/>- distance_km<text:line-break/>- duration_minutes<text:line-break/>- base_fee<text:line-break/>- distance_fee<text:line-break/>- time_fee<text:line-break/>- helper_fee<text:line-break/>- insurance_fee<text:line-break/>- urgency_fee<text:line-break/>- risk_fee<text:line-break/>- toll_fee<text:line-break/>- availability_fee<text:line-break/>- total_estimated_price<text:line-break/>- breakdown<text:line-break/>- created_at<text:line-break/><text:line-break/>Endpoint:<text:line-break/><text:line-break/>POST /api/pricing/estimate/<text:line-break/><text:line-break/>Resposta:<text:line-break/><text:line-break/>- preço estimado<text:line-break/>- distância estimada<text:line-break/>- tempo estimado<text:line-break/>- veículo recomendado<text:line-break/>- composição do preço<text:line-break/><text:line-break/>============================================================<text:line-break/>4. MATCHING INTELIGENTE<text:line-break/>============================================================<text:line-break/><text:line-break/>No app matching, criar MatchingService.<text:line-break/><text:line-break/>Critérios:<text:line-break/><text:line-break/><text:soft-page-break/>- motorista online<text:line-break/>- veículo aprovado<text:line-break/>- motorista aprovado<text:line-break/>- localização próxima da origem<text:line-break/>- veículo compatível<text:line-break/>- capacidade em kg<text:line-break/>- capacidade em m3<text:line-break/>- tipo de carroceria compatível<text:line-break/>- documentos válidos<text:line-break/>- avaliação<text:line-break/>- taxa de cancelamento<text:line-break/>- distância até coleta<text:line-break/>- disponibilidade<text:line-break/>- experiência com tipo de carga<text:line-break/><text:line-break/>Score:<text:line-break/><text:line-break/>Score = Compatibilidade + Proximidade + Avaliação + Pontualidade - Risco<text:line-break/><text:line-break/>Criar modelo MatchCandidate:<text:line-break/><text:line-break/>- freight_order<text:line-break/>- driver<text:line-break/>- vehicle<text:line-break/>- distance_to_pickup_km<text:line-break/>- compatibility_score<text:line-break/>- proximity_score<text:line-break/>- rating_score<text:line-break/>- final_score<text:line-break/>- status:<text:line-break/> <text:s/>- pending<text:line-break/> <text:s/>- notified<text:line-break/> <text:s/>- accepted<text:line-break/> <text:s/>- rejected<text:line-break/> <text:s/>- expired<text:line-break/>- created_at<text:line-break/>- updated_at<text:line-break/><text:line-break/>Endpoint:<text:line-break/><text:line-break/>POST /api/freight-orders/{id}/match/<text:line-break/><text:line-break/>Retornar motoristas ranqueados.<text:line-break/><text:line-break/>============================================================<text:line-break/>5. ROTEIRIZAÇÃO<text:line-break/>============================================================<text:line-break/><text:line-break/>No app routing, criar RoutingService.<text:line-break/><text:line-break/>Abstrair integração futura com:<text:line-break/><text:line-break/>- Google Maps<text:line-break/>- Mapbox<text:line-break/>- HERE Maps<text:line-break/><text:line-break/>No MVP, se não houver chave de API, usar cálculo simulado por distância geográfica.<text:line-break/><text:line-break/>Considerar:<text:line-break/><text:line-break/>- distância<text:line-break/>- tempo<text:line-break/>- trânsito<text:line-break/><text:soft-page-break/>- pedágios<text:line-break/>- restrições para caminhões<text:line-break/>- altura máxima<text:line-break/>- peso máximo<text:line-break/>- áreas urbanas restritas<text:line-break/>- segurança<text:line-break/>- clima<text:line-break/>- pontos de parada<text:line-break/><text:line-break/>Criar modelo Route:<text:line-break/><text:line-break/>- freight_order<text:line-break/>- provider<text:line-break/>- origin_latitude<text:line-break/>- origin_longitude<text:line-break/>- destination_latitude<text:line-break/>- destination_longitude<text:line-break/>- distance_km<text:line-break/>- duration_minutes<text:line-break/>- polyline<text:line-break/>- toll_estimate<text:line-break/>- restrictions<text:line-break/>- created_at<text:line-break/>- updated_at<text:line-break/><text:line-break/>Endpoints:<text:line-break/><text:line-break/>- POST /api/routing/calculate/<text:line-break/>- GET /api/freight-orders/{id}/route/<text:line-break/><text:line-break/>============================================================<text:line-break/>6. ETA — PREVISÃO DE CHEGADA<text:line-break/>============================================================<text:line-break/><text:line-break/>No app eta, criar ETAService.<text:line-break/><text:line-break/>ETA deve considerar:<text:line-break/><text:line-break/>- distância restante<text:line-break/>- velocidade média<text:line-break/>- trânsito, quando disponível<text:line-break/>- tipo de veículo<text:line-break/>- paradas previstas<text:line-break/>- tempo de carga<text:line-break/>- tempo de descarga<text:line-break/>- clima, quando disponível<text:line-break/>- pedágios<text:line-break/>- tempo em balança para grãos<text:line-break/><text:line-break/>Fórmula inicial:<text:line-break/><text:line-break/>ETA = tempo restante de viagem + tempo de paradas + tempo de descarga<text:line-break/><text:line-break/>Criar modelo ETARecord:<text:line-break/><text:line-break/>- freight_order<text:line-break/>- estimated_arrival_time<text:line-break/>- remaining_distance_km<text:line-break/>- remaining_duration_minutes<text:line-break/>- average_speed_kmh<text:line-break/>- reason<text:line-break/>- created_at<text:line-break/><text:line-break/>Endpoint:<text:line-break/><text:soft-page-break/><text:line-break/>GET /api/freight-orders/{id}/eta/<text:line-break/><text:line-break/>Atualizar ETA quando:<text:line-break/><text:line-break/>- localização mudar<text:line-break/>- status mudar<text:line-break/>- houver parada longa<text:line-break/>- houver desvio de rota<text:line-break/><text:line-break/>============================================================<text:line-break/>7. PAGAMENTOS<text:line-break/>============================================================<text:line-break/><text:line-break/>No app payments, criar PaymentService com pagamento simulado.<text:line-break/><text:line-break/>Modelo Payment:<text:line-break/><text:line-break/>- freight_order<text:line-break/>- payer<text:line-break/>- driver<text:line-break/>- amount<text:line-break/>- platform_fee<text:line-break/>- driver_amount<text:line-break/>- status:<text:line-break/> <text:s/>- pending<text:line-break/> <text:s/>- authorized<text:line-break/> <text:s/>- paid<text:line-break/> <text:s/>- failed<text:line-break/> <text:s/>- refunded<text:line-break/> <text:s/>- cancelled<text:line-break/>- payment_method:<text:line-break/> <text:s/>- pix<text:line-break/> <text:s/>- card<text:line-break/> <text:s/>- boleto<text:line-break/> <text:s/>- invoice<text:line-break/>- transaction_id<text:line-break/>- created_at<text:line-break/>- paid_at<text:line-break/><text:line-break/>Endpoints:<text:line-break/><text:line-break/>- POST /api/payments/create/<text:line-break/>- GET /api/payments/{id}/<text:line-break/>- POST /api/payments/{id}/simulate-confirmation/<text:line-break/><text:line-break/>Ao confirmar pagamento:<text:line-break/><text:line-break/>- marcar como paid<text:line-break/>- registrar auditoria<text:line-break/>- notificar cliente e motorista<text:line-break/><text:line-break/>============================================================<text:line-break/>8. NOTIFICAÇÕES INTERNAS<text:line-break/>============================================================<text:line-break/><text:line-break/>No app notifications, criar modelo Notification:<text:line-break/><text:line-break/>- user<text:line-break/>- title<text:line-break/>- message<text:line-break/>- notification_type<text:line-break/>- channel:<text:line-break/> <text:s/>- internal<text:line-break/><text:soft-page-break/> <text:s/>- email<text:line-break/> <text:s/>- push<text:line-break/> <text:s/>- sms<text:line-break/> <text:s/>- whatsapp<text:line-break/>- is_read<text:line-break/>- metadata<text:line-break/>- created_at<text:line-break/><text:line-break/>Criar NotificationService para eventos:<text:line-break/><text:line-break/>- frete solicitado<text:line-break/>- motorista encontrado<text:line-break/>- motorista aceitou<text:line-break/>- motorista chegou à origem<text:line-break/>- carga coletada<text:line-break/>- entrega em trânsito<text:line-break/>- previsão alterada<text:line-break/>- chegada próxima<text:line-break/>- entrega realizada<text:line-break/>- pagamento confirmado<text:line-break/><text:line-break/>Endpoints:<text:line-break/><text:line-break/>- GET /api/notifications/<text:line-break/>- PATCH /api/notifications/{id}/read/<text:line-break/><text:line-break/>============================================================<text:line-break/>9. AUDITORIA<text:line-break/>============================================================<text:line-break/><text:line-break/>Auditar:<text:line-break/><text:line-break/>- criação de frete<text:line-break/>- cancelamento de frete<text:line-break/>- aceite de frete<text:line-break/>- recusa de frete<text:line-break/>- alteração de status<text:line-break/>- cálculo de preço<text:line-break/>- matching<text:line-break/>- pagamento<text:line-break/><text:line-break/>============================================================<text:line-break/>10. ADMIN<text:line-break/>============================================================<text:line-break/><text:line-break/>Customizar Django Admin para:<text:line-break/><text:line-break/>- FreightOrder<text:line-break/>- CargoItem<text:line-break/>- PriceEstimate<text:line-break/>- MatchCandidate<text:line-break/>- Route<text:line-break/>- ETARecord<text:line-break/>- Payment<text:line-break/>- Notification<text:line-break/><text:line-break/>============================================================<text:line-break/>11. TESTES<text:line-break/>============================================================<text:line-break/><text:line-break/>Criar testes para:<text:line-break/><text:line-break/>- criação de frete de geladeira<text:line-break/>- criação de frete de soja<text:line-break/><text:soft-page-break/>- recomendação automática de veículo<text:line-break/>- cálculo de preço<text:line-break/>- matching com motorista online<text:line-break/>- motorista aceitar frete<text:line-break/>- motorista recusar frete<text:line-break/>- cancelamento<text:line-break/>- criação de rota simulada<text:line-break/>- cálculo de ETA<text:line-break/>- pagamento simulado<text:line-break/>- notificações<text:line-break/><text:line-break/>============================================================<text:line-break/>12. SEED<text:line-break/>============================================================<text:line-break/><text:line-break/>Atualizar seed para criar:<text:line-break/><text:line-break/>- pedidos demo de geladeira<text:line-break/>- pedidos demo de soja<text:line-break/>- preços estimados<text:line-break/>- rotas demo<text:line-break/>- pagamentos demo<text:line-break/>- notificações demo<text:line-break/><text:line-break/>============================================================<text:line-break/>13. CRITÉRIOS DE ACEITE DO MÓDULO 3<text:line-break/>============================================================<text:line-break/><text:line-break/>O módulo estará pronto quando:<text:line-break/><text:line-break/>1. Cliente puder solicitar frete.<text:line-break/>2. Sistema recomendar veículo automaticamente.<text:line-break/>3. Sistema calcular preço estimado.<text:line-break/>4. Sistema calcular rota simulada.<text:line-break/>5. Sistema executar matching.<text:line-break/>6. Motorista puder aceitar ou recusar.<text:line-break/>7. Status do frete mudar corretamente.<text:line-break/>8. ETA básico funcionar.<text:line-break/>9. Pagamento simulado funcionar.<text:line-break/>10. Notificações internas forem geradas.<text:line-break/>11. Admin visualizar todos os registros.<text:line-break/>12. Testes principais passarem.<text:line-break/><text:line-break/>Implemente este módulo com código real, migrations, serializers, services, viewsets, permissions, urls, admin, testes e documentação.</text:p>
      <text:p text:style-name="Horizontal_20_Line"/>
      <text:h text:style-name="Heading_20_1" text:outline-level="1">Módulo 4 — Rastreamento em Tempo Real, WebSocket, Portal Web e Painéis</text:h>
      <text:p text:style-name="Text_20_body">Use este prompt para rastreabilidade, mapas, acompanhamento e portais.</text:p>
      <text:p text:style-name="P9">Continue o desenvolvimento do projeto Uber da Logística usando Django.<text:line-break/><text:line-break/>Não remova funcionalidades dos módulos anteriores.<text:line-break/><text:line-break/>Neste Módulo 4, implemente:<text:line-break/><text:line-break/>- rastreamento GPS em tempo real<text:line-break/>- eventos de rastreabilidade<text:line-break/><text:soft-page-break/>- WebSocket com Django Channels<text:line-break/>- atualização de ETA por localização<text:line-break/>- portal web básico do cliente<text:line-break/>- portal da transportadora<text:line-break/>- portal administrativo operacional<text:line-break/>- dashboard de operação<text:line-break/>- relatórios básicos<text:line-break/><text:line-break/>============================================================<text:line-break/>1. TRACKING SERVICE<text:line-break/>============================================================<text:line-break/><text:line-break/>No app tracking, criar modelo TrackingEvent.<text:line-break/><text:line-break/>Campos:<text:line-break/><text:line-break/>- freight_order<text:line-break/>- driver<text:line-break/>- vehicle<text:line-break/>- event_type<text:line-break/>- latitude<text:line-break/>- longitude<text:line-break/>- speed<text:line-break/>- heading<text:line-break/>- description<text:line-break/>- image<text:line-break/>- signature<text:line-break/>- previous_status<text:line-break/>- new_status<text:line-break/>- created_by<text:line-break/>- created_at<text:line-break/><text:line-break/>Event types:<text:line-break/><text:line-break/>- order_created<text:line-break/>- driver_accepted<text:line-break/>- driver_arrived_origin<text:line-break/>- cargo_collected<text:line-break/>- route_started<text:line-break/>- location_updated<text:line-break/>- stop_detected<text:line-break/>- route_deviation<text:line-break/>- risk_area_entered<text:line-break/>- arrived_destination<text:line-break/>- delivery_confirmed<text:line-break/>- occurrence_registered<text:line-break/><text:line-break/>Criar TrackingService.<text:line-break/><text:line-break/>Funcionalidades:<text:line-break/><text:line-break/>- receber localização do motorista<text:line-break/>- validar se motorista pertence ao frete<text:line-break/>- salvar posição atual em Redis<text:line-break/>- salvar eventos históricos no banco<text:line-break/>- atualizar localização do motorista<text:line-break/>- atualizar localização do veículo<text:line-break/>- recalcular ETA<text:line-break/>- detectar parada longa de forma simples<text:line-break/>- detectar desvio de rota de forma básica<text:line-break/>- emitir eventos via WebSocket<text:line-break/><text:line-break/>============================================================<text:line-break/>2. ENDPOINTS DE TRACKING<text:line-break/><text:soft-page-break/>============================================================<text:line-break/><text:line-break/>Criar endpoints:<text:line-break/><text:line-break/>- POST /api/tracking/location/<text:line-break/>- GET /api/freight-orders/{id}/tracking/<text:line-break/>- GET /api/freight-orders/{id}/events/<text:line-break/>- POST /api/freight-orders/{id}/tracking/event/<text:line-break/><text:line-break/>Payload para localização:<text:line-break/><text:line-break/>{<text:line-break/> <text:s/>"freight_order_id": "id",<text:line-break/> <text:s/>"driver_id": "id",<text:line-break/> <text:s/>"latitude": -15.601,<text:line-break/> <text:s/>"longitude": -56.097,<text:line-break/> <text:s/>"speed": 62,<text:line-break/> <text:s/>"heading": 180,<text:line-break/> <text:s/>"timestamp": "2026-05-30T09:33:25-04:00"<text:line-break/>}<text:line-break/><text:line-break/>Regras:<text:line-break/><text:line-break/>- Motorista só pode enviar localização para frete atribuído a ele.<text:line-break/>- Cliente só pode acompanhar seus próprios fretes.<text:line-break/>- Transportadora só acompanha fretes vinculados.<text:line-break/>- Admin acompanha todos.<text:line-break/><text:line-break/>============================================================<text:line-break/>3. REDIS PARA POSIÇÃO ATUAL<text:line-break/>============================================================<text:line-break/><text:line-break/>Salvar localização atual no Redis com chaves:<text:line-break/><text:line-break/>- tracking:order:{freight_order_id}:current_location<text:line-break/>- tracking:driver:{driver_id}:current_location<text:line-break/>- tracking:vehicle:{vehicle_id}:current_location<text:line-break/><text:line-break/>Dados:<text:line-break/><text:line-break/>- latitude<text:line-break/>- longitude<text:line-break/>- speed<text:line-break/>- heading<text:line-break/>- timestamp<text:line-break/>- freight_order_id<text:line-break/>- driver_id<text:line-break/>- vehicle_id<text:line-break/><text:line-break/>============================================================<text:line-break/>4. WEBSOCKET COM DJANGO CHANNELS<text:line-break/>============================================================<text:line-break/><text:line-break/>Implementar consumers WebSocket.<text:line-break/><text:line-break/>Rotas:<text:line-break/><text:line-break/>- ws/tracking/order/{freight_order_id}/<text:line-break/>- ws/customer/{customer_id}/<text:line-break/>- ws/driver/{driver_id}/<text:line-break/>- ws/admin/operations/<text:line-break/><text:line-break/>Usos:<text:line-break/><text:line-break/><text:soft-page-break/>- rastreamento em tempo real<text:line-break/>- atualização de ETA<text:line-break/>- mudança de status<text:line-break/>- notificações operacionais<text:line-break/>- monitoramento administrativo<text:line-break/><text:line-break/>Mensagens WebSocket:<text:line-break/><text:line-break/>location_update:<text:line-break/><text:line-break/>{<text:line-break/> <text:s/>"type": "location_update",<text:line-break/> <text:s/>"freight_order_id": "id",<text:line-break/> <text:s/>"latitude": -15.601,<text:line-break/> <text:s/>"longitude": -56.097,<text:line-break/> <text:s/>"speed": 62,<text:line-break/> <text:s/>"heading": 180,<text:line-break/> <text:s/>"eta": "2026-05-30T15:10:00-04:00"<text:line-break/>}<text:line-break/><text:line-break/>status_update:<text:line-break/><text:line-break/>{<text:line-break/> <text:s/>"type": "status_update",<text:line-break/> <text:s/>"freight_order_id": "id",<text:line-break/> <text:s/>"status": "in_transit",<text:line-break/> <text:s/>"message": "Carga em trânsito"<text:line-break/>}<text:line-break/><text:line-break/>eta_update:<text:line-break/><text:line-break/>{<text:line-break/> <text:s/>"type": "eta_update",<text:line-break/> <text:s/>"freight_order_id": "id",<text:line-break/> <text:s/>"estimated_arrival_time": "2026-05-30T15:10:00-04:00"<text:line-break/>}<text:line-break/><text:line-break/>============================================================<text:line-break/>5. ATUALIZAÇÃO AUTOMÁTICA DO ETA<text:line-break/>============================================================<text:line-break/><text:line-break/>Sempre que motorista enviar localização:<text:line-break/><text:line-break/>1. Atualizar Redis.<text:line-break/>2. Criar TrackingEvent.<text:line-break/>3. Recalcular ETA.<text:line-break/>4. Atualizar FreightOrder.estimated_arrival_time.<text:line-break/>5. Enviar atualização via WebSocket.<text:line-break/>6. Notificar se houver atraso relevante.<text:line-break/><text:line-break/>============================================================<text:line-break/>6. DETECÇÃO BÁSICA DE PARADA<text:line-break/>============================================================<text:line-break/><text:line-break/>Implementar regra simples:<text:line-break/><text:line-break/>Se velocidade = 0 ou muito baixa por mais de X minutos durante entrega em trânsito:<text:line-break/><text:line-break/>- criar evento stop_detected<text:line-break/>- mudar status para temporarily_stopped, se aplicável<text:line-break/>- notificar cliente/admin<text:line-break/>- recalcular ETA<text:line-break/><text:line-break/><text:soft-page-break/>X deve ser configurável no settings.<text:line-break/><text:line-break/>============================================================<text:line-break/>7. DETECÇÃO BÁSICA DE DESVIO DE ROTA<text:line-break/>============================================================<text:line-break/><text:line-break/>Implementar regra simples inicial:<text:line-break/><text:line-break/>- comparar localização atual com rota estimada<text:line-break/>- se distância da rota for maior que limite configurável:<text:line-break/> <text:s/>- criar evento route_deviation<text:line-break/> <text:s/>- mudar status para route_deviation_detected<text:line-break/> <text:s/>- notificar admin<text:line-break/> <text:s/>- recalcular ETA<text:line-break/><text:line-break/>Caso não exista polyline real, implementar mock estruturado para futura integração.<text:line-break/><text:line-break/>============================================================<text:line-break/>8. PORTAL WEB DO CLIENTE<text:line-break/>============================================================<text:line-break/><text:line-break/>Usar Django Templates para MVP.<text:line-break/><text:line-break/>Criar páginas:<text:line-break/><text:line-break/>- /portal/<text:line-break/>- /portal/login/<text:line-break/>- /portal/dashboard/<text:line-break/>- /portal/freights/<text:line-break/>- /portal/freights/new/<text:line-break/>- /portal/freights/{id}/<text:line-break/>- /portal/freights/{id}/tracking/<text:line-break/>- /portal/payments/<text:line-break/>- /portal/documents/<text:line-break/>- /portal/support/<text:line-break/>- /portal/ai-chat/<text:line-break/><text:line-break/>Funcionalidades:<text:line-break/><text:line-break/>- dashboard com fretes recentes<text:line-break/>- criar solicitação de frete<text:line-break/>- listar fretes<text:line-break/>- ver detalhes<text:line-break/>- ver rastreamento básico em mapa ou placeholder<text:line-break/>- ver eventos da entrega<text:line-break/>- acessar chat IA futuramente<text:line-break/>- consultar pagamentos<text:line-break/>- abrir suporte<text:line-break/><text:line-break/>============================================================<text:line-break/>9. PORTAL DA TRANSPORTADORA<text:line-break/>============================================================<text:line-break/><text:line-break/>Criar páginas:<text:line-break/><text:line-break/>- /carrier/<text:line-break/>- /carrier/dashboard/<text:line-break/>- /carrier/drivers/<text:line-break/>- /carrier/vehicles/<text:line-break/>- /carrier/freights/<text:line-break/>- /carrier/fleet-map/<text:line-break/>- /carrier/documents/<text:line-break/>- /carrier/earnings/<text:line-break/><text:soft-page-break/><text:line-break/>Funcionalidades:<text:line-break/><text:line-break/>- listar motoristas<text:line-break/>- listar veículos<text:line-break/>- listar fretes vinculados<text:line-break/>- acompanhar frota<text:line-break/>- ver ganhos básicos<text:line-break/>- ver documentos<text:line-break/><text:line-break/>============================================================<text:line-break/>10. PORTAL ADMINISTRATIVO OPERACIONAL<text:line-break/>============================================================<text:line-break/><text:line-break/>Além do Django Admin, criar páginas operacionais:<text:line-break/><text:line-break/>- /operations/<text:line-break/>- /operations/dashboard/<text:line-break/>- /operations/freights/<text:line-break/>- /operations/map/<text:line-break/>- /operations/drivers-online/<text:line-break/>- /operations/incidents/<text:line-break/>- /operations/documents/<text:line-break/>- /operations/reports/<text:line-break/><text:line-break/>Funcionalidades:<text:line-break/><text:line-break/>- visualizar fretes em andamento<text:line-break/>- visualizar fretes atrasados<text:line-break/>- visualizar motoristas online<text:line-break/>- visualizar eventos recentes<text:line-break/>- visualizar ocorrências<text:line-break/>- visualizar documentos pendentes<text:line-break/>- visualizar mapa operacional ou placeholder<text:line-break/><text:line-break/>============================================================<text:line-break/>11. RELATÓRIOS BÁSICOS<text:line-break/>============================================================<text:line-break/><text:line-break/>Criar endpoints:<text:line-break/><text:line-break/>- GET /api/admin/dashboard/<text:line-break/>- GET /api/admin/reports/operations/<text:line-break/>- GET /api/admin/reports/financial/<text:line-break/>- GET /api/admin/reports/tracking/<text:line-break/><text:line-break/>Indicadores:<text:line-break/><text:line-break/>- total de entregas<text:line-break/>- entregas em andamento<text:line-break/>- entregas atrasadas<text:line-break/>- entregas concluídas<text:line-break/>- receita total<text:line-break/>- pagamentos pendentes<text:line-break/>- motoristas online<text:line-break/>- veículos disponíveis<text:line-break/>- ocorrências abertas<text:line-break/>- tempo médio de entrega<text:line-break/>- taxa de cancelamento<text:line-break/>- taxa de entrega no prazo<text:line-break/><text:line-break/>============================================================<text:line-break/>12. NOTIFICAÇÕES<text:line-break/>============================================================<text:line-break/><text:soft-page-break/><text:line-break/>Gerar notificações para:<text:line-break/><text:line-break/>- atualização de localização<text:line-break/>- alteração de ETA relevante<text:line-break/>- parada longa<text:line-break/>- desvio de rota<text:line-break/>- chegada próxima<text:line-break/>- entrega realizada<text:line-break/><text:line-break/>============================================================<text:line-break/>13. AUDITORIA<text:line-break/>============================================================<text:line-break/><text:line-break/>Auditar:<text:line-break/><text:line-break/>- envio de localização<text:line-break/>- alteração de status por tracking<text:line-break/>- parada detectada<text:line-break/>- desvio de rota<text:line-break/>- acesso a rastreamento<text:line-break/>- ações em portais operacionais<text:line-break/><text:line-break/>============================================================<text:line-break/>14. TESTES<text:line-break/>============================================================<text:line-break/><text:line-break/>Criar testes para:<text:line-break/><text:line-break/>- envio de localização<text:line-break/>- permissão de envio de localização<text:line-break/>- salvar localização no Redis<text:line-break/>- criar TrackingEvent<text:line-break/>- atualizar ETA<text:line-break/>- emitir evento WebSocket, se possível<text:line-break/>- cliente consultar rastreamento<text:line-break/>- admin consultar painel<text:line-break/>- transportadora consultar frota<text:line-break/>- parada detectada<text:line-break/>- desvio de rota mock<text:line-break/><text:line-break/>============================================================<text:line-break/>15. README<text:line-break/>============================================================<text:line-break/><text:line-break/>Atualizar README com:<text:line-break/><text:line-break/>- como testar WebSocket<text:line-break/>- como enviar localização<text:line-break/>- como acessar portais<text:line-break/>- rotas dos portais<text:line-break/>- endpoints de tracking<text:line-break/>- exemplos de payload<text:line-break/><text:line-break/>============================================================<text:line-break/>16. CRITÉRIOS DE ACEITE DO MÓDULO 4<text:line-break/>============================================================<text:line-break/><text:line-break/>O módulo estará pronto quando:<text:line-break/><text:line-break/>1. Motorista puder enviar localização.<text:line-break/>2. Localização atual for salva no Redis.<text:line-break/>3. TrackingEvent for salvo no banco.<text:line-break/>4. Cliente puder consultar rastreamento.<text:line-break/><text:soft-page-break/>5. WebSocket enviar atualização de localização.<text:line-break/>6. ETA atualizar com nova localização.<text:line-break/>7. Parada longa for detectada em modo básico.<text:line-break/>8. Desvio de rota for detectado em modo básico/mock.<text:line-break/>9. Portal Cliente funcionar no MVP.<text:line-break/>10. Portal Transportadora funcionar no MVP.<text:line-break/>11. Portal Operacional funcionar no MVP.<text:line-break/>12. Relatórios básicos funcionarem.<text:line-break/>13. Testes principais passarem.<text:line-break/><text:line-break/>Implemente este módulo com código real, migrations, services, consumers WebSocket, rotas, templates, viewsets, permissions, admin, testes e documentação.</text:p>
      <text:p text:style-name="Horizontal_20_Line"/>
      <text:h text:style-name="Heading_20_1" text:outline-level="1">Módulo 5 — IA Embutida, RAG, Suporte, Notificações Avançadas, LGPD e Finalização</text:h>
      <text:p text:style-name="Text_20_body">Use este prompt para completar a IA e fechamento do MVP.</text:p>
      <text:p text:style-name="P9">Continue o desenvolvimento do projeto Uber da Logística usando Django.<text:line-break/><text:line-break/>Não remova funcionalidades dos módulos anteriores.<text:line-break/><text:line-break/>Neste Módulo 5, implemente:<text:line-break/><text:line-break/>- IA embutida no portal e aplicativo via API<text:line-break/>- chat com IA<text:line-break/>- RAG com base de conhecimento<text:line-break/>- pgvector<text:line-break/>- logs de conversas<text:line-break/>- abertura de chamados via IA<text:line-break/>- escalonamento para humano<text:line-break/>- segurança da IA<text:line-break/>- LGPD<text:line-break/>- relatórios de IA<text:line-break/>- finalização do MVP<text:line-break/><text:line-break/>============================================================<text:line-break/>1. OBJETIVO DA IA EMBUTIDA<text:line-break/>============================================================<text:line-break/><text:line-break/>Criar um assistente inteligente dentro do sistema para ajudar:<text:line-break/><text:line-break/>- Cliente Pessoa Física<text:line-break/>- Cliente Pessoa Jurídica<text:line-break/>- Motorista<text:line-break/>- Transportadora<text:line-break/>- Administrador<text:line-break/>- Suporte<text:line-break/>- Operação<text:line-break/><text:line-break/>A IA deve responder dúvidas durante a utilização do sistema.<text:line-break/><text:line-break/>Ela deve ajudar com:<text:line-break/><text:line-break/>- como solicitar frete<text:line-break/>- qual veículo escolher<text:line-break/>- como transportar geladeira<text:line-break/>- como transportar soja/milho<text:line-break/><text:soft-page-break/>- como funciona preço<text:line-break/>- como acompanhar entrega<text:line-break/>- onde está a carga<text:line-break/>- previsão de chegada<text:line-break/>- documentos necessários<text:line-break/>- cadastro de veículo<text:line-break/>- cadastro de empresa<text:line-break/>- problemas com pagamento<text:line-break/>- abertura de ocorrência<text:line-break/>- encaminhamento para humano<text:line-break/><text:line-break/>============================================================<text:line-break/>2. APP AI_ASSISTANT<text:line-break/>============================================================<text:line-break/><text:line-break/>No app ai_assistant, criar:<text:line-break/><text:line-break/>- AI Assistant Service<text:line-break/>- AI Orchestrator<text:line-break/>- RAG Service<text:line-break/>- Knowledge Base Service<text:line-break/>- LLM Adapter<text:line-break/>- Conversation Service<text:line-break/>- Human Escalation Service<text:line-break/><text:line-break/>A IA não deve acessar o banco diretamente para dados sensíveis.<text:line-break/>Ela deve consultar services internos com permissão.<text:line-break/><text:line-break/>============================================================<text:line-break/>3. MODELOS DA IA<text:line-break/>============================================================<text:line-break/><text:line-break/>Criar modelo AIConversation:<text:line-break/><text:line-break/>- id<text:line-break/>- user<text:line-break/>- channel:<text:line-break/> <text:s/>- web<text:line-break/> <text:s/>- mobile<text:line-break/> <text:s/>- admin<text:line-break/> <text:s/>- driver_app<text:line-break/> <text:s/>- carrier_portal<text:line-break/>- status:<text:line-break/> <text:s/>- active<text:line-break/> <text:s/>- closed<text:line-break/> <text:s/>- escalated<text:line-break/>- created_at<text:line-break/>- updated_at<text:line-break/><text:line-break/>Criar modelo AIMessage:<text:line-break/><text:line-break/>- conversation<text:line-break/>- sender:<text:line-break/> <text:s/>- user<text:line-break/> <text:s/>- assistant<text:line-break/> <text:s/>- system<text:line-break/> <text:s/>- human_agent<text:line-break/>- message_text<text:line-break/>- intent<text:line-break/>- confidence_score<text:line-break/>- metadata<text:line-break/>- created_at<text:line-break/><text:line-break/>Criar modelo AIAction:<text:line-break/><text:soft-page-break/><text:line-break/>- conversation<text:line-break/>- user<text:line-break/>- action_type<text:line-break/>- target_entity<text:line-break/>- target_id<text:line-break/>- status:<text:line-break/> <text:s/>- pending<text:line-break/> <text:s/>- confirmed<text:line-break/> <text:s/>- executed<text:line-break/> <text:s/>- cancelled<text:line-break/> <text:s/>- failed<text:line-break/>- requires_confirmation<text:line-break/>- confirmed_at<text:line-break/>- created_at<text:line-break/><text:line-break/>Criar modelo KnowledgeDocument:<text:line-break/><text:line-break/>- title<text:line-break/>- category<text:line-break/>- content<text:line-break/>- version<text:line-break/>- status:<text:line-break/> <text:s/>- draft<text:line-break/> <text:s/>- published<text:line-break/> <text:s/>- archived<text:line-break/>- created_at<text:line-break/>- updated_at<text:line-break/><text:line-break/>Criar modelo KnowledgeEmbedding:<text:line-break/><text:line-break/>- document<text:line-break/>- embedding_vector<text:line-break/>- metadata<text:line-break/>- created_at<text:line-break/><text:line-break/>Usar pgvector para embeddings.<text:line-break/>Caso pgvector não esteja disponível no ambiente local, criar fallback com busca textual simples, mantendo a arquitetura preparada.<text:line-break/><text:line-break/>============================================================<text:line-break/>4. INTENÇÕES DA IA<text:line-break/>============================================================<text:line-break/><text:line-break/>Implementar identificação básica de intenção.<text:line-break/><text:line-break/>Intenções:<text:line-break/><text:line-break/>- help_general<text:line-break/>- explain_system<text:line-break/>- create_freight_guidance<text:line-break/>- track_order<text:line-break/>- get_eta<text:line-break/>- get_driver_location<text:line-break/>- explain_price<text:line-break/>- recommend_vehicle<text:line-break/>- required_documents<text:line-break/>- dry_grains_rules<text:line-break/>- equipment_rules<text:line-break/>- open_support_ticket<text:line-break/>- cancel_order_request<text:line-break/>- talk_to_human<text:line-break/>- payment_status<text:line-break/>- delivery_proof<text:line-break/><text:soft-page-break/>- vehicle_registration_help<text:line-break/>- company_registration_help<text:line-break/>- driver_registration_help<text:line-break/>- carrier_management_help<text:line-break/>- damaged_cargo<text:line-break/>- delayed_delivery<text:line-break/>- unknown<text:line-break/><text:line-break/>Implementar primeiro por regras/palavras-chave e preparar interface para LLM.<text:line-break/><text:line-break/>============================================================<text:line-break/>5. RAG E BASE DE CONHECIMENTO<text:line-break/>============================================================<text:line-break/><text:line-break/>Criar RAGService.<text:line-break/><text:line-break/>Fluxo:<text:line-break/><text:line-break/>1. Receber pergunta.<text:line-break/>2. Identificar intenção.<text:line-break/>3. Buscar documentos relevantes na base.<text:line-break/>4. Se tiver embeddings, usar busca vetorial.<text:line-break/>5. Se não tiver, usar busca textual.<text:line-break/>6. Montar contexto.<text:line-break/>7. Enviar para LLM Adapter ou resposta controlada.<text:line-break/>8. Registrar conversa e mensagem.<text:line-break/>9. Retornar resposta.<text:line-break/><text:line-break/>Base de conhecimento inicial:<text:line-break/><text:line-break/>- Como funciona o Uber da Logística<text:line-break/>- Como solicitar frete<text:line-break/>- Como acompanhar entrega<text:line-break/>- Como funciona a previsão de chegada<text:line-break/>- Como funciona o rastreamento<text:line-break/>- Como funciona o preço<text:line-break/>- Tipos de veículos<text:line-break/>- Regras para equipamentos<text:line-break/>- Regras para geladeira<text:line-break/>- Regras para fogão<text:line-break/>- Regras para motor<text:line-break/>- Regras para móveis<text:line-break/>- Regras para grãos secos<text:line-break/>- Transporte de soja<text:line-break/>- Transporte de milho<text:line-break/>- Documentos necessários para motoristas<text:line-break/>- Documentos necessários para veículos<text:line-break/>- Documentos necessários para cargas agrícolas<text:line-break/>- Como cadastrar Pessoa Física<text:line-break/>- Como cadastrar Pessoa Jurídica<text:line-break/>- Como cadastrar transportadora<text:line-break/>- Como cadastrar veículo<text:line-break/>- Regras de cancelamento<text:line-break/>- Regras de pagamento<text:line-break/>- Política de segurança<text:line-break/>- LGPD e privacidade<text:line-break/><text:line-break/>============================================================<text:line-break/>6. LLM ADAPTER<text:line-break/>============================================================<text:line-break/><text:line-break/>Criar camada LLMAdapter.<text:line-break/><text:line-break/>Ela deve permitir:<text:line-break/><text:soft-page-break/><text:line-break/>- usar provedor externo de IA se LLM_API_KEY existir<text:line-break/>- usar resposta simulada/controlada se não existir<text:line-break/>- trocar provedor futuramente sem alterar o restante do sistema<text:line-break/><text:line-break/>Variáveis:<text:line-break/><text:line-break/>- LLM_PROVIDER<text:line-break/>- LLM_API_KEY<text:line-break/>- LLM_MODEL<text:line-break/><text:line-break/>No MVP, implementar fallback local:<text:line-break/><text:line-break/>- responder com base em templates<text:line-break/>- usar contexto da base de conhecimento<text:line-break/>- nunca inventar dados sensíveis<text:line-break/>- encaminhar para humano quando necessário<text:line-break/><text:line-break/>============================================================<text:line-break/>7. ENDPOINT DE CHAT<text:line-break/>============================================================<text:line-break/><text:line-break/>Criar endpoint:<text:line-break/><text:line-break/>POST /api/ai/chat/<text:line-break/><text:line-break/>Payload:<text:line-break/><text:line-break/>{<text:line-break/> <text:s/>"conversation_id": null,<text:line-break/> <text:s/>"message": "Onde está minha entrega?",<text:line-break/> <text:s/>"context": {},<text:line-break/> <text:s/>"freight_order_id": "opcional"<text:line-break/>}<text:line-break/><text:line-break/>Resposta:<text:line-break/><text:line-break/>{<text:line-break/> <text:s/>"success": true,<text:line-break/> <text:s/>"data": {<text:line-break/> <text:s text:c="3"/>"answer": "Sua entrega está em trânsito...",<text:line-break/> <text:s text:c="3"/>"intent": "track_order",<text:line-break/> <text:s text:c="3"/>"confidence": 0.92,<text:line-break/> <text:s text:c="3"/>"suggested_actions": [],<text:line-break/> <text:s text:c="3"/>"requires_human": false,<text:line-break/> <text:s text:c="3"/>"conversation_id": "id"<text:line-break/> <text:s/>},<text:line-break/> <text:s/>"message": "Resposta gerada com sucesso."<text:line-break/>}<text:line-break/><text:line-break/>Criar endpoints:<text:line-break/><text:line-break/>- GET /api/ai/conversations/<text:line-break/>- GET /api/ai/conversations/{id}/<text:line-break/>- POST /api/ai/conversations/{id}/close/<text:line-break/>- POST /api/ai/conversations/{id}/escalate/<text:line-break/>- POST /api/ai/actions/{id}/confirm/<text:line-break/><text:line-break/>============================================================<text:line-break/>8. CONSULTA DE DADOS DO SISTEMA PELA IA<text:line-break/>============================================================<text:line-break/><text:line-break/>A IA deve conseguir consultar, com permissão:<text:line-break/><text:line-break/><text:soft-page-break/>Para cliente:<text:line-break/><text:line-break/>- seus próprios fretes<text:line-break/>- status do pedido<text:line-break/>- ETA<text:line-break/>- localização atual<text:line-break/>- eventos da entrega<text:line-break/>- pagamentos próprios<text:line-break/>- comprovantes próprios<text:line-break/><text:line-break/>Para motorista:<text:line-break/><text:line-break/>- seus fretes<text:line-break/>- seus ganhos<text:line-break/>- seus documentos<text:line-break/>- seu veículo<text:line-break/>- status dos pedidos atribuídos<text:line-break/><text:line-break/>Para transportadora:<text:line-break/><text:line-break/>- seus motoristas<text:line-break/>- seus veículos<text:line-break/>- fretes vinculados<text:line-break/><text:line-break/>Para admin:<text:line-break/><text:line-break/>- dados operacionais conforme permissão<text:line-break/><text:line-break/>Criar AIOrchestrator para chamar:<text:line-break/><text:line-break/>- FreightService<text:line-break/>- TrackingService<text:line-break/>- ETAService<text:line-break/>- VehicleService<text:line-break/>- PricingService<text:line-break/>- PaymentService<text:line-break/>- SupportService<text:line-break/>- DocumentService<text:line-break/><text:line-break/>============================================================<text:line-break/>9. EXEMPLOS DE RESPOSTA DA IA<text:line-break/>============================================================<text:line-break/><text:line-break/>Pergunta:<text:line-break/><text:line-break/>Onde está minha carga?<text:line-break/><text:line-break/>Resposta esperada:<text:line-break/><text:line-break/>Sua carga está em trânsito. A última localização registrada foi atualizada há poucos minutos. A previsão atual de chegada é aproximadamente 15h10.<text:line-break/><text:line-break/>Pergunta:<text:line-break/><text:line-break/>Qual veículo uso para transportar uma geladeira?<text:line-break/><text:line-break/>Resposta esperada:<text:line-break/><text:line-break/>Para transportar uma geladeira, recomendo veículo fechado ou coberto, como Fiorino baú, caminhonete coberta ou caminhão baú pequeno. A geladeira deve ser transportada preferencialmente em pé e protegida contra impactos.<text:line-break/><text:line-break/>Pergunta:<text:line-break/><text:line-break/><text:soft-page-break/>Posso transportar soja?<text:line-break/><text:line-break/>Resposta esperada:<text:line-break/><text:line-break/>Sim. Para soja, o sistema recomenda veículo graneleiro ou caçamba apropriada para grãos secos, com proteção contra umidade e, quando necessário, lona. Também podem ser exigidos nota fiscal, romaneio e comprovante de pesagem.<text:line-break/><text:line-break/>Pergunta:<text:line-break/><text:line-break/>Por que o frete ficou caro?<text:line-break/><text:line-break/>Resposta esperada:<text:line-break/><text:line-break/>O preço pode variar conforme distância, tempo estimado, tipo de veículo, peso, volume, seguro, pedágios, urgência e disponibilidade de motoristas próximos.<text:line-break/><text:line-break/>============================================================<text:line-break/>10. AÇÕES DA IA<text:line-break/>============================================================<text:line-break/><text:line-break/>A IA pode executar com segurança:<text:line-break/><text:line-break/>- orientar criação de frete<text:line-break/>- consultar pedido<text:line-break/>- consultar ETA<text:line-break/>- consultar localização<text:line-break/>- recomendar veículo<text:line-break/>- explicar preço<text:line-break/>- abrir chamado de suporte<text:line-break/>- registrar reclamação<text:line-break/>- solicitar comprovante<text:line-break/>- encaminhar para humano<text:line-break/><text:line-break/>Ações que exigem confirmação:<text:line-break/><text:line-break/>- cancelar pedido<text:line-break/>- alterar endereço<text:line-break/>- abrir disputa<text:line-break/>- solicitar reembolso<text:line-break/>- alterar dados cadastrais<text:line-break/><text:line-break/>Nunca executar ação crítica sem confirmação explícita.<text:line-break/><text:line-break/>============================================================<text:line-break/>11. SUPORTE E OCORRÊNCIAS<text:line-break/>============================================================<text:line-break/><text:line-break/>No app support, criar modelo SupportTicket.<text:line-break/><text:line-break/>Campos:<text:line-break/><text:line-break/>- user<text:line-break/>- freight_order<text:line-break/>- assigned_to<text:line-break/>- category:<text:line-break/> <text:s/>- atraso<text:line-break/> <text:s/>- carga_danificada<text:line-break/> <text:s/>- pagamento<text:line-break/> <text:s/>- documento<text:line-break/> <text:s/>- motorista<text:line-break/> <text:s/>- cliente<text:line-break/> <text:s/>- divergencia_peso<text:line-break/> <text:s/>- cancelamento<text:line-break/><text:soft-page-break/> <text:s/>- problema_tecnico<text:line-break/> <text:s/>- outro<text:line-break/>- priority:<text:line-break/> <text:s/>- low<text:line-break/> <text:s/>- medium<text:line-break/> <text:s/>- high<text:line-break/> <text:s/>- critical<text:line-break/>- status:<text:line-break/> <text:s/>- open<text:line-break/> <text:s/>- in_progress<text:line-break/> <text:s/>- waiting_user<text:line-break/> <text:s/>- resolved<text:line-break/> <text:s/>- closed<text:line-break/>- description<text:line-break/>- created_from:<text:line-break/> <text:s/>- portal<text:line-break/> <text:s/>- app<text:line-break/> <text:s/>- ai<text:line-break/> <text:s/>- admin<text:line-break/>- created_at<text:line-break/>- updated_at<text:line-break/>- closed_at<text:line-break/><text:line-break/>Endpoints:<text:line-break/><text:line-break/>- POST /api/support/tickets/<text:line-break/>- GET /api/support/tickets/<text:line-break/>- GET /api/support/tickets/{id}/<text:line-break/>- PATCH /api/support/tickets/{id}/<text:line-break/><text:line-break/>A IA deve abrir ticket quando:<text:line-break/><text:line-break/>- carga danificada<text:line-break/>- pagamento com problema<text:line-break/>- motorista não localizado<text:line-break/>- entrega muito atrasada<text:line-break/>- suspeita de fraude<text:line-break/>- divergência de peso<text:line-break/>- disputa cliente/motorista<text:line-break/><text:line-break/>============================================================<text:line-break/>12. CHAT IA NO PORTAL<text:line-break/>============================================================<text:line-break/><text:line-break/>Criar páginas/templates:<text:line-break/><text:line-break/>- /portal/ai-chat/<text:line-break/>- /carrier/ai-chat/<text:line-break/>- /operations/ai-conversations/<text:line-break/><text:line-break/>Funcionalidades:<text:line-break/><text:line-break/>- usuário envia mensagem<text:line-break/>- IA responde<text:line-break/>- histórico aparece na tela<text:line-break/>- botão para falar com humano<text:line-break/>- botão para abrir chamado<text:line-break/>- exibir ações sugeridas<text:line-break/><text:line-break/>Também criar componente simples de chat que possa aparecer nas páginas principais.<text:line-break/><text:line-break/>============================================================<text:line-break/>13. WEBSOCKET PARA CHAT IA<text:line-break/><text:soft-page-break/>============================================================<text:line-break/><text:line-break/>Implementar rota:<text:line-break/><text:line-break/>- ws/ai/conversation/{conversation_id}/<text:line-break/><text:line-break/>Uso:<text:line-break/><text:line-break/>- enviar mensagens em tempo real<text:line-break/>- receber resposta da IA<text:line-break/>- permitir atendente humano assumir futuramente<text:line-break/><text:line-break/>Se ficar complexo, manter REST funcional e deixar WebSocket preparado.<text:line-break/><text:line-break/>============================================================<text:line-break/>14. SEGURANÇA DA IA<text:line-break/>============================================================<text:line-break/><text:line-break/>Implementar regras:<text:line-break/><text:line-break/>- autenticação obrigatória para consultar dados pessoais<text:line-break/>- controle de permissões<text:line-break/>- não revelar dados de outros usuários<text:line-break/>- mascarar dados sensíveis<text:line-break/>- registrar logs das conversas<text:line-break/>- bloquear prompt injection básico<text:line-break/>- não revelar prompts internos<text:line-break/>- não executar ação crítica sem confirmação<text:line-break/>- encaminhar casos críticos para humano<text:line-break/>- limitar tamanho da mensagem<text:line-break/>- rate limit no endpoint /api/ai/chat/<text:line-break/><text:line-break/>============================================================<text:line-break/>15. LGPD<text:line-break/>============================================================<text:line-break/><text:line-break/>Implementar estrutura para:<text:line-break/><text:line-break/>- consentimento de uso<text:line-break/>- política de privacidade<text:line-break/>- termos de uso<text:line-break/>- solicitação de exclusão/anomização futura<text:line-break/>- registro de consentimento<text:line-break/>- mascaramento de CPF/CNPJ em respostas<text:line-break/>- controle de acesso a conversas<text:line-break/><text:line-break/>Criar modelo UserConsent:<text:line-break/><text:line-break/>- user<text:line-break/>- consent_type<text:line-break/>- accepted<text:line-break/>- version<text:line-break/>- accepted_at<text:line-break/>- ip_address<text:line-break/><text:line-break/>Endpoints:<text:line-break/><text:line-break/>- POST /api/consents/<text:line-break/>- GET /api/consents/me/<text:line-break/><text:line-break/>============================================================<text:line-break/>16. RELATÓRIOS DE IA<text:line-break/>============================================================<text:line-break/><text:line-break/><text:soft-page-break/>Criar endpoint:<text:line-break/><text:line-break/>GET /api/admin/reports/ai/<text:line-break/><text:line-break/>Indicadores:<text:line-break/><text:line-break/>- total de conversas<text:line-break/>- conversas por canal<text:line-break/>- principais intenções<text:line-break/>- taxa de resolução automática<text:line-break/>- taxa de escalonamento humano<text:line-break/>- tempo médio de resposta<text:line-break/>- tickets abertos pela IA<text:line-break/>- perguntas sem resposta<text:line-break/>- satisfação, se existir avaliação<text:line-break/><text:line-break/>============================================================<text:line-break/>17. ADMIN<text:line-break/>============================================================<text:line-break/><text:line-break/>Customizar Django Admin para:<text:line-break/><text:line-break/>- AIConversation<text:line-break/>- AIMessage<text:line-break/>- AIAction<text:line-break/>- KnowledgeDocument<text:line-break/>- KnowledgeEmbedding<text:line-break/>- SupportTicket<text:line-break/>- UserConsent<text:line-break/><text:line-break/>Com filtros:<text:line-break/><text:line-break/>- status<text:line-break/>- canal<text:line-break/>- intenção<text:line-break/>- usuário<text:line-break/>- data<text:line-break/>- escalonado<text:line-break/>- categoria de ticket<text:line-break/><text:line-break/>============================================================<text:line-break/>18. SEED FINAL<text:line-break/>============================================================<text:line-break/><text:line-break/>Atualizar comando:<text:line-break/><text:line-break/>python manage.py seed_initial_data<text:line-break/><text:line-break/>Adicionar:<text:line-break/><text:line-break/>- documentos de conhecimento da IA<text:line-break/>- conversas demo<text:line-break/>- mensagens demo<text:line-break/>- tickets demo<text:line-break/>- consentimentos demo<text:line-break/><text:line-break/>============================================================<text:line-break/>19. TESTES<text:line-break/>============================================================<text:line-break/><text:line-break/>Criar testes para:<text:line-break/><text:line-break/>- iniciar conversa<text:line-break/>- enviar mensagem<text:line-break/><text:soft-page-break/>- identificar intenção<text:line-break/>- buscar conhecimento<text:line-break/>- responder sobre geladeira<text:line-break/>- responder sobre soja<text:line-break/>- consultar status de pedido pela IA<text:line-break/>- consultar ETA pela IA<text:line-break/>- impedir acesso a pedido de outro usuário<text:line-break/>- abrir ticket pela IA<text:line-break/>- escalar para humano<text:line-break/>- confirmar ação sensível<text:line-break/>- registrar consentimento<text:line-break/>- relatório de IA<text:line-break/><text:line-break/>============================================================<text:line-break/>20. DOCUMENTAÇÃO FINAL<text:line-break/>============================================================<text:line-break/><text:line-break/>Atualizar README completo com:<text:line-break/><text:line-break/>- visão geral do sistema<text:line-break/>- arquitetura<text:line-break/>- apps<text:line-break/>- <text:span text:style-name="T2">Sqlite</text:span><text:line-break/>- migrations<text:line-break/>- seed<text:line-break/>- testes<text:line-break/>- endpoints principais<text:line-break/>- WebSocket<text:line-break/>- IA<text:line-break/>- RAG<text:line-break/>- permissões<text:line-break/>- LGPD<text:line-break/>- fluxo de frete<text:line-break/>- fluxo de rastreamento<text:line-break/>- fluxo de suporte<text:line-break/>- roadmap<text:line-break/><text:line-break/>============================================================<text:line-break/>21. CRITÉRIOS DE ACEITE DO MÓDULO 5<text:line-break/>============================================================<text:line-break/><text:line-break/>O módulo estará pronto quando:<text:line-break/><text:line-break/>1. Usuário puder abrir chat IA.<text:line-break/>2. IA responder dúvidas gerais.<text:line-break/>3. IA recomendar veículo para geladeira.<text:line-break/>4. IA recomendar veículo para soja.<text:line-break/>5. IA consultar status de pedido do usuário.<text:line-break/>6. IA consultar ETA do pedido do usuário.<text:line-break/>7. IA impedir acesso a dados de terceiros.<text:line-break/>8. IA abrir chamado de suporte.<text:line-break/>9. IA escalar para humano.<text:line-break/>10. Conversas forem registradas.<text:line-break/>11. Base de conhecimento funcionar.<text:line-break/>12. pgvector ou fallback textual funcionar.<text:line-break/>13. Relatório de IA funcionar.<text:line-break/>14. LGPD básica funcionar.<text:line-break/>15. Portal exibir chat.<text:line-break/>16. Testes principais passarem.<text:line-break/>17. README final estiver atualizado.<text:line-break/><text:line-break/>Finalize o MVP com código real, migrations, services, serializers, viewsets, permissions, templates, consumers se aplicável, testes e documentação.</text:p>
      <text:p text:style-name="Horizontal_20_Line"><text:soft-page-break/></text:p>
      <text:h text:style-name="Heading_20_1" text:outline-level="1">Prompt Curto para Usar Entre os Módulos</text:h>
      <text:p text:style-name="Text_20_body">Sempre que o Antigravity parar ou precisar continuar, use este prompt:</text:p>
      <text:p text:style-name="P9">Continue exatamente de onde parou.<text:line-break/><text:line-break/>Não remova funcionalidades existentes.<text:line-break/><text:line-break/>Mantenha a arquitetura modular em Django.<text:line-break/><text:line-break/>Antes de implementar, verifique os arquivos existentes e respeite os nomes, modelos, serviços, serializers, URLs e permissões já criados.<text:line-break/><text:line-break/>Implemente código real, migrations, testes e documentação.<text:line-break/><text:line-break/>Siga o padrão de resposta das APIs:<text:line-break/><text:line-break/>{<text:line-break/> <text:s/>"success": true,<text:line-break/> <text:s/>"data": {},<text:line-break/> <text:s/>"message": "Operação realizada com sucesso."<text:line-break/>}<text:line-break/><text:line-break/>e para erros:<text:line-break/><text:line-break/>{<text:line-break/> <text:s/>"success": false,<text:line-break/> <text:s/>"errors": {},<text:line-break/> <text:s/>"message": "Erro ao processar solicitação."<text:line-break/>}</text:p>
      <text:p text:style-name="Horizontal_20_Line"/>
      <text:h text:style-name="Heading_20_1" text:outline-level="1">Ordem Recomendada de Execução</text:h>
      <text:p text:style-name="P9">1. Módulo 1 — Base, <text:span text:style-name="T2">SQLite</text:span>, Django, Usuários e Segurança<text:line-break/>2. Módulo 2 — Motoristas, Veículos, Cargas e Documentos<text:line-break/>3. Módulo 3 — Fretes, Preço, Matching, Rotas, ETA e Pagamentos<text:line-break/>4. Módulo 4 — Rastreamento, WebSocket, Portais e Relatórios<text:line-break/>5. Módulo 5 — IA Embutida, RAG, Suporte, LGPD e Finalização</text:p>
      <text:p text:style-name="Text_20_body">Com esses <text:span text:style-name="T1">5 prompts</text:span>, o Antigravity consegue desenvolver o sistema de forma mais organizada, incremental e com menos risco de se perder no escopo.</text:p>
      <text:p text:style-name="Text_20_body"/>
      <text:p text:style-name="P32">Iniciar Projeto de forma automática</text:p>
      <text:h text:style-name="P33" text:outline-level="3"><text:bookmark text:name="user-content-2-rodar-o-script-de-configuração-e-reset-automático"/>2. Rodar o Script de Configuração e Reset Automático</text:h>
      <text:p text:style-name="P34">Criamos um script que automatiza a limpeza do banco, instalação de dependências, geração de migrações, semeamento de dados de teste (como motoristas, veículos e regras de carga) e início do servidor.</text:p>
      <text:p text:style-name="P34">No PowerShell, execute:</text:p>
      <text:p text:style-name="P35"><text:soft-page-break/>powershell</text:p>
      <text:p text:style-name="P36">powershell -ExecutionPolicy Bypass -File run_project_final.ps1</text:p>
      <text:p text:style-name="P34">O script irá:</text:p>
      <text:list text:style-name="L17">
        <text:list-item>
          <text:p text:style-name="P37">Fechar conexões anteriores para evitar travamentos no SQLite.</text:p>
        </text:list-item>
        <text:list-item>
          <text:p text:style-name="P37">Apagar o banco antigo para garantir consistência.</text:p>
        </text:list-item>
        <text:list-item>
          <text:p text:style-name="P37">Gerar arquivos de migração necessários.</text:p>
        </text:list-item>
        <text:list-item>
          <text:p text:style-name="P37">Aplicar as tabelas no SQLite.</text:p>
        </text:list-item>
        <text:list-item>
          <text:p text:style-name="P37">Inserir dados demonstrativos (Seed).</text:p>
        </text:list-item>
        <text:list-item>
          <text:p text:style-name="P37">Executar a suíte de testes de ponta a ponta.</text:p>
        </text:list-item>
        <text:list-item>
          <text:p text:style-name="P38">Iniciar o servidor de desenvolvimento na porta <text:span text:style-name="Source_20_Text">8000</text:span>.</text:p>
        </text:list-item>
      </text:list>
      <text:p text:style-name="P39"/>
      <text:h text:style-name="P40" text:outline-level="3"><text:bookmark text:name="user-content-3-teste-manual-django-admin"/>3. Teste Manual (Django Admin)</text:h>
      <text:p text:style-name="P34">Com o servidor de desenvolvimento ativo na porta <text:span text:style-name="Source_20_Text">8000</text:span> (iniciado pelo script acima ou executando <text:span text:style-name="Source_20_Text">python manage.py runserver</text:span>):</text:p>
      <text:list text:style-name="L18">
        <text:list-item>
          <text:p text:style-name="P41">Acesse o painel administrativo pelo navegador: <text:span text:style-name="Source_20_Text">http://127.0.0.1:8000/admin/</text:span></text:p>
        </text:list-item>
        <text:list-item>
          <text:p text:style-name="P41">Faça login com as credenciais administrativas criadas pelo semeador:</text:p>
          <text:list>
            <text:list-item>
              <text:p text:style-name="P41"><text:span text:style-name="Strong_20_Emphasis">E-mail</text:span>: <text:span text:style-name="Source_20_Text">admin@uberlogistica.com</text:span></text:p>
            </text:list-item>
            <text:list-item>
              <text:p text:style-name="P41"><text:span text:style-name="Strong_20_Emphasis">Senha</text:span>: <text:span text:style-name="Source_20_Text">AdminPassword123</text:span></text:p>
            </text:list-item>
          </text:list>
        </text:list-item>
        <text:list-item>
          <text:p text:style-name="P41">No painel, você poderá gerenciar e auditar as novas entidades do Módulo 2:</text:p>
          <text:list>
            <text:list-item>
              <text:p text:style-name="P41"><text:span text:style-name="Strong_20_Emphasis">Perfis de Motoristas</text:span>: visualizar o cadastro e status de aprovação.</text:p>
            </text:list-item>
            <text:list-item>
              <text:p text:style-name="P41"><text:span text:style-name="Strong_20_Emphasis">Veículos</text:span>: checar placas, renavams e status de vistorias.</text:p>
            </text:list-item>
            <text:list-item>
              <text:p text:style-name="P41"><text:span text:style-name="Strong_20_Emphasis">Tipos de Carga e Regras</text:span>: analisar as restrições logísticas de aparelhos e grãos secos.</text:p>
            </text:list-item>
            <text:list-item>
              <text:p text:style-name="P41"><text:span text:style-name="Strong_20_Emphasis">Documentos</text:span>: verificar uploads de CNH/CRLV de motoristas.</text:p>
            </text:list-item>
            <text:list-item>
              <text:p text:style-name="P42"><text:span text:style-name="Strong_20_Emphasis">Logs de Auditoria</text:span>: conferir o histórico de todas as alterações feitas no banco de dados.</text:p>
            </text:list-item>
          </text:list>
        </text:list-item>
      </text:list>
      <text:p text:style-name="P32"/>
      <text:p text:style-name="P32"/>
      <text:p text:style-name="P32"><text:soft-pag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43">Antes de Fazermos um o módulo 6 faça o seguinte prompt:</text:p>
      <text:p text:style-name="P43">Atualize todo o projeto para substituir a marca anterior <text:s/>pela nova marca oficial:</text:p>
      <text:p text:style-name="P44"/>
      <text:p text:style-name="P43">FreteHub</text:p>
      <text:p text:style-name="P44"><text:soft-page-break/></text:p>
      <text:p text:style-name="P45">A marca FreteHub deve ser usada como nome principal do sistema em todas as páginas públicas, dashboards, menus, rodapés, títulos, textos institucionais, documentação e páginas de investidores.</text:p>
      <text:p text:style-name="P43"/>
      <text:p text:style-name="P43">IMPORTANTE:</text:p>
      <text:p text:style-name="P46">- Substituir todas as ocorrências visíveis <text:s/>por "FreteHub".</text:p>
      <text:p text:style-name="P46">- Se houver referências internas de código, variáveis ou constantes relacionadas à marca, atualizar de forma segura sem quebrar funcionalidades.</text:p>
      <text:p text:style-name="P46">- Não remover funcionalidades existentes.</text:p>
      <text:p text:style-name="P46">- Não alterar regras de negócio.</text:p>
      <text:p text:style-name="P46">- Apenas atualizar identidade visual, textos de marca, títulos, slogans, SEO, documentação e apresentação.</text:p>
      <text:p text:style-name="P44"/>
      <text:p text:style-name="P43">========================================================</text:p>
      <text:p text:style-name="P43">1. IDENTIDADE DA MARCA</text:p>
      <text:p text:style-name="P43">========================================================</text:p>
      <text:p text:style-name="P44"/>
      <text:p text:style-name="P43">Nome oficial:</text:p>
      <text:p text:style-name="P43">FreteHub</text:p>
      <text:p text:style-name="P43"/>
      <text:p text:style-name="P43">Slogan principal:</text:p>
      <text:p text:style-name="P43">"O hub inteligente que conecta cargas, motoristas e transportadoras."</text:p>
      <text:p text:style-name="P43"/>
      <text:p text:style-name="P43">Headline principal da landing page:</text:p>
      <text:p text:style-name="P43">"FreteHub: a plataforma inteligente para conectar fretes, motoristas e operações em tempo real."</text:p>
      <text:p text:style-name="P43"/>
      <text:p text:style-name="P43">Subtítulo:</text:p>
      <text:p text:style-name="P45">"Uma solução completa para solicitar, rastrear, otimizar e gerenciar fretes com inteligência artificial, dados em tempo real, matching automático, ETA inteligente e dashboards executivos."</text:p>
      <text:p text:style-name="P43"><text:soft-page-break/></text:p>
      <text:p text:style-name="P43">Texto institucional:</text:p>
      <text:p text:style-name="P45">"FreteHub é uma plataforma inteligente de logística criada para conectar embarcadores, motoristas, transportadoras e operações em um único ecossistema digital. Com inteligência artificial, roteirização otimizada, rastreamento em tempo real, ETA automático, matching de fretes e dashboards executivos, a solução ajuda empresas a reduzir custos, aumentar previsibilidade e escalar operações logísticas com segurança."</text:p>
      <text:p text:style-name="P43"/>
      <text:p text:style-name="P43">============================================================</text:p>
      <text:p text:style-name="P43">2. APLICAÇÃO DA MARCA</text:p>
      <text:p text:style-name="P43">========================================================</text:p>
      <text:p text:style-name="P44"/>
      <text:p text:style-name="P43">Aplicar "FreteHub" em:</text:p>
      <text:p text:style-name="P43"/>
      <text:p text:style-name="P46">1. Header/menu superior</text:p>
      <text:p text:style-name="P46">2. Hero section da landing page</text:p>
      <text:p text:style-name="P46">3. Footer</text:p>
      <text:p text:style-name="P46">4. Página inicial</text:p>
      <text:p text:style-name="P46">5. Página de investidores</text:p>
      <text:p text:style-name="P46">6. Página de demonstração</text:p>
      <text:p text:style-name="P46">7. Página de produto</text:p>
      <text:p text:style-name="P46">8. Página de tecnologia</text:p>
      <text:p text:style-name="P46">9. Página de segurança</text:p>
      <text:p text:style-name="P46">10. Dashboard executivo</text:p>
      <text:p text:style-name="P46">11. Dashboard operacional</text:p>
      <text:p text:style-name="P46">12. Dashboard financeiro</text:p>
      <text:p text:style-name="P46">13. Dashboard de IA</text:p>
      <text:p text:style-name="P46">14. Portal do cliente</text:p>
      <text:p text:style-name="P46">15. Portal da transportadora</text:p>
      <text:p text:style-name="P46">16. Portal do motorista</text:p>
      <text:p text:style-name="P46"><text:soft-page-break/>17. Painel administrativo</text:p>
      <text:p text:style-name="P46">18. Títulos SEO</text:p>
      <text:p text:style-name="P46">19. Meta descriptions</text:p>
      <text:p text:style-name="P46">20. README</text:p>
      <text:p text:style-name="P46">21. docs/investor_demo.md</text:p>
      <text:p text:style-name="P46">22. Mensagens do modo demonstração</text:p>
      <text:p text:style-name="P46">23. E-mails/templates públicos, se existirem</text:p>
      <text:p text:style-name="P43">========================================================</text:p>
      <text:p text:style-name="P43">3. LOGO TEXTUAL</text:p>
      <text:p text:style-name="P43">========================================================</text:p>
      <text:p text:style-name="P43">Criar uma logo textual moderna para:</text:p>
      <text:p text:style-name="P44"/>
      <text:p text:style-name="P43">FreteHub</text:p>
      <text:p text:style-name="P44"/>
      <text:p text:style-name="P43">Conceito visual:</text:p>
      <text:p text:style-name="P44"/>
      <text:p text:style-name="P43">- "Frete" representa o negócio principal</text:p>
      <text:p text:style-name="P43">- "Hub" representa conexão, centralização, plataforma e marketplace</text:p>
      <text:p text:style-name="P43">- Usar fonte moderna, bold, limpa e tecnológica</text:p>
      <text:p text:style-name="P43">- "Frete" pode usar branco, cinza claro ou azul claro</text:p>
      <text:p text:style-name="P43">- "Hub" pode usar gradiente azul/ciano/verde</text:p>
      <text:p text:style-name="P43">- Pode adicionar ícone simples de rota, pin, caminhão ou conexão</text:p>
      <text:p text:style-name="P43">- Manter visual profissional, premium, brasileiro e adequado para investidores</text:p>
      <text:p text:style-name="P44"/>
      <text:p text:style-name="P43">Sugestão visual em texto:</text:p>
      <text:p text:style-name="P44"/>
      <text:p text:style-name="P43">FreteHub</text:p>
      <text:p text:style-name="P43"/>
      <text:p text:style-name="P43">Onde:</text:p>
      <text:p text:style-name="P43">- Frete = confiança e operação</text:p>
      <text:p text:style-name="P43"><text:soft-page-break/>- Hub = tecnologia, conexão e escala</text:p>
      <text:p text:style-name="P43"/>
      <text:p text:style-name="P43">========================================================</text:p>
      <text:p text:style-name="P43">4. HERO DA PRIMEIRA PÁGINA</text:p>
      <text:p text:style-name="P43">========================================================</text:p>
      <text:p text:style-name="P43"/>
      <text:p text:style-name="P43">Atualizar a primeira dobra da landing page para:</text:p>
      <text:p text:style-name="P43"/>
      <text:p text:style-name="P43">Título principal:</text:p>
      <text:p text:style-name="P43">FreteHub</text:p>
      <text:p text:style-name="P43"/>
      <text:p text:style-name="P43">Slogan:</text:p>
      <text:p text:style-name="P43">"O hub inteligente que conecta cargas, motoristas e transportadoras."</text:p>
      <text:p text:style-name="P43"/>
      <text:p text:style-name="P43">Headline:</text:p>
      <text:p text:style-name="P43">"FreteHub: a plataforma inteligente para conectar fretes, motoristas e operações em tempo real."</text:p>
      <text:p text:style-name="P43"/>
      <text:p text:style-name="P43">Texto de apoio:</text:p>
      <text:p text:style-name="P43">"Solicite, rastreie, otimize e gerencie fretes com inteligência artificial, matching automático, ETA inteligente, rastreamento em tempo real e dashboards executivos para tomada de decisão."</text:p>
      <text:p text:style-name="P43"/>
      <text:p text:style-name="P43">Botões principais:</text:p>
      <text:p text:style-name="P43">- "Ver Demonstração"</text:p>
      <text:p text:style-name="P43">- "Simular Frete"</text:p>
      <text:p text:style-name="P43">- "Acessar Dashboard"</text:p>
      <text:p text:style-name="P43">- "Apresentação para Investidores"</text:p>
      <text:p text:style-name="P43"><text:soft-page-break/></text:p>
      <text:p text:style-name="P43">Adicionar badge no topo:</text:p>
      <text:p text:style-name="P43">"FreteHub Platform"</text:p>
      <text:p text:style-name="P43">ou</text:p>
      <text:p text:style-name="P43">"Logística inteligente com IA"</text:p>
      <text:p text:style-name="P43"/>
      <text:p text:style-name="P43">Se DEMO_MODE=true, também exibir:</text:p>
      <text:p text:style-name="P43">"Modo Demonstração"</text:p>
      <text:p text:style-name="P43"/>
      <text:p text:style-name="P43">=======================================================<text:span text:style-name="T8">=</text:span></text:p>
      <text:p text:style-name="P43">5. SLOGANS ALTERNATIVOS</text:p>
      <text:p text:style-name="P43">========================================================</text:p>
      <text:p text:style-name="P44"/>
      <text:p text:style-name="P43">Adicionar variações de slogan ao longo das páginas públicas:</text:p>
      <text:p text:style-name="P43"/>
      <text:p text:style-name="P46">- "Fretes mais inteligentes, rápidos e rastreáveis."</text:p>
      <text:p text:style-name="P46">- "O hub da logística moderna."</text:p>
      <text:p text:style-name="P46">- "Conecte cargas, motoristas e transportadoras em tempo real."</text:p>
      <text:p text:style-name="P46">- "Do pedido à entrega, tudo em uma única plataforma."</text:p>
      <text:p text:style-name="P46">- "Rastreamento, IA e gestão logística no mesmo lugar."</text:p>
      <text:p text:style-name="P46">- "Menos custos, mais previsibilidade e mais controle."</text:p>
      <text:p text:style-name="P46">- "A nova central inteligente de fretes."</text:p>
      <text:p text:style-name="P43"/>
      <text:p text:style-name="P43">========================================================</text:p>
      <text:p text:style-name="P43">6. PÁGINA DE INVESTIDORES</text:p>
      <text:p text:style-name="P43">========================================================</text:p>
      <text:p text:style-name="P43"/>
      <text:p text:style-name="P43">Atualizar a página /investors/ com a nova marca.</text:p>
      <text:p text:style-name="P43"/>
      <text:p text:style-name="P43"><text:soft-page-break/>Texto de abertura:</text:p>
      <text:p text:style-name="P43"/>
      <text:p text:style-name="P43">"FreteHub nasceu para resolver um dos maiores desafios da logística: conectar demanda, capacidade de transporte e inteligência operacional em tempo real."</text:p>
      <text:p text:style-name="P43"/>
      <text:p text:style-name="P43">Mensagem para investidores:</text:p>
      <text:p text:style-name="P43"/>
      <text:p text:style-name="P43">"Estamos construindo uma plataforma escalável para digitalizar, automatizar e otimizar o mercado de fretes, conectando embarcadores, motoristas autônomos, transportadoras e dados logísticos em um único hub inteligente."</text:p>
      <text:p text:style-name="P43"/>
      <text:p text:style-name="P43">Chamada final:</text:p>
      <text:p text:style-name="P43"/>
      <text:p text:style-name="P43">"FreteHub é mais do que um sistema de fretes. É uma infraestrutura digital para a logística inteligente."</text:p>
      <text:p text:style-name="P44"/>
      <text:p text:style-name="P46">Botões:</text:p>
      <text:p text:style-name="P46">- "Ver Demonstração"</text:p>
      <text:p text:style-name="P46">- "Agendar Apresentação"</text:p>
      <text:p text:style-name="P46">- "Conhecer Dashboard Executivo"</text:p>
      <text:p text:style-name="P46">- "Simular Operação"</text:p>
      <text:p text:style-name="P43"/>
      <text:p text:style-name="P43">========================================================</text:p>
      <text:p text:style-name="P43">7. PÁGINA DE PRODUTO</text:p>
      <text:p text:style-name="P43">========================================================</text:p>
      <text:p text:style-name="P44"/>
      <text:p text:style-name="P43">Atualizar textos para:</text:p>
      <text:p text:style-name="P44"/>
      <text:p text:style-name="P43"><text:soft-page-break/>"Com o FreteHub, empresas e pessoas podem solicitar fretes, acompanhar entregas, consultar ETA, acessar documentos, gerenciar pagamentos e usar IA para tomar decisões melhores."</text:p>
      <text:p text:style-name="P44"/>
      <text:p text:style-name="P46">Destacar módulos:</text:p>
      <text:p text:style-name="P44"/>
      <text:p text:style-name="P46">- Solicitação de frete</text:p>
      <text:p text:style-name="P46">- Matching inteligente</text:p>
      <text:p text:style-name="P46">- Rastreamento em tempo real</text:p>
      <text:p text:style-name="P46">- Gestão de motoristas</text:p>
      <text:p text:style-name="P46">- Gestão de veículos</text:p>
      <text:p text:style-name="P46">- Gestão de transportadoras</text:p>
      <text:p text:style-name="P46">- Precificação</text:p>
      <text:p text:style-name="P46">- Roteirização</text:p>
      <text:p text:style-name="P46">- ETA</text:p>
      <text:p text:style-name="P46">- Documentos</text:p>
      <text:p text:style-name="P46">- Pagamentos</text:p>
      <text:p text:style-name="P46">- Suporte</text:p>
      <text:p text:style-name="P46">- IA assistente</text:p>
      <text:p text:style-name="P46">- Dashboards executivos</text:p>
      <text:p text:style-name="P43">========================================================</text:p>
      <text:p text:style-name="P43">8. PÁGINA DE TECNOLOGIA</text:p>
      <text:p text:style-name="P43">========================================================</text:p>
      <text:p text:style-name="P46">Atualizar textos para:</text:p>
      <text:p text:style-name="P44"/>
      <text:p text:style-name="P46">"FreteHub foi desenhado com arquitetura moderna, APIs escaláveis, dados geográficos, automação assíncrona, WebSocket, IA e estrutura preparada para cloud."</text:p>
      <text:p text:style-name="P44"/>
      <text:p text:style-name="P43">Manter menções técnicas <text:span text:style-name="T9">anteriores.</text:span></text:p>
      <text:p text:style-name="P43">========================================================</text:p>
      <text:p text:style-name="P43">9. PÁGINA DE SEGURANÇA</text:p>
      <text:p text:style-name="P43">========================================================</text:p>
      <text:p text:style-name="P46"><text:soft-page-break/>Atualizar textos para:</text:p>
      <text:p text:style-name="P46">"No FreteHub, segurança, rastreabilidade e controle de acesso são parte central da arquitetura."</text:p>
      <text:p text:style-name="P44"/>
      <text:p text:style-name="P43">Destacar:</text:p>
      <text:p text:style-name="P44"/>
      <text:p text:style-name="P46">- JWT</text:p>
      <text:p text:style-name="P46">- Permissões por perfil</text:p>
      <text:p text:style-name="P46">- Auditoria</text:p>
      <text:p text:style-name="P46">- LGPD</text:p>
      <text:p text:style-name="P46">- Logs</text:p>
      <text:p text:style-name="P46">- Mascaramento de dados</text:p>
      <text:p text:style-name="P46">- Proteção de documentos</text:p>
      <text:p text:style-name="P46">- Segurança da IA</text:p>
      <text:p text:style-name="P44"/>
      <text:p text:style-name="P43">========================================================</text:p>
      <text:p text:style-name="P43">10. DASHBOARDS</text:p>
      <text:p text:style-name="P43">========================================================</text:p>
      <text:p text:style-name="P46">Atualizar títulos dos dashboards:</text:p>
      <text:p text:style-name="P44"/>
      <text:p text:style-name="P46">- "FreteHub Executive Dashboard"</text:p>
      <text:p text:style-name="P46">- "FreteHub Operações Inteligentes"</text:p>
      <text:p text:style-name="P46">- "FreteHub Financeiro"</text:p>
      <text:p text:style-name="P46">- "FreteHub IA"</text:p>
      <text:p text:style-name="P46">- "FreteHub Cliente"</text:p>
      <text:p text:style-name="P46">- "FreteHub Transportadora"</text:p>
      <text:p text:style-name="P46">- "FreteHub Motorista"</text:p>
      <text:p text:style-name="P43"/>
      <text:p text:style-name="P43">Nos dashboards, usar textos como:</text:p>
      <text:p text:style-name="P46"/>
      <text:p text:style-name="P46">- "Visão executiva do ecossistema FreteHub"</text:p>
      <text:p text:style-name="P46">- "Operação logística em tempo real"</text:p>
      <text:p text:style-name="P46"><text:soft-page-break/>- "Indicadores estratégicos para escala"</text:p>
      <text:p text:style-name="P46">- "Dados demonstrativos do FreteHub"</text:p>
      <text:p text:style-name="P46">- "Modo Demonstração FreteHub"</text:p>
      <text:p text:style-name="P43">========================================================</text:p>
      <text:p text:style-name="P43">11. SEO</text:p>
      <text:p text:style-name="P43">========================================================</text:p>
      <text:p text:style-name="P44"/>
      <text:p text:style-name="P46">Atualizar titles e meta descriptions.</text:p>
      <text:p text:style-name="P44"/>
      <text:p text:style-name="P46">Meta title principal:</text:p>
      <text:p text:style-name="P44"/>
      <text:p text:style-name="P46">FreteHub | Plataforma Inteligente de Fretes com IA</text:p>
      <text:p text:style-name="P46"/>
      <text:p text:style-name="P46">Meta description:</text:p>
      <text:p text:style-name="P46">Conecte cargas, motoristas e transportadoras com IA, rastreamento em tempo real, matching automático, ETA inteligente e dashboards executivos.</text:p>
      <text:p text:style-name="P46">Open Graph title:</text:p>
      <text:p text:style-name="P46">FreteHub — O hub inteligente da logística moderna</text:p>
      <text:p text:style-name="P46">Open Graph description:</text:p>
      <text:p text:style-name="P46">Uma plataforma completa para solicitar, rastrear, otimizar e gerenciar fretes com inteligência artificial e dados em tempo real.</text:p>
      <text:p text:style-name="P44"/>
      <text:p text:style-name="P43">========================================================</text:p>
      <text:p text:style-name="P43">12. DOCUMENTAÇÃO</text:p>
      <text:p text:style-name="P43">========================================================</text:p>
      <text:p text:style-name="P46">Atualizar README e docs/investor_demo.md para usar "FreteHub".</text:p>
      <text:p text:style-name="P43"/>
      <text:p text:style-name="P43">Adicionar seção:</text:p>
      <text:p text:style-name="P44"/>
      <text:p text:style-name="P43">"Identidade da Marca"</text:p>
      <text:p text:style-name="P44"/>
      <text:p text:style-name="P43">Conteúdo:</text:p>
      <text:p text:style-name="P44"/>
      <text:p text:style-name="P43"><text:soft-page-break/>Nome:</text:p>
      <text:p text:style-name="P43">FreteHub</text:p>
      <text:p text:style-name="P44"/>
      <text:p text:style-name="P46">Posicionamento:</text:p>
      <text:p text:style-name="P46">"FreteHub é o hub inteligente de fretes que conecta cargas, motoristas, transportadoras e dados em tempo real."</text:p>
      <text:p text:style-name="P46"/>
      <text:p text:style-name="P46">Proposta de valor:</text:p>
      <text:p text:style-name="P46">"Reduzir custos logísticos, aumentar previsibilidade, melhorar rastreabilidade e automatizar decisões operacionais usando tecnologia e inteligência artificial."</text:p>
      <text:p text:style-name="P43"/>
      <text:p text:style-name="P43">========================================================</text:p>
      <text:p text:style-name="P43">13. CUIDADO COM NOMES ANTIGOS</text:p>
      <text:p text:style-name="P43">========================================================</text:p>
      <text:p text:style-name="P46">Procurar e substituir:</text:p>
      <text:p text:style-name="P46">- Uber da Logística, quando estiver como nome principal</text:p>
      <text:p text:style-name="P46">- Sistema Inteligente de Logística, quando estiver como marca principal</text:p>
      <text:p text:style-name="P46"/>
      <text:p text:style-name="P46">Manter "Sistema Inteligente de Logística" apenas como descrição genérica, se fizer sentido.</text:p>
      <text:p text:style-name="P46"/>
      <text:p text:style-name="P46">Exemplo correto:</text:p>
      <text:p text:style-name="P46">"FreteHub é um sistema inteligente de logística."</text:p>
      <text:p text:style-name="P46">Exemplo incorreto:</text:p>
      <text:p text:style-name="P46">"O Sistema Inteligente de Logística é a marca principal."</text:p>
      <text:p text:style-name="P43">========================================================</text:p>
      <text:p text:style-name="P43">14. CRITÉRIOS DE ACEITE</text:p>
      <text:p text:style-name="P43">========================================================</text:p>
      <text:p text:style-name="P46"/>
      <text:p text:style-name="P46">A alteração estará concluída quando:</text:p>
      <text:p text:style-name="P46">1. "FreteHub" aparecer como marca principal na landing page.</text:p>
      <text:p text:style-name="P46">2. Header, footer e dashboards usarem FreteHub.</text:p>
      <text:p text:style-name="P46"><text:soft-page-break/>3. Página de investidores usar FreteHub.</text:p>
      <text:p text:style-name="P46">4. SEO usar FreteHub.</text:p>
      <text:p text:style-name="P46">5. README usar FreteHub.</text:p>
      <text:p text:style-name="P46">6. docs/investor_demo.md usar FreteHub.</text:p>
      <text:p text:style-name="P46">7. Modo demonstração exibir "Modo Demonstração FreteHub".</text:p>
      <text:p text:style-name="P46">8. Todas as funcionalidades existentes continuarem funcionando.</text:p>
      <text:p text:style-name="P46">9. Testes principais continuarem passando.</text:p>
      <text:p text:style-name="P43"/>
      <text:h text:style-name="Heading_20_1" text:outline-level="1">Módulo 6 — Front-End Comercial, Landing Page Investidora, Dashboards Executivos e Demo Inteligente</text:h>
      <text:p text:style-name="Text_20_body"/>
      <text:p text:style-name="Text_20_body">Este módulo é focado em criar uma <text:span text:style-name="T1">frente visual poderosa</text:span>, com <text:span text:style-name="T1">primeira página criativa</text:span>, <text:span text:style-name="T1">dashboards</text:span>, <text:span text:style-name="T1">consultas</text:span>, <text:span text:style-name="T1">KPIs</text:span>, <text:span text:style-name="T1">visual de plataforma inteligente</text:span>, <text:span text:style-name="T1">experiência para investidores</text:span> e <text:span text:style-name="T1">demonstração comercial do Sistema Inteligente de Logística</text:span>.</text:p>
      <text:p text:style-name="Text_20_body">A ideia é que, ao abrir o sistema, o investidor veja algo moderno, tecnológico, confiável e escalável.</text:p>
      <text:p text:style-name="Horizontal_20_Line"/>
      <text:p text:style-name="P9">Continue o desenvolvimento do projeto Uber da Logística / Sistema Inteligente de Logística usando Django.<text:line-break/><text:line-break/>Não remova funcionalidades dos módulos anteriores.<text:line-break/><text:line-break/>Neste Módulo 6, implemente uma camada visual, comercial, executiva e demonstrativa para apresentar o sistema a investidores, clientes estratégicos, transportadoras, embarcadores e parceiros.<text:line-break/><text:line-break/>O objetivo é criar uma primeira impressão extremamente profissional, moderna, criativa e convincente, mostrando que o sistema é uma plataforma inteligente de logística com IA, rastreamento, dashboards, automação, matching de motoristas, roteirização, ETA, gestão de fretes, gestão de frota, análise operacional e potencial de escala.<text:line-break/><text:line-break/>============================================================<text:line-break/>1. OBJETIVO DO MÓDULO 6<text:line-break/>============================================================<text:line-break/><text:line-break/>Criar uma frente inicial visual e comercial para o sistema, composta por:<text:line-break/><text:line-break/>- Landing page institucional e investidora<text:line-break/>- Página inicial criativa e chamativa<text:line-break/>- Dashboard executivo<text:line-break/>- Dashboard operacional<text:line-break/>- Dashboard financeiro<text:line-break/>- Dashboard logístico<text:line-break/>- Dashboard de IA<text:line-break/>- Painel de demonstração em tempo real<text:line-break/>- Páginas públicas para convencer investidores<text:line-break/>- Área de apresentação do produto<text:line-break/><text:soft-page-break/>- Área de simulação de frete<text:line-break/>- Área de indicadores de mercado<text:line-break/>- Área de diferenciais competitivos<text:line-break/>- Área de impacto econômico<text:line-break/>- Área de crescimento e escalabilidade<text:line-break/>- Front-end responsivo e moderno<text:line-break/>- Back-end com APIs para métricas e consultas<text:line-break/>- Dados demonstrativos para simulação<text:line-break/><text:line-break/>Este módulo deve transformar o sistema em uma plataforma apresentável para captação de investimento.<text:line-break/><text:line-break/>============================================================<text:line-break/>2. ESTILO VISUAL E POSICIONAMENTO<text:line-break/>============================================================<text:line-break/><text:line-break/>Criar uma identidade visual moderna, tecnológica e premium.<text:line-break/><text:line-break/>O sistema deve transmitir:<text:line-break/><text:line-break/>- Inteligência<text:line-break/>- Escalabilidade<text:line-break/>- Segurança<text:line-break/>- Automação<text:line-break/>- Eficiência logística<text:line-break/>- Tecnologia de IA<text:line-break/>- Confiança<text:line-break/>- Potencial de mercado<text:line-break/>- Redução de custos<text:line-break/>- Aumento de produtividade<text:line-break/>- Visão de futuro<text:line-break/><text:line-break/>Estilo visual sugerido:<text:line-break/><text:line-break/>- Tema escuro premium com detalhes em azul, verde, ciano ou roxo<text:line-break/>- Cards com glassmorphism ou visual SaaS moderno<text:line-break/>- Gradientes tecnológicos<text:line-break/>- Ícones de logística, IA, mapas, caminhões, rotas, gráficos e automação<text:line-break/>- Animações leves<text:line-break/>- Layout responsivo<text:line-break/>- Visual inspirado em dashboards SaaS, fintechs, plataformas de mobilidade e startups de IA<text:line-break/><text:line-break/>Criar opção de tema claro/escuro se possível.<text:line-break/><text:line-break/>============================================================<text:line-break/>3. TECNOLOGIA DE FRONT-END<text:line-break/>============================================================<text:line-break/><text:line-break/>Usar uma das abordagens abaixo, priorizando a mais adequada para integrar ao Django existente:<text:line-break/><text:line-break/>Opção A — Django Templates com HTMX, Alpine.js e Tailwind CSS:<text:line-break/>- Ideal para MVP rápido<text:line-break/>- Fácil integração<text:line-break/>- Menos complexidade<text:line-break/><text:line-break/>Opção B — Front-end separado com React ou Next.js:<text:line-break/>- Criar estrutura preparada para SPA<text:line-break/>- Consumir APIs Django REST<text:line-break/>- Melhor visual comercial<text:line-break/><text:line-break/>Escolha a melhor opção considerando velocidade, estabilidade e facilidade de apresentação para investidor.<text:line-break/><text:soft-page-break/><text:line-break/>Caso use Django Templates, implementar:<text:line-break/><text:line-break/>- templates organizados<text:line-break/>- base.html<text:line-break/>- componentes reutilizáveis<text:line-break/>- partials<text:line-break/>- Tailwind CSS<text:line-break/>- Alpine.js para interações<text:line-break/>- Chart.js ou ApexCharts para gráficos<text:line-break/>- Leaflet.js ou mapa placeholder para rotas<text:line-break/>- animações CSS leves<text:line-break/><text:line-break/>Caso use React/Next.js, implementar:<text:line-break/><text:line-break/>- frontend/<text:line-break/>- páginas públicas<text:line-break/>- dashboards<text:line-break/>- componentes<text:line-break/>- chamadas API<text:line-break/>- layout responsivo<text:line-break/>- gráficos<text:line-break/>- autenticação JWT preparada<text:line-break/><text:line-break/>============================================================<text:line-break/>4. PÁGINA INICIAL / LANDING PAGE INVESTIDORA<text:line-break/>============================================================<text:line-break/><text:line-break/>Criar uma página pública em:<text:line-break/><text:line-break/>GET /<text:line-break/><text:line-break/>ou:<text:line-break/><text:line-break/>GET /landing/<text:line-break/><text:line-break/>Essa será a primeira página do sistema.<text:line-break/><text:line-break/>Ela deve ser extremamente criativa, chamativa e persuasiva.<text:line-break/><text:line-break/>Seções obrigatórias:<text:line-break/><text:line-break/>------------------------------------------------------------<text:line-break/>4.1 HERO SECTION<text:line-break/>------------------------------------------------------------<text:line-break/><text:line-break/>Criar uma primeira dobra impactante com título forte <text:span text:style-name="T9">já mencionado</text:span>.<text:line-break/><text:line-break/>Exemplos de título:<text:line-break/><text:line-break/>"Sistema Inteligente de Logística com IA, Rastreamento em Tempo Real e Matching Automático de Fretes"<text:line-break/><text:line-break/><text:line-break/><text:line-break/>Subtítulo:<text:line-break/><text:line-break/>"Uma plataforma completa para solicitar, rastrear, otimizar e gerenciar fretes com inteligência artificial, dados em tempo real, automação operacional e dashboards executivos."<text:line-break/><text:line-break/>Elementos visuais:<text:line-break/><text:line-break/>- Caminhão em rota digital<text:line-break/><text:soft-page-break/>- Mapa tecnológico<text:line-break/>- Linhas de conexão<text:line-break/>- Cards flutuantes com indicadores<text:line-break/>- ETA em tempo real<text:line-break/>- IA recomendando veículo<text:line-break/>- Simulação de frete em andamento<text:line-break/><text:line-break/>Botões principais:<text:line-break/><text:line-break/>- "Ver Demonstração"<text:line-break/>- "Simular Frete"<text:line-break/>- "Acessar Dashboard"<text:line-break/>- "Apresentação para Investidores"<text:line-break/><text:line-break/>------------------------------------------------------------<text:line-break/>4.2 SEÇÃO DE PROBLEMA<text:line-break/>------------------------------------------------------------<text:line-break/><text:line-break/>Mostrar os problemas do mercado logístico:<text:line-break/><text:line-break/>- Falta de rastreabilidade<text:line-break/>- Fretes manuais<text:line-break/>- Alto custo operacional<text:line-break/>- Baixa previsibilidade<text:line-break/>- Ociosidade de veículos<text:line-break/>- Dificuldade de encontrar motoristas confiáveis<text:line-break/>- Falta de dados para tomada de decisão<text:line-break/>- Atrasos e perdas<text:line-break/>- Atendimento fragmentado<text:line-break/>- Pouca inteligência na roteirização<text:line-break/><text:line-break/>Mostrar em cards com ícones.<text:line-break/><text:line-break/>------------------------------------------------------------<text:line-break/>4.3 SEÇÃO DE SOLUÇÃO<text:line-break/>------------------------------------------------------------<text:line-break/><text:line-break/>Mostrar como o sistema resolve:<text:line-break/><text:line-break/>- Matching inteligente entre carga e veículo<text:line-break/>- Motoristas verificados<text:line-break/>- Rastreamento em tempo real<text:line-break/>- ETA automático<text:line-break/>- Precificação inteligente<text:line-break/>- IA assistente<text:line-break/>- Dashboards executivos<text:line-break/>- Gestão de documentos<text:line-break/>- Pagamentos simulados/integráveis<text:line-break/>- Roteirização inteligente<text:line-break/>- Relatórios e auditoria<text:line-break/><text:line-break/>------------------------------------------------------------<text:line-break/>4.4 SEÇÃO "COMO FUNCIONA"<text:line-break/>------------------------------------------------------------<text:line-break/><text:line-break/>Criar fluxo visual:<text:line-break/><text:line-break/>1. Cliente solicita frete<text:line-break/>2. IA recomenda veículo ideal<text:line-break/>3. Sistema calcula preço e rota<text:line-break/>4. Motoristas compatíveis recebem oferta<text:line-break/>5. Motorista aceita<text:line-break/>6. Carga é rastreada em tempo real<text:line-break/>7. Cliente acompanha ETA<text:line-break/><text:soft-page-break/>8. Entrega é confirmada<text:line-break/>9. Dados alimentam dashboards e IA<text:line-break/><text:line-break/>------------------------------------------------------------<text:line-break/>4.5 SEÇÃO DE INTELIGÊNCIA ARTIFICIAL<text:line-break/>------------------------------------------------------------<text:line-break/><text:line-break/>Mostrar que a IA ajuda em:<text:line-break/><text:line-break/>- Recomendação de veículo<text:line-break/>- Resposta a dúvidas<text:line-break/>- Consulta de ETA<text:line-break/>- Consulta de status<text:line-break/>- Abertura de chamados<text:line-break/>- Apoio ao suporte<text:line-break/>- Análise de operação<text:line-break/>- Base de conhecimento RAG<text:line-break/>- Redução de atendimento humano<text:line-break/><text:line-break/>Criar bloco visual com exemplo de chat:<text:line-break/><text:line-break/>Usuário:<text:line-break/>"Qual veículo uso para transportar soja?"<text:line-break/><text:line-break/>IA:<text:line-break/>"Para soja, recomendamos caminhão graneleiro, bitrem ou rodotrem graneleiro, com proteção contra umidade, lona quando necessário, romaneio, nota fiscal e pesagem."<text:line-break/><text:line-break/>------------------------------------------------------------<text:line-break/>4.6 SEÇÃO DE DASHBOARDS<text:line-break/>------------------------------------------------------------<text:line-break/><text:line-break/>Mostrar previews dos dashboards:<text:line-break/><text:line-break/>- Dashboard Executivo<text:line-break/>- Dashboard Operacional<text:line-break/>- Dashboard Financeiro<text:line-break/>- Dashboard de Fretes<text:line-break/>- Dashboard de Frota<text:line-break/>- Dashboard de IA<text:line-break/>- Dashboard de Rastreamento<text:line-break/><text:line-break/>Cada preview deve ter gráficos e indicadores fake/demonstrativos se ainda não houver dados reais.<text:line-break/><text:line-break/>------------------------------------------------------------<text:line-break/>4.7 SEÇÃO DE MERCADO E OPORTUNIDADE<text:line-break/>------------------------------------------------------------<text:line-break/><text:line-break/>Criar seção para convencer investidor.<text:line-break/><text:line-break/>Mostrar textos estratégicos:<text:line-break/><text:line-break/>- Logística é um dos maiores custos das empresas<text:line-break/>- Há grande fragmentação entre embarcadores, motoristas e transportadoras<text:line-break/>- Pequenas e médias empresas precisam de tecnologia acessível<text:line-break/>- Motoristas autônomos precisam de mais oportunidades<text:line-break/>- O mercado agrícola exige transporte eficiente de grãos secos<text:line-break/>- O setor de equipamentos e móveis exige fretes rápidos e rastreáveis<text:line-break/>- A IA pode reduzir suporte, melhorar matching e aumentar margem<text:line-break/><text:line-break/>Criar cards:<text:line-break/><text:line-break/><text:soft-page-break/>- Mercado endereçável<text:line-break/>- Receita recorrente<text:line-break/>- Comissão por frete<text:line-break/>- Planos para empresas<text:line-break/>- Serviços premium<text:line-break/>- Dados logísticos<text:line-break/>- Expansão regional<text:line-break/><text:line-break/>Não inventar números oficiais falsos. Se necessário, usar textos como "potencial estimado", "simulação" e "modelo projetado".<text:line-break/><text:line-break/>------------------------------------------------------------<text:line-break/>4.8 SEÇÃO DE MODELO DE NEGÓCIO<text:line-break/>------------------------------------------------------------<text:line-break/><text:line-break/>Mostrar possíveis fontes de receita:<text:line-break/><text:line-break/>- Comissão por frete<text:line-break/>- Assinatura para empresas<text:line-break/>- Plano para transportadoras<text:line-break/>- Taxa de tecnologia<text:line-break/>- Serviços premium de rastreamento<text:line-break/>- IA para suporte e operação<text:line-break/>- Relatórios avançados<text:line-break/>- Integrações fiscais e financeiras<text:line-break/>- Marketplace de seguros<text:line-break/>- Marketplace de serviços para motoristas<text:line-break/><text:line-break/>------------------------------------------------------------<text:line-break/>4.9 SEÇÃO DE TRAÇÃO SIMULADA / DEMO<text:line-break/>------------------------------------------------------------<text:line-break/><text:line-break/>Criar cards de demonstração com dados de exemplo:<text:line-break/><text:line-break/>- 1.240 fretes simulados<text:line-break/>- 380 motoristas cadastrados<text:line-break/>- 92 transportadoras<text:line-break/>- 18% redução média de custo operacional<text:line-break/>- 27% melhoria em previsibilidade de entrega<text:line-break/>- 96% rastreabilidade dos eventos<text:line-break/>- 4.8 avaliação média dos motoristas<text:line-break/><text:line-break/>Deixar claro no código e texto que são "dados demonstrativos do MVP" ou "simulação".<text:line-break/><text:line-break/>------------------------------------------------------------<text:line-break/>4.10 SEÇÃO DE ROADMAP<text:line-break/>------------------------------------------------------------<text:line-break/><text:line-break/>Mostrar roadmap:<text:line-break/><text:line-break/>Fase 1:<text:line-break/>- MVP operacional<text:line-break/>- Cadastro<text:line-break/>- Fretes<text:line-break/>- Motoristas<text:line-break/>- Veículos<text:line-break/>- Matching<text:line-break/>- Rastreamento<text:line-break/>- IA básica<text:line-break/><text:line-break/>Fase 2:<text:line-break/>- App mobile<text:line-break/>- Pagamentos reais<text:line-break/><text:soft-page-break/>- Integrações fiscais<text:line-break/>- Otimização avançada de rotas<text:line-break/>- Painéis BI<text:line-break/><text:line-break/>Fase 3:<text:line-break/>- IA preditiva<text:line-break/>- Expansão nacional<text:line-break/>- Marketplace de serviços<text:line-break/>- Integração com ERPs<text:line-break/>- API pública para embarcadores<text:line-break/><text:line-break/>------------------------------------------------------------<text:line-break/>4.11 CHAMADA PARA INVESTIDOR<text:line-break/>------------------------------------------------------------<text:line-break/><text:line-break/>Criar uma seção final forte:<text:line-break/><text:line-break/>"Estamos construindo a infraestrutura inteligente para a nova logística brasileira."<text:line-break/><text:line-break/>Botões:<text:line-break/><text:line-break/>- "Ver Dashboard Executivo"<text:line-break/>- "Solicitar Apresentação"<text:line-break/>- "Simular Operação"<text:line-break/>- "Entrar em Contato"<text:line-break/><text:line-break/>Criar formulário simples de interesse:<text:line-break/><text:line-break/>Campos:<text:line-break/><text:line-break/>- nome<text:line-break/>- email<text:line-break/>- telefone<text:line-break/>- empresa<text:line-break/>- perfil:<text:line-break/> <text:s/>- investidor<text:line-break/> <text:s/>- transportadora<text:line-break/> <text:s/>- embarcador<text:line-break/> <text:s/>- parceiro<text:line-break/> <text:s/>- outro<text:line-break/>- mensagem<text:line-break/><text:line-break/>Salvar no banco.<text:line-break/><text:line-break/>============================================================<text:line-break/>5. MODELO PARA LEADS DE INVESTIDORES E PARCEIROS<text:line-break/>============================================================<text:line-break/><text:line-break/>Criar app ou usar core/commercial.<text:line-break/><text:line-break/>Criar modelo InvestorLead:<text:line-break/><text:line-break/>- id<text:line-break/>- name<text:line-break/>- email<text:line-break/>- phone<text:line-break/>- company<text:line-break/>- profile_type:<text:line-break/> <text:s/>- investor<text:line-break/> <text:s/>- carrier<text:line-break/> <text:s/>- shipper<text:line-break/> <text:s/>- partner<text:line-break/> <text:s/>- press<text:line-break/><text:soft-page-break/> <text:s/>- other<text:line-break/>- estimated_interest_level:<text:line-break/> <text:s/>- low<text:line-break/> <text:s/>- medium<text:line-break/> <text:s/>- high<text:line-break/> <text:s/>- strategic<text:line-break/>- message<text:line-break/>- source_page<text:line-break/>- status:<text:line-break/> <text:s/>- new<text:line-break/> <text:s/>- contacted<text:line-break/> <text:s/>- meeting_scheduled<text:line-break/> <text:s/>- negotiating<text:line-break/> <text:s/>- converted<text:line-break/> <text:s/>- lost<text:line-break/>- notes<text:line-break/>- created_at<text:line-break/>- updated_at<text:line-break/><text:line-break/>Criar endpoints:<text:line-break/><text:line-break/>- POST /api/commercial/leads/<text:line-break/>- GET /api/admin/commercial/leads/<text:line-break/>- GET /api/admin/commercial/leads/{id}/<text:line-break/>- PATCH /api/admin/commercial/leads/{id}/<text:line-break/><text:line-break/>Criar página administrativa:<text:line-break/><text:line-break/>- /operations/investor-leads/<text:line-break/><text:line-break/>Permissões:<text:line-break/><text:line-break/>- Público pode criar lead.<text:line-break/>- Apenas admin, comercial ou superuser pode listar e editar leads.<text:line-break/><text:line-break/>Auditar criação e alteração de leads.<text:line-break/><text:line-break/>============================================================<text:line-break/>6. DASHBOARD EXECUTIVO<text:line-break/>============================================================<text:line-break/><text:line-break/>Criar página:<text:line-break/><text:line-break/>GET /executive/dashboard/<text:line-break/><text:line-break/>ou:<text:line-break/><text:line-break/>GET /operations/executive-dashboard/<text:line-break/><text:line-break/>Este dashboard deve ser visualmente impressionante e útil para investidores.<text:line-break/><text:line-break/>Indicadores principais:<text:line-break/><text:line-break/>- GMV simulado ou real<text:line-break/>- Receita da plataforma<text:line-break/>- Fretes criados<text:line-break/>- Fretes concluídos<text:line-break/>- Fretes em andamento<text:line-break/>- Ticket médio<text:line-break/>- Motoristas cadastrados<text:line-break/>- Motoristas online<text:line-break/>- Veículos aprovados<text:line-break/>- Empresas cadastradas<text:line-break/>- Transportadoras cadastradas<text:line-break/><text:soft-page-break/>- Taxa de conclusão<text:line-break/>- Taxa de cancelamento<text:line-break/>- Tempo médio de entrega<text:line-break/>- Percentual de entregas no prazo<text:line-break/>- Pedidos por categoria<text:line-break/>- Crescimento mensal<text:line-break/>- Receita por mês<text:line-break/>- Volume transportado<text:line-break/>- Cargas de equipamentos<text:line-break/>- Cargas de grãos secos<text:line-break/>- Chamados abertos<text:line-break/>- Conversas resolvidas pela IA<text:line-break/><text:line-break/>Gráficos:<text:line-break/><text:line-break/>- Receita mensal<text:line-break/>- Quantidade de fretes por mês<text:line-break/>- Fretes por status<text:line-break/>- Fretes por tipo de carga<text:line-break/>- Motoristas por status<text:line-break/>- Veículos por tipo<text:line-break/>- Entregas no prazo vs atrasadas<text:line-break/>- Mapa de calor operacional, se possível<text:line-break/>- Funil comercial de leads<text:line-break/><text:line-break/>Criar API:<text:line-break/><text:line-break/>GET /api/executive/dashboard/<text:line-break/><text:line-break/>Resposta:<text:line-break/><text:line-break/>{<text:line-break/> <text:s/>"success": true,<text:line-break/> <text:s/>"data": {<text:line-break/> <text:s text:c="3"/>"kpis": {},<text:line-break/> <text:s text:c="3"/>"charts": {},<text:line-break/> <text:s text:c="3"/>"last_updated": ""<text:line-break/> <text:s/>},<text:line-break/> <text:s/>"message": "Dashboard executivo carregado com sucesso."<text:line-break/>}<text:line-break/><text:line-break/>Usar dados reais do banco quando existirem.<text:line-break/>Quando não existirem, usar modo demo controlado por configuração:<text:line-break/><text:line-break/>DEMO_MODE=true<text:line-break/><text:line-break/>Nunca misturar dados falsos como se fossem reais. Se DEMO_MODE estiver ativo, exibir selo "Modo Demonstração".<text:line-break/><text:line-break/>============================================================<text:line-break/>7. DASHBOARD OPERACIONAL INTELIGENTE<text:line-break/>============================================================<text:line-break/><text:line-break/>Criar página:<text:line-break/><text:line-break/>GET /operations/intelligent-dashboard/<text:line-break/><text:line-break/>Indicadores:<text:line-break/><text:line-break/>- Fretes aguardando motorista<text:line-break/>- Fretes em rota<text:line-break/>- Fretes atrasados<text:line-break/>- Fretes com desvio de rota<text:line-break/>- Fretes parados<text:line-break/><text:soft-page-break/>- Motoristas online<text:line-break/>- Motoristas disponíveis<text:line-break/>- Veículos ativos<text:line-break/>- Ocorrências críticas<text:line-break/>- Documentos pendentes<text:line-break/>- Pagamentos pendentes<text:line-break/>- Tickets abertos<text:line-break/>- ETA médio<text:line-break/>- Alertas de operação<text:line-break/><text:line-break/>Funcionalidades:<text:line-break/><text:line-break/>- Lista de fretes críticos<text:line-break/>- Filtros por status<text:line-break/>- Filtros por tipo de carga<text:line-break/>- Filtros por transportadora<text:line-break/>- Filtros por região<text:line-break/>- Busca por cliente, motorista, placa, pedido<text:line-break/>- Timeline de eventos recentes<text:line-break/>- Cards de alertas<text:line-break/>- Mapa operacional ou placeholder<text:line-break/><text:line-break/>Criar API:<text:line-break/><text:line-break/>GET /api/operations/intelligent-dashboard/<text:line-break/><text:line-break/>============================================================<text:line-break/>8. DASHBOARD FINANCEIRO<text:line-break/>============================================================<text:line-break/><text:line-break/>Criar página:<text:line-break/><text:line-break/>GET /operations/financial-dashboard/<text:line-break/><text:line-break/>Indicadores:<text:line-break/><text:line-break/>- Receita total<text:line-break/>- Receita do mês<text:line-break/>- Pagamentos pagos<text:line-break/>- Pagamentos pendentes<text:line-break/>- Pagamentos falhos<text:line-break/>- Repasse a motoristas<text:line-break/>- Taxa da plataforma<text:line-break/>- Ticket médio<text:line-break/>- Receita por tipo de carga<text:line-break/>- Receita por região<text:line-break/>- Receita por transportadora<text:line-break/>- Projeção mensal<text:line-break/><text:line-break/>Gráficos:<text:line-break/><text:line-break/>- Receita por mês<text:line-break/>- Receita por categoria<text:line-break/>- Status dos pagamentos<text:line-break/>- Ticket médio mensal<text:line-break/>- Margem simulada<text:line-break/>- Ranking de clientes<text:line-break/><text:line-break/>Criar API:<text:line-break/><text:line-break/>GET /api/operations/financial-dashboard/<text:line-break/><text:line-break/>============================================================<text:line-break/>9. DASHBOARD DE IA<text:line-break/><text:soft-page-break/>============================================================<text:line-break/><text:line-break/>Criar página:<text:line-break/><text:line-break/>GET /operations/ai-dashboard/<text:line-break/><text:line-break/>Indicadores:<text:line-break/><text:line-break/>- Total de conversas<text:line-break/>- Conversas ativas<text:line-break/>- Conversas encerradas<text:line-break/>- Conversas escaladas<text:line-break/>- Taxa de resolução automática<text:line-break/>- Intenções mais comuns<text:line-break/>- Tickets criados pela IA<text:line-break/>- Perguntas sobre frete<text:line-break/>- Perguntas sobre documentos<text:line-break/>- Perguntas sobre rastreamento<text:line-break/>- Perguntas sobre pagamento<text:line-break/>- Usuários atendidos<text:line-break/>- Tempo médio de resposta<text:line-break/><text:line-break/>Gráficos:<text:line-break/><text:line-break/>- Conversas por dia<text:line-break/>- Intenções mais frequentes<text:line-break/>- Escalonamentos por motivo<text:line-break/>- Tickets abertos por IA<text:line-break/>- Base de conhecimento mais consultada<text:line-break/><text:line-break/>Criar API:<text:line-break/><text:line-break/>GET /api/operations/ai-dashboard/<text:line-break/><text:line-break/>============================================================<text:line-break/>10. DASHBOARD DE CLIENTE / EMBARCADOR<text:line-break/>============================================================<text:line-break/><text:line-break/>Melhorar portal do cliente:<text:line-break/><text:line-break/>GET /portal/dashboard/<text:line-break/><text:line-break/>Adicionar:<text:line-break/><text:line-break/>- Total de fretes<text:line-break/>- Fretes ativos<text:line-break/>- Fretes entregues<text:line-break/>- Fretes cancelados<text:line-break/>- Últimos pedidos<text:line-break/>- Próxima entrega<text:line-break/>- Gastos mensais<text:line-break/>- Fretes por tipo de carga<text:line-break/>- Status de pagamentos<text:line-break/>- Atalho para solicitar frete<text:line-break/>- Atalho para rastrear entrega<text:line-break/>- Chat IA em destaque<text:line-break/><text:line-break/>Criar visual moderno e simples.<text:line-break/><text:line-break/>============================================================<text:line-break/>11. DASHBOARD DA TRANSPORTADORA<text:line-break/>============================================================<text:line-break/><text:line-break/>Melhorar portal da transportadora:<text:line-break/><text:soft-page-break/><text:line-break/>GET /carrier/dashboard/<text:line-break/><text:line-break/>Adicionar:<text:line-break/><text:line-break/>- Motoristas vinculados<text:line-break/>- Motoristas online<text:line-break/>- Veículos cadastrados<text:line-break/>- Veículos aprovados<text:line-break/>- Fretes disponíveis<text:line-break/>- Fretes aceitos<text:line-break/>- Fretes concluídos<text:line-break/>- Ganhos estimados<text:line-break/>- Ranking de motoristas<text:line-break/>- Ocorrências<text:line-break/>- Documentos pendentes<text:line-break/>- Mapa da frota ou placeholder<text:line-break/>- Alertas operacionais<text:line-break/><text:line-break/>============================================================<text:line-break/>12. DASHBOARD DO MOTORISTA<text:line-break/>============================================================<text:line-break/><text:line-break/>Criar ou melhorar área do motorista:<text:line-break/><text:line-break/>GET /driver/dashboard/<text:line-break/><text:line-break/>Adicionar:<text:line-break/><text:line-break/>- Fretes disponíveis<text:line-break/>- Frete atual<text:line-break/>- Ganhos estimados<text:line-break/>- Histórico de entregas<text:line-break/>- Avaliação média<text:line-break/>- Status do perfil<text:line-break/>- Status do veículo<text:line-break/>- Documentos pendentes<text:line-break/>- Botão ficar online/offline<text:line-break/>- Próxima coleta<text:line-break/>- Chat IA para ajuda<text:line-break/><text:line-break/>Criar endpoints de apoio:<text:line-break/><text:line-break/>GET /api/driver/dashboard/<text:line-break/><text:line-break/>============================================================<text:line-break/>13. SIMULADOR DE FRETE NA PÁGINA INICIAL<text:line-break/>============================================================<text:line-break/><text:line-break/>Criar um simulador público ou semi-público na landing page.<text:line-break/><text:line-break/>Campos:<text:line-break/><text:line-break/>- origem<text:line-break/>- destino<text:line-break/>- tipo de carga<text:line-break/>- peso estimado<text:line-break/>- volume estimado<text:line-break/>- urgência<text:line-break/>- precisa ajudante<text:line-break/>- precisa seguro<text:line-break/><text:line-break/>Ao simular:<text:line-break/><text:line-break/><text:soft-page-break/>- chamar API de estimativa<text:line-break/>- retornar veículo recomendado<text:line-break/>- preço estimado demo<text:line-break/>- distância estimada<text:line-break/>- tempo estimado<text:line-break/>- vantagens do sistema<text:line-break/>- CTA para criar conta ou falar com comercial<text:line-break/><text:line-break/>Endpoint:<text:line-break/><text:line-break/>POST /api/public/freight-simulator/<text:line-break/><text:line-break/>Regras:<text:line-break/><text:line-break/>- Não exigir login para simulação simples<text:line-break/>- Aplicar rate limit<text:line-break/>- Não criar frete real sem autenticação<text:line-break/>- Se usuário autenticado quiser prosseguir, direcionar para criação real de frete<text:line-break/><text:line-break/>Resposta:<text:line-break/><text:line-break/>{<text:line-break/> <text:s/>"success": true,<text:line-break/> <text:s/>"data": {<text:line-break/> <text:s text:c="3"/>"recommended_vehicle": "",<text:line-break/> <text:s text:c="3"/>"estimated_price": "",<text:line-break/> <text:s text:c="3"/>"estimated_distance_km": "",<text:line-break/> <text:s text:c="3"/>"estimated_duration_minutes": "",<text:line-break/> <text:s text:c="3"/>"benefits": [],<text:line-break/> <text:s text:c="3"/>"cta": ""<text:line-break/> <text:s/>},<text:line-break/> <text:s/>"message": "Simulação realizada com sucesso."<text:line-break/>}<text:line-break/><text:line-break/>============================================================<text:line-break/>14. PÁGINA DE DEMONSTRAÇÃO AO VIVO<text:line-break/>============================================================<text:line-break/><text:line-break/>Criar página:<text:line-break/><text:line-break/>GET /demo/live-operation/<text:line-break/><text:line-break/>Objetivo:<text:line-break/><text:line-break/>Mostrar uma operação logística simulada em tempo real.<text:line-break/><text:line-break/>Elementos:<text:line-break/><text:line-break/>- mapa ou placeholder com caminhões<text:line-break/>- cards de fretes em andamento<text:line-break/>- ETA mudando<text:line-break/>- eventos de rastreamento aparecendo<text:line-break/>- IA sugerindo ações<text:line-break/>- alertas operacionais<text:line-break/>- gráfico em tempo real<text:line-break/>- timeline de eventos<text:line-break/><text:line-break/>Criar modo demo que simula:<text:line-break/><text:line-break/>- localização de caminhão<text:line-break/>- mudança de status<text:line-break/>- entrega próxima<text:line-break/>- ocorrência<text:line-break/><text:soft-page-break/>- resposta da IA<text:line-break/>- atualização de dashboard<text:line-break/><text:line-break/>Pode usar dados fake controlados e identificados como "Demonstração".<text:line-break/><text:line-break/>============================================================<text:line-break/>15. BACK-END DE CONSULTAS E MÉTRICAS<text:line-break/>============================================================<text:line-break/><text:line-break/>Criar services para métricas:<text:line-break/><text:line-break/>- ExecutiveMetricsService<text:line-break/>- OperationalMetricsService<text:line-break/>- FinancialMetricsService<text:line-break/>- AIMetricsService<text:line-break/>- CommercialMetricsService<text:line-break/>- DemoDataService<text:line-break/><text:line-break/>Cada service deve:<text:line-break/><text:line-break/>- consultar dados reais<text:line-break/>- aplicar filtros<text:line-break/>- retornar estrutura limpa para gráficos<text:line-break/>- usar cache quando necessário<text:line-break/>- suportar modo demo<text:line-break/><text:line-break/>Filtros comuns:<text:line-break/><text:line-break/>- data inicial<text:line-break/>- data final<text:line-break/>- status<text:line-break/>- tipo de carga<text:line-break/>- transportadora<text:line-break/>- cliente<text:line-break/>- motorista<text:line-break/>- veículo<text:line-break/>- região<text:line-break/>- categoria<text:line-break/><text:line-break/>Endpoints:<text:line-break/><text:line-break/>GET /api/metrics/executive/<text:line-break/>GET /api/metrics/operations/<text:line-break/>GET /api/metrics/financial/<text:line-break/>GET /api/metrics/ai/<text:line-break/>GET /api/metrics/commercial/<text:line-break/>GET /api/metrics/demo/<text:line-break/><text:line-break/>Adicionar cache com Redis para dashboards:<text:line-break/><text:line-break/>- cache por 1 a 5 minutos<text:line-break/>- invalidar em eventos importantes quando possível<text:line-break/><text:line-break/>============================================================<text:line-break/>16. CONSULTAS AVANÇADAS<text:line-break/>============================================================<text:line-break/><text:line-break/>Criar área:<text:line-break/><text:line-break/>GET /operations/advanced-search/<text:line-break/><text:line-break/>Permitir consultar:<text:line-break/><text:line-break/>- Fretes<text:line-break/><text:soft-page-break/>- Clientes<text:line-break/>- Motoristas<text:line-break/>- Veículos<text:line-break/>- Transportadoras<text:line-break/>- Pagamentos<text:line-break/>- Documentos<text:line-break/>- Tickets<text:line-break/>- Conversas de IA<text:line-break/>- Leads comerciais<text:line-break/><text:line-break/>Filtros:<text:line-break/><text:line-break/>- texto livre<text:line-break/>- status<text:line-break/>- data<text:line-break/>- tipo<text:line-break/>- categoria<text:line-break/>- origem<text:line-break/>- destino<text:line-break/>- usuário<text:line-break/>- placa<text:line-break/>- CPF/CNPJ mascarado<text:line-break/>- transportadora<text:line-break/>- valor mínimo/máximo<text:line-break/><text:line-break/>Endpoint:<text:line-break/><text:line-break/>GET /api/operations/search/<text:line-break/><text:line-break/>Resposta agrupada:<text:line-break/><text:line-break/>{<text:line-break/> <text:s/>"success": true,<text:line-break/> <text:s/>"data": {<text:line-break/> <text:s text:c="3"/>"freights": [],<text:line-break/> <text:s text:c="3"/>"drivers": [],<text:line-break/> <text:s text:c="3"/>"vehicles": [],<text:line-break/> <text:s text:c="3"/>"companies": [],<text:line-break/> <text:s text:c="3"/>"payments": [],<text:line-break/> <text:s text:c="3"/>"tickets": [],<text:line-break/> <text:s text:c="3"/>"ai_conversations": [],<text:line-break/> <text:s text:c="3"/>"leads": []<text:line-break/> <text:s/>},<text:line-break/> <text:s/>"message": "Consulta realizada com sucesso."<text:line-break/>}<text:line-break/><text:line-break/>Aplicar permissões rigorosas.<text:line-break/>Mascarar dados sensíveis.<text:line-break/><text:line-break/>============================================================<text:line-break/>17. PÁGINA DE APRESENTAÇÃO PARA INVESTIDOR<text:line-break/>============================================================<text:line-break/><text:line-break/>Criar página:<text:line-break/><text:line-break/>GET /investors/<text:line-break/><text:line-break/>Objetivo:<text:line-break/><text:line-break/>Ser uma página estilo pitch deck web.<text:line-break/><text:line-break/>Seções:<text:line-break/><text:line-break/>1. Visão geral<text:line-break/><text:soft-page-break/>2. Problema<text:line-break/>3. Solução<text:line-break/>4. Produto<text:line-break/>5. Demonstração<text:line-break/>6. Mercado<text:line-break/>7. Modelo de negócio<text:line-break/>8. Diferenciais<text:line-break/>9. Tecnologia<text:line-break/>10. Inteligência Artificial<text:line-break/>11. Segurança e LGPD<text:line-break/>12. Roadmap<text:line-break/>13. Indicadores do MVP<text:line-break/>14. Uso do investimento<text:line-break/>15. Contato<text:line-break/><text:line-break/>Seção "Uso do investimento":<text:line-break/><text:line-break/>- Desenvolvimento mobile<text:line-break/>- Integrações de pagamento<text:line-break/>- Integrações fiscais<text:line-break/>- Infraestrutura cloud<text:line-break/>- Aquisição de motoristas<text:line-break/>- Aquisição de clientes<text:line-break/>- Equipe comercial<text:line-break/>- Segurança e compliance<text:line-break/>- IA e dados<text:line-break/><text:line-break/>Criar CTA:<text:line-break/><text:line-break/>- "Quero conhecer a tese"<text:line-break/>- "Agendar reunião"<text:line-break/>- "Receber apresentação"<text:line-break/><text:line-break/>Salvar contatos em InvestorLead.<text:line-break/><text:line-break/>============================================================<text:line-break/>18. PÁGINA DE PRODUTO<text:line-break/>============================================================<text:line-break/><text:line-break/>Criar página:<text:line-break/><text:line-break/>GET /product/<text:line-break/><text:line-break/>Mostrar módulos do sistema:<text:line-break/><text:line-break/>- Solicitação de fretes<text:line-break/>- Cadastro de motoristas<text:line-break/>- Cadastro de veículos<text:line-break/>- Matching inteligente<text:line-break/>- IA assistente<text:line-break/>- Roteirização<text:line-break/>- ETA<text:line-break/>- Rastreamento<text:line-break/>- Pagamentos<text:line-break/>- Documentos<text:line-break/>- Dashboards<text:line-break/>- Suporte<text:line-break/>- Auditoria<text:line-break/>- LGPD<text:line-break/><text:line-break/>Cada módulo deve ter card visual com descrição.<text:line-break/><text:line-break/>============================================================<text:line-break/>19. PÁGINA DE TECNOLOGIA<text:line-break/><text:soft-page-break/>============================================================<text:line-break/><text:line-break/>Criar página:<text:line-break/><text:line-break/>GET /technology/<text:line-break/><text:line-break/>Mostrar arquitetura:<text:line-break/><text:line-break/>- Django<text:line-break/>- Django REST Framework<text:line-break/>- PostgreSQL/PostGIS<text:line-break/>- Redis<text:line-break/>- Celery<text:line-break/>- Channels<text:line-break/>- WebSocket<text:line-break/>- pgvector<text:line-break/>- IA com RAG<text:line-break/>- APIs externas<text:line-break/>- Cloud ready<text:line-break/>- Docker<text:line-break/>- Kubernetes ready<text:line-break/><text:line-break/>Mostrar diagrama visual simples com HTML/CSS/SVG se possível.<text:line-break/><text:line-break/>============================================================<text:line-break/>20. PÁGINA DE SEGURANÇA E COMPLIANCE<text:line-break/>============================================================<text:line-break/><text:line-break/>Criar página:<text:line-break/><text:line-break/>GET /security/<text:line-break/><text:line-break/>Mostrar:<text:line-break/><text:line-break/>- Autenticação JWT<text:line-break/>- Permissões por perfil<text:line-break/>- Auditoria<text:line-break/>- Logs<text:line-break/>- LGPD<text:line-break/>- Controle de acesso<text:line-break/>- Mascaramento de dados<text:line-break/>- Documentos protegidos<text:line-break/>- Rastreabilidade de eventos<text:line-break/>- Segurança da IA<text:line-break/><text:line-break/>============================================================<text:line-break/>21. COMPONENTES VISUAIS REUTILIZÁVEIS<text:line-break/>============================================================<text:line-break/><text:line-break/>Criar componentes para:<text:line-break/><text:line-break/>- KPI Card<text:line-break/>- Chart Card<text:line-break/>- Status Badge<text:line-break/>- Timeline<text:line-break/>- Activity Feed<text:line-break/>- Map Placeholder<text:line-break/>- Freight Status Card<text:line-break/>- Driver Card<text:line-break/>- Vehicle Card<text:line-break/>- AI Chat Preview<text:line-break/>- Investor CTA<text:line-break/>- Pricing Simulator<text:line-break/>- Lead Form<text:line-break/><text:soft-page-break/>- Dashboard Layout<text:line-break/>- Sidebar<text:line-break/>- Topbar<text:line-break/>- Theme Toggle<text:line-break/>- Loading Skeleton<text:line-break/>- Empty State<text:line-break/>- Error State<text:line-break/><text:line-break/>============================================================<text:line-break/>22. DADOS DEMONSTRATIVOS<text:line-break/>============================================================<text:line-break/><text:line-break/>Atualizar seed:<text:line-break/><text:line-break/>python manage.py seed_initial_data<text:line-break/><text:line-break/>Adicionar dados suficientes para dashboards:<text:line-break/><text:line-break/>- 50 clientes demo<text:line-break/>- 80 motoristas demo<text:line-break/>- 60 veículos demo<text:line-break/>- 20 transportadoras demo<text:line-break/>- 200 fretes demo<text:line-break/>- 150 pagamentos demo<text:line-break/>- 300 tracking events demo<text:line-break/>- 100 notificações demo<text:line-break/>- 50 conversas IA demo<text:line-break/>- 30 tickets suporte demo<text:line-break/>- 20 leads comerciais demo<text:line-break/><text:line-break/>Distribuir os dados por status, datas e categorias para gerar gráficos bonitos.<text:line-break/><text:line-break/>Criar comando opcional:<text:line-break/><text:line-break/>python manage.py seed_demo_dashboard<text:line-break/><text:line-break/>Este comando deve criar apenas dados para apresentação comercial.<text:line-break/><text:line-break/>Garantir que dados demo sejam claramente marcados com:<text:line-break/><text:line-break/>is_demo = true<text:line-break/><text:line-break/>Quando o modelo não tiver campo is_demo, usar metadata ou padrão de nomes.<text:line-break/><text:line-break/>============================================================<text:line-break/>23. CONFIGURAÇÃO DEMO_MODE<text:line-break/>============================================================<text:line-break/><text:line-break/>Adicionar variável no .env.example:<text:line-break/><text:line-break/>DEMO_MODE=true<text:line-break/><text:line-break/>Quando DEMO_MODE=true:<text:line-break/><text:line-break/>- mostrar selo "Modo Demonstração"<text:line-break/>- permitir dados demonstrativos<text:line-break/>- preencher dashboards com simulações<text:line-break/>- facilitar apresentação ao investidor<text:line-break/><text:line-break/>Quando DEMO_MODE=false:<text:line-break/><text:line-break/>- usar apenas dados reais<text:line-break/>- não mostrar métricas simuladas como reais<text:line-break/><text:line-break/><text:soft-page-break/>============================================================<text:line-break/>24. ADMIN DJANGO<text:line-break/>============================================================<text:line-break/><text:line-break/>Customizar Django Admin para:<text:line-break/><text:line-break/>- InvestorLead<text:line-break/>- Métricas comerciais se houver<text:line-break/>- Dados demo<text:line-break/>- Configurações comerciais<text:line-break/>- Leads por status<text:line-break/>- Leads por perfil<text:line-break/>- Leads por origem<text:line-break/><text:line-break/>Adicionar filtros:<text:line-break/><text:line-break/>- perfil<text:line-break/>- status<text:line-break/>- nível de interesse<text:line-break/>- data<text:line-break/>- origem<text:line-break/><text:line-break/>============================================================<text:line-break/>25. PERMISSÕES<text:line-break/>============================================================<text:line-break/><text:line-break/>Definir permissões:<text:line-break/><text:line-break/>Páginas públicas:<text:line-break/><text:line-break/>- /<text:line-break/>- /landing/<text:line-break/>- /investors/<text:line-break/>- /product/<text:line-break/>- /technology/<text:line-break/>- /security/<text:line-break/>- /demo/live-operation/<text:line-break/>- /api/public/freight-simulator/<text:line-break/>- /api/commercial/leads/<text:line-break/><text:line-break/>Páginas protegidas:<text:line-break/><text:line-break/>- dashboards operacionais<text:line-break/>- dashboard financeiro<text:line-break/>- dashboard de IA<text:line-break/>- consultas avançadas<text:line-break/>- leads comerciais<text:line-break/><text:line-break/>Regras:<text:line-break/><text:line-break/>- Admin acessa tudo<text:line-break/>- Operação acessa dashboard operacional<text:line-break/>- Financeiro acessa financeiro<text:line-break/>- Suporte acessa tickets e IA<text:line-break/>- Comercial acessa leads e investidores<text:line-break/>- Cliente acessa apenas seu dashboard<text:line-break/>- Motorista acessa apenas seu dashboard<text:line-break/>- Transportadora acessa apenas seus dados<text:line-break/><text:line-break/>============================================================<text:line-break/>26. PERFORMANCE<text:line-break/>============================================================<text:line-break/><text:line-break/>Implementar:<text:line-break/><text:soft-page-break/><text:line-break/>- cache para métricas<text:line-break/>- paginação nas consultas<text:line-break/>- queries otimizadas<text:line-break/>- select_related e prefetch_related<text:line-break/>- índices se necessário<text:line-break/>- agregações no banco<text:line-break/>- evitar N+1 queries<text:line-break/>- compressão de assets se possível<text:line-break/><text:line-break/>============================================================<text:line-break/>27. RESPONSIVIDADE<text:line-break/>============================================================<text:line-break/><text:line-break/>Todas as páginas devem funcionar bem em:<text:line-break/><text:line-break/>- desktop<text:line-break/>- notebook<text:line-break/>- tablet<text:line-break/>- celular<text:line-break/><text:line-break/>A landing page deve ser bonita no mobile.<text:line-break/><text:line-break/>Os dashboards devem adaptar cards e gráficos para telas menores.<text:line-break/><text:line-break/>============================================================<text:line-break/>28. ACESSIBILIDADE<text:line-break/>============================================================<text:line-break/><text:line-break/>Implementar:<text:line-break/><text:line-break/>- contraste adequado<text:line-break/>- labels nos formulários<text:line-break/>- navegação por teclado básica<text:line-break/>- textos alternativos<text:line-break/>- botões claros<text:line-break/>- feedback de erro/sucesso<text:line-break/><text:line-break/>============================================================<text:line-break/>29. SEO BÁSICO<text:line-break/>============================================================<text:line-break/><text:line-break/>Para páginas públicas, adicionar:<text:line-break/><text:line-break/>- title<text:line-break/>- meta description<text:line-break/>- Open Graph<text:line-break/>- favicon<text:line-break/>- robots básico<text:line-break/>- sitemap simples se possível<text:line-break/><text:line-break/>Exemplos de títulos:<text:line-break/><text:line-break/>- "Uber da Logística | Plataforma Inteligente de Fretes com IA"<text:line-break/>- "Sistema Inteligente de Logística com Rastreamento em Tempo Real"<text:line-break/>- "Logística com IA, Matching de Fretes e Dashboards Executivos"<text:line-break/><text:line-break/>============================================================<text:line-break/>30. TESTES<text:line-break/>============================================================<text:line-break/><text:line-break/>Criar testes para:<text:line-break/><text:line-break/>- acesso à landing page<text:line-break/><text:soft-page-break/>- envio de lead<text:line-break/>- simulador de frete público<text:line-break/>- dashboard executivo autenticado<text:line-break/>- dashboard operacional autenticado<text:line-break/>- dashboard financeiro com permissão<text:line-break/>- bloqueio de acesso sem permissão<text:line-break/>- métricas executivas retornando estrutura correta<text:line-break/>- modo demo ativo<text:line-break/>- consulta avançada<text:line-break/>- mascaramento de dados sensíveis<text:line-break/>- seed_demo_dashboard<text:line-break/><text:line-break/>============================================================<text:line-break/>31. DOCUMENTAÇÃO<text:line-break/>============================================================<text:line-break/><text:line-break/>Atualizar README com:<text:line-break/><text:line-break/>- objetivo do Módulo 6<text:line-break/>- rotas públicas<text:line-break/>- rotas de dashboards<text:line-break/>- endpoints de métricas<text:line-break/>- como ativar DEMO_MODE<text:line-break/>- como gerar dados demo<text:line-break/>- como acessar a apresentação de investidores<text:line-break/>- como usar simulador público<text:line-break/>- como testar permissões<text:line-break/>- como personalizar identidade visual<text:line-break/><text:line-break/>Criar também arquivo:<text:line-break/><text:line-break/>docs/investor_demo.md<text:line-break/><text:line-break/>Conteúdo:<text:line-break/><text:line-break/>- roteiro para apresentação ao investidor<text:line-break/>- páginas que devem ser mostradas<text:line-break/>- sequência recomendada<text:line-break/>- principais argumentos<text:line-break/>- principais métricas simuladas<text:line-break/>- cuidado para explicar dados demo<text:line-break/>- proposta de valor<text:line-break/>- modelo de negócio<text:line-break/>- próximos passos<text:line-break/><text:line-break/>============================================================<text:line-break/>32. ROTEIRO DE DEMONSTRAÇÃO PARA INVESTIDOR<text:line-break/>============================================================<text:line-break/><text:line-break/>Criar no docs/investor_demo.md um roteiro como:<text:line-break/><text:line-break/>1. Abrir landing page<text:line-break/>2. Mostrar o problema da logística<text:line-break/>3. Mostrar a solução<text:line-break/>4. Simular um frete<text:line-break/>5. Mostrar recomendação de veículo<text:line-break/>6. Mostrar dashboard executivo<text:line-break/>7. Mostrar operação em tempo real<text:line-break/>8. Mostrar rastreamento<text:line-break/>9. Mostrar IA respondendo dúvidas<text:line-break/>10. Mostrar dashboard financeiro<text:line-break/>11. Mostrar roadmap<text:line-break/>12. Finalizar com chamada de investimento<text:line-break/><text:line-break/><text:soft-page-break/>============================================================<text:line-break/>33. CRITÉRIOS DE ACEITE DO MÓDULO 6<text:line-break/>============================================================<text:line-break/><text:line-break/>O módulo estará pronto quando:<text:line-break/><text:line-break/>1. A página inicial pública estiver visualmente forte e persuasiva.<text:line-break/>2. A página de investidores funcionar como pitch deck web.<text:line-break/>3. O simulador público de frete funcionar.<text:line-break/>4. O formulário de lead salvar dados no banco.<text:line-break/>5. Dashboard executivo funcionar.<text:line-break/>6. Dashboard operacional funcionar.<text:line-break/>7. Dashboard financeiro funcionar.<text:line-break/>8. Dashboard de IA funcionar.<text:line-break/>9. Portal do cliente tiver dashboard melhorado.<text:line-break/>10. Portal da transportadora tiver dashboard melhorado.<text:line-break/>11. Portal do motorista tiver dashboard.<text:line-break/>12. Consulta avançada funcionar.<text:line-break/>13. Modo demonstração funcionar.<text:line-break/>14. Seed demo gerar dados para apresentação.<text:line-break/>15. Dados demo forem identificados corretamente.<text:line-break/>16. Permissões estiverem protegendo dashboards.<text:line-break/>17. Layout for responsivo.<text:line-break/>18. README e docs/investor_demo.md estiverem atualizados.<text:line-break/>19. Testes principais passarem.<text:line-break/>20. O sistema estiver pronto para ser apresentado a um investidor.<text:line-break/><text:line-break/>Implemente este módulo com código real, templates ou frontend moderno, APIs, services, serializers, views, URLs, permissions, admin, testes, seed demo e documentação.</text:p>
      <text:p text:style-name="Horizontal_20_Lin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Prompt Complementar — Refinamento Visual Premium</text:h>
      <text:p text:style-name="Text_20_body">Use este prompt depois que o Antigravity terminar o Módulo 6, para melhorar a aparência.</text:p>
      <text:p text:style-name="P9">Agora refine visualmente o Módulo 6 para deixar a apresentação com aparência premium de startup SaaS de logística e inteligência artificial.<text:line-break/><text:line-break/>Melhore:<text:line-break/><text:line-break/>- landing page<text:line-break/>- página de investidores<text:line-break/>- dashboards<text:line-break/>- cards<text:line-break/>- gráficos<text:line-break/>- botões<text:line-break/>- espaçamentos<text:line-break/>- tipografia<text:line-break/><text:soft-page-break/>- cores<text:line-break/>- responsividade<text:line-break/>- animações leves<text:line-break/>- componentes reutilizáveis<text:line-break/><text:line-break/>O visual deve convencer um investidor de que o sistema é moderno, escalável e pronto para mercado.<text:line-break/><text:line-break/>Use estilo tecnológico, limpo, profissional e persuasivo.<text:line-break/><text:line-break/>Mantenha todas as funcionalidades existentes.<text:line-break/><text:line-break/>Não remova endpoints, permissões ou modelos.<text:line-break/><text:line-break/>Apenas melhore UI, UX, copywriting, organização visual e experiência de apresentação.</text:p>
      <text:p text:style-name="Horizontal_20_Line"/>
      <text:h text:style-name="Heading_20_1" text:outline-level="1">Sugestão de Frase Forte para a Primeira Página</text:h>
      <text:p text:style-name="Text_20_body">Você pode usar esta frase como chamada principal:</text:p>
      <text:p text:style-name="P9">A nova infraestrutura inteligente para conectar cargas, motoristas, transportadoras e dados em tempo real.</text:p>
      <text:p text:style-name="Text_20_body">Subtítulo:</text:p>
      <text:p text:style-name="P9">Uma plataforma logística com IA, matching automático, rastreamento em tempo real, ETA inteligente, dashboards executivos e automação operacional para reduzir custos e aumentar previsibilidade.</text:p>
      <text:p text:style-name="Text_20_body">CTA:</text:p>
      <text:p text:style-name="P9">Ver demonstração inteligente</text:p>
      <text:p text:style-name="Horizontal_20_Line"/>
      <text:h text:style-name="Heading_20_1" text:outline-level="1">Estrutura Final Recomendada dos Módulos</text:h>
      <text:p text:style-name="P9">Módulo 1 — Base, <text:span text:style-name="T10">SQLite</text:span>, Django, Usuários e Segurança<text:line-break/>Módulo 2 — Motoristas, Veículos, Cargas e Documentos<text:line-break/>Módulo 3 — Fretes, Preço, Matching, Rotas, ETA e Pagamentos<text:line-break/>Módulo 4 — Rastreamento, WebSocket, Portais e Relatórios<text:line-break/>Módulo 5 — IA Embutida, RAG, Suporte, LGPD e Finalização<text:line-break/>Módulo 6 — Landing Page, Dashboards, Front-End Comercial e Demo para Investidores</text:p>
      <text:p text:style-name="Text_20_body">Esse <text:span text:style-name="T1">Módulo 6</text:span> é justamente a parte ideal para transformar o sistema em uma <text:span text:style-name="T1">vitrine de investimento</text:span>, mostrando não apenas tecnologia, mas também <text:span text:style-name="T1">mercado, produto, operação, dados, escalabilidade e potencial financeiro</text:span>.</text:p>
      <text:p text:style-name="Text_20_body"/>
      <text:h text:style-name="P47" text:outline-level="1"><text:bookmark text:name="user-content-lista-de-tarefas--módulo-4-rastreamento-websockets-portais-e-relatórios"/>Lista de Tarefas —<text:span text:style-name="T11"> Módulo 4: Rastreamento, WebSockets, Portais e Relatórios</text:span></text:h>
      <text:list text:style-name="L19">
        <text:list-item>
          <text:p text:style-name="P48"><text:span text:style-name="Source_20_Text"><text:span text:style-name="T12">[x]</text:span></text:span><text:span text:style-name="T12"> 1. Implementar o modelo </text:span><text:span text:style-name="Source_20_Text"><text:span text:style-name="T12">TrackingEvent</text:span></text:span><text:span text:style-name="T12"> em </text:span><text:span text:style-name="Source_20_Text"><text:span text:style-name="T12">apps/tracking/models.py</text:span></text:span></text:p>
        </text:list-item>
        <text:list-item>
          <text:p text:style-name="P48"><text:soft-page-break/><text:span text:style-name="Source_20_Text"><text:span text:style-name="T12">[x]</text:span></text:span><text:span text:style-name="T12"> 2. Registrar </text:span><text:span text:style-name="Source_20_Text"><text:span text:style-name="T12">TrackingEvent</text:span></text:span><text:span text:style-name="T12"> no painel administrativo em </text:span><text:span text:style-name="Source_20_Text"><text:span text:style-name="T12">apps/tracking/admin.py</text:span></text:span></text:p>
        </text:list-item>
        <text:list-item>
          <text:p text:style-name="P48"><text:span text:style-name="Source_20_Text"><text:span text:style-name="T12">[x]</text:span></text:span><text:span text:style-name="T12"> 3. Gerar e executar as migrações para a nova tabela de rastreamento</text:span></text:p>
        </text:list-item>
        <text:list-item>
          <text:p text:style-name="P48"><text:span text:style-name="Source_20_Text"><text:span text:style-name="T12">[x]</text:span></text:span><text:span text:style-name="T12"> 4. Implementar a lógica operacional do </text:span><text:span text:style-name="Source_20_Text"><text:span text:style-name="T12">TrackingService</text:span></text:span><text:span text:style-name="T12"> em </text:span><text:span text:style-name="Source_20_Text"><text:span text:style-name="T12">apps/tracking/services.py</text:span></text:span></text:p>
        </text:list-item>
        <text:list-item>
          <text:p text:style-name="P48"><text:span text:style-name="Source_20_Text"><text:span text:style-name="T12">[x]</text:span></text:span><text:span text:style-name="T12"> 5. Criar serializers em </text:span><text:span text:style-name="Source_20_Text"><text:span text:style-name="T12">apps/tracking/serializers.py</text:span></text:span></text:p>
        </text:list-item>
        <text:list-item>
          <text:p text:style-name="P48"><text:span text:style-name="Source_20_Text"><text:span text:style-name="T12">[x]</text:span></text:span><text:span text:style-name="T12"> 6. Implementar as views e endpoints HTTP de rastreamento em </text:span><text:span text:style-name="Source_20_Text"><text:span text:style-name="T12">apps/tracking/views.py</text:span></text:span></text:p>
        </text:list-item>
        <text:list-item>
          <text:p text:style-name="P48"><text:span text:style-name="Source_20_Text"><text:span text:style-name="T12">[x]</text:span></text:span><text:span text:style-name="T12"> 7. Mapear as rotas em </text:span><text:span text:style-name="Source_20_Text"><text:span text:style-name="T12">apps/tracking/urls.py</text:span></text:span></text:p>
        </text:list-item>
        <text:list-item>
          <text:p text:style-name="P48"><text:span text:style-name="Source_20_Text"><text:span text:style-name="T12">[x]</text:span></text:span><text:span text:style-name="T12"> 8. Desenvolver os consumers WebSocket em </text:span><text:span text:style-name="Source_20_Text"><text:span text:style-name="T12">apps/tracking/consumers.py</text:span></text:span></text:p>
        </text:list-item>
        <text:list-item>
          <text:p text:style-name="P48"><text:span text:style-name="Source_20_Text"><text:span text:style-name="T12">[x]</text:span></text:span><text:span text:style-name="T12"> 9. Definir o roteamento WebSocket em </text:span><text:span text:style-name="Source_20_Text"><text:span text:style-name="T12">apps/tracking/routing.py</text:span></text:span></text:p>
        </text:list-item>
        <text:list-item>
          <text:p text:style-name="P48"><text:span text:style-name="Source_20_Text"><text:span text:style-name="T12">[x]</text:span></text:span><text:span text:style-name="T12"> 10. Atualizar </text:span><text:span text:style-name="Source_20_Text"><text:span text:style-name="T12">config/asgi.py</text:span></text:span><text:span text:style-name="T12"> para incluir o suporte a WebSockets</text:span></text:p>
        </text:list-item>
        <text:list-item>
          <text:p text:style-name="P48"><text:span text:style-name="Source_20_Text"><text:span text:style-name="T12">[x]</text:span></text:span><text:span text:style-name="T12"> 11. Implementar as views dos portais (Cliente, Transportadora, Operações) e relatórios básicos em </text:span><text:span text:style-name="Source_20_Text"><text:span text:style-name="T12">apps/core/views.py</text:span></text:span></text:p>
        </text:list-item>
        <text:list-item>
          <text:p text:style-name="P48"><text:span text:style-name="Source_20_Text"><text:span text:style-name="T12">[x]</text:span></text:span><text:span text:style-name="T12"> 12. Configurar as URLs dos portais em </text:span><text:span text:style-name="Source_20_Text"><text:span text:style-name="T12">apps/core/urls.py</text:span></text:span><text:span text:style-name="T12"> e associá-las no </text:span><text:span text:style-name="Source_20_Text"><text:span text:style-name="T12">config/urls.py</text:span></text:span></text:p>
        </text:list-item>
        <text:list-item>
          <text:p text:style-name="P48"><text:span text:style-name="Source_20_Text"><text:span text:style-name="T12">[x]</text:span></text:span><text:span text:style-name="T12"> 13. Criar os templates HTML/CSS/JS para os três portais em </text:span><text:span text:style-name="Source_20_Text"><text:span text:style-name="T12">apps/core/templates/core/</text:span></text:span></text:p>
        </text:list-item>
        <text:list-item>
          <text:p text:style-name="P48"><text:span text:style-name="Source_20_Text"><text:span text:style-name="T12">[x]</text:span></text:span><text:span text:style-name="T12"> 14. Criar a suíte de testes automatizados em </text:span><text:span text:style-name="Source_20_Text"><text:span text:style-name="T12">apps/tracking/tests.py</text:span></text:span></text:p>
        </text:list-item>
        <text:list-item>
          <text:p text:style-name="P49"><text:span text:style-name="Source_20_Text"><text:span text:style-name="T12">[x]</text:span></text:span><text:span text:style-name="T12"> 15. Executar a validação e testes globais de ponta a ponta</text:span></text:p>
        </text:list-item>
      </text:list>
      <text:p text:style-name="P5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Inter" svg:font-family="Inter, 'Inter Fallback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30T13:33:09.188618700</meta:creation-date>
    <dc:date>2026-05-30T23:10:31.027790900</dc:date>
    <meta:editing-duration>PT3H18M50S</meta:editing-duration>
    <meta:editing-cycles>7</meta:editing-cycles>
    <meta:generator>LibreOffice/26.2.3.2$Windows_X86_64 LibreOffice_project/70e089b17412e4cb7773e41413306b17a2328c34</meta:generator>
    <meta:document-statistic meta:table-count="0" meta:image-count="0" meta:object-count="0" meta:page-count="175" meta:paragraph-count="1229" meta:word-count="26150" meta:character-count="206035" meta:non-whitespace-character-count="170338"/>
  </office:meta>
</office:document-meta>
</file>