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5pt" fo:font-weight="bold" officeooo:rsid="000a7578" officeooo:paragraph-rsid="001494da" style:font-size-asian="15pt" style:font-weight-asian="bold" style:font-size-complex="15pt" style:font-weight-complex="bold"/>
    </style:style>
    <style:style style:name="P2" style:family="paragraph" style:parent-style-name="Text_20_body">
      <style:text-properties fo:font-size="6pt" fo:font-weight="bold" officeooo:rsid="000a7578" officeooo:paragraph-rsid="001494da" style:font-size-asian="5.25pt" style:font-weight-asian="bold" style:font-size-complex="6pt" style:font-weight-complex="bold"/>
    </style:style>
    <style:style style:name="P3" style:family="paragraph" style:parent-style-name="Text_20_body">
      <style:text-properties fo:font-size="13pt" fo:font-weight="bold" officeooo:rsid="000a7578" officeooo:paragraph-rsid="001494da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bold" officeooo:rsid="000a7578" officeooo:paragraph-rsid="001494da" style:font-size-asian="12pt" style:font-weight-asian="bold" style:font-size-complex="12pt" style:font-weight-complex="bold"/>
    </style:style>
    <style:style style:name="P5" style:family="paragraph" style:parent-style-name="Heading_20_1">
      <style:text-properties officeooo:paragraph-rsid="001494da"/>
    </style:style>
    <style:style style:name="P6" style:family="paragraph" style:parent-style-name="Text_20_body">
      <style:text-properties officeooo:paragraph-rsid="001494da"/>
    </style:style>
    <style:style style:name="P7" style:family="paragraph" style:parent-style-name="Horizontal_20_Line">
      <style:text-properties officeooo:paragraph-rsid="001494da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1494da"/>
    </style:style>
    <style:style style:name="T1" style:family="text">
      <style:text-properties officeooo:rsid="000e8e60"/>
    </style:style>
    <style:style style:name="T2" style:family="text">
      <style:text-properties officeooo:rsid="000af35b"/>
    </style:style>
    <style:style style:name="T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es de Fazermos um o módulo 6 faça o seguinte prompt:</text:p>
      <text:p text:style-name="P1">Atualize todo o projeto para substituir a marca anterior <text:s/>pela nova marca oficial:</text:p>
      <text:p text:style-name="P2"/>
      <text:p text:style-name="P1">FreteHub</text:p>
      <text:p text:style-name="P2"/>
      <text:p text:style-name="P3">A marca FreteHub deve ser usada como nome principal do sistema em todas as páginas públicas, dashboards, menus, rodapés, títulos, textos institucionais, documentação e páginas de investidores.</text:p>
      <text:p text:style-name="P1"/>
      <text:p text:style-name="P1">IMPORTANTE:</text:p>
      <text:p text:style-name="P4">- Substituir todas as ocorrências visíveis <text:s/>por "FreteHub".</text:p>
      <text:p text:style-name="P4">- Se houver referências internas de código, variáveis ou constantes relacionadas à marca, atualizar de forma segura sem quebrar funcionalidades.</text:p>
      <text:p text:style-name="P4">- Não remover funcionalidades existentes.</text:p>
      <text:p text:style-name="P4">- Não alterar regras de negócio.</text:p>
      <text:p text:style-name="P4">- Apenas atualizar identidade visual, textos de marca, títulos, slogans, SEO, documentação e apresentação.</text:p>
      <text:p text:style-name="P2"/>
      <text:p text:style-name="P1">========================================================</text:p>
      <text:p text:style-name="P1">1. IDENTIDADE DA MARCA</text:p>
      <text:p text:style-name="P1">========================================================</text:p>
      <text:p text:style-name="P2"/>
      <text:p text:style-name="P1">Nome oficial:</text:p>
      <text:p text:style-name="P1">FreteHub</text:p>
      <text:p text:style-name="P1"/>
      <text:p text:style-name="P1">Slogan principal:</text:p>
      <text:p text:style-name="P1">"O hub inteligente que conecta cargas, motoristas e transportadoras."</text:p>
      <text:p text:style-name="P1"/>
      <text:p text:style-name="P1">Headline principal da landing page:</text:p>
      <text:p text:style-name="P1">"FreteHub: a plataforma inteligente para conectar fretes, motoristas e operações em tempo real."</text:p>
      <text:p text:style-name="P1"><text:soft-page-break/></text:p>
      <text:p text:style-name="P1">Subtítulo:</text:p>
      <text:p text:style-name="P3">"Uma solução completa para solicitar, rastrear, otimizar e gerenciar fretes com inteligência artificial, dados em tempo real, matching automático, ETA inteligente e dashboards executivos."</text:p>
      <text:p text:style-name="P1"/>
      <text:p text:style-name="P1">Texto institucional:</text:p>
      <text:p text:style-name="P3">"FreteHub é uma plataforma inteligente de logística criada para conectar embarcadores, motoristas, transportadoras e operações em um único ecossistema digital. Com inteligência artificial, roteirização otimizada, rastreamento em tempo real, ETA automático, matching de fretes e dashboards executivos, a solução ajuda empresas a reduzir custos, aumentar previsibilidade e escalar operações logísticas com segurança."</text:p>
      <text:p text:style-name="P1"/>
      <text:p text:style-name="P1">============================================================</text:p>
      <text:p text:style-name="P1">2. APLICAÇÃO DA MARCA</text:p>
      <text:p text:style-name="P1">========================================================</text:p>
      <text:p text:style-name="P2"/>
      <text:p text:style-name="P1">Aplicar "FreteHub" em:</text:p>
      <text:p text:style-name="P1"/>
      <text:p text:style-name="P4">1. Header/menu superior</text:p>
      <text:p text:style-name="P4">2. Hero section da landing page</text:p>
      <text:p text:style-name="P4">3. Footer</text:p>
      <text:p text:style-name="P4">4. Página inicial</text:p>
      <text:p text:style-name="P4">5. Página de investidores</text:p>
      <text:p text:style-name="P4">6. Página de demonstração</text:p>
      <text:p text:style-name="P4">7. Página de produto</text:p>
      <text:p text:style-name="P4">8. Página de tecnologia</text:p>
      <text:p text:style-name="P4">9. Página de segurança</text:p>
      <text:p text:style-name="P4">10. Dashboard executivo</text:p>
      <text:p text:style-name="P4">11. Dashboard operacional</text:p>
      <text:p text:style-name="P4"><text:soft-page-break/>12. Dashboard financeiro</text:p>
      <text:p text:style-name="P4">13. Dashboard de IA</text:p>
      <text:p text:style-name="P4">14. Portal do cliente</text:p>
      <text:p text:style-name="P4">15. Portal da transportadora</text:p>
      <text:p text:style-name="P4">16. Portal do motorista</text:p>
      <text:p text:style-name="P4">17. Painel administrativo</text:p>
      <text:p text:style-name="P4">18. Títulos SEO</text:p>
      <text:p text:style-name="P4">19. Meta descriptions</text:p>
      <text:p text:style-name="P4">20. README</text:p>
      <text:p text:style-name="P4">21. docs/investor_demo.md</text:p>
      <text:p text:style-name="P4">22. Mensagens do modo demonstração</text:p>
      <text:p text:style-name="P4">23. E-mails/templates públicos, se existirem</text:p>
      <text:p text:style-name="P1">========================================================</text:p>
      <text:p text:style-name="P1">3. LOGO TEXTUAL</text:p>
      <text:p text:style-name="P1">========================================================</text:p>
      <text:p text:style-name="P1">Criar uma logo textual moderna para:</text:p>
      <text:p text:style-name="P2"/>
      <text:p text:style-name="P1">FreteHub</text:p>
      <text:p text:style-name="P2"/>
      <text:p text:style-name="P1">Conceito visual:</text:p>
      <text:p text:style-name="P2"/>
      <text:p text:style-name="P1">- "Frete" representa o negócio principal</text:p>
      <text:p text:style-name="P1">- "Hub" representa conexão, centralização, plataforma e marketplace</text:p>
      <text:p text:style-name="P1">- Usar fonte moderna, bold, limpa e tecnológica</text:p>
      <text:p text:style-name="P1">- "Frete" pode usar branco, cinza claro ou azul claro</text:p>
      <text:p text:style-name="P1">- "Hub" pode usar gradiente azul/ciano/verde</text:p>
      <text:p text:style-name="P1">- Pode adicionar ícone simples de rota, pin, caminhão ou conexão</text:p>
      <text:p text:style-name="P1">- Manter visual profissional, premium, brasileiro e adequado para investidores</text:p>
      <text:p text:style-name="P2"/>
      <text:p text:style-name="P1">Sugestão visual em texto:</text:p>
      <text:p text:style-name="P2"><text:soft-page-break/></text:p>
      <text:p text:style-name="P1">FreteHub</text:p>
      <text:p text:style-name="P1"/>
      <text:p text:style-name="P1">Onde:</text:p>
      <text:p text:style-name="P1">- Frete = confiança e operação</text:p>
      <text:p text:style-name="P1">- Hub = tecnologia, conexão e escala</text:p>
      <text:p text:style-name="P1"/>
      <text:p text:style-name="P1">========================================================</text:p>
      <text:p text:style-name="P1">4. HERO DA PRIMEIRA PÁGINA</text:p>
      <text:p text:style-name="P1">========================================================</text:p>
      <text:p text:style-name="P1"/>
      <text:p text:style-name="P1">Atualizar a primeira dobra da landing page para:</text:p>
      <text:p text:style-name="P1"/>
      <text:p text:style-name="P1">Título principal:</text:p>
      <text:p text:style-name="P1">FreteHub</text:p>
      <text:p text:style-name="P1"/>
      <text:p text:style-name="P1">Slogan:</text:p>
      <text:p text:style-name="P1">"O hub inteligente que conecta cargas, motoristas e transportadoras."</text:p>
      <text:p text:style-name="P1"/>
      <text:p text:style-name="P1">Headline:</text:p>
      <text:p text:style-name="P1">"FreteHub: a plataforma inteligente para conectar fretes, motoristas e operações em tempo real."</text:p>
      <text:p text:style-name="P1"/>
      <text:p text:style-name="P1">Texto de apoio:</text:p>
      <text:p text:style-name="P1">"Solicite, rastreie, otimize e gerencie fretes com inteligência artificial, matching automático, ETA inteligente, rastreamento em tempo real e dashboards executivos para tomada de decisão."</text:p>
      <text:p text:style-name="P1"/>
      <text:p text:style-name="P1"><text:soft-page-break/>Botões principais:</text:p>
      <text:p text:style-name="P1">- "Ver Demonstração"</text:p>
      <text:p text:style-name="P1">- "Simular Frete"</text:p>
      <text:p text:style-name="P1">- "Acessar Dashboard"</text:p>
      <text:p text:style-name="P1">- "Apresentação para Investidores"</text:p>
      <text:p text:style-name="P1"/>
      <text:p text:style-name="P1">Adicionar badge no topo:</text:p>
      <text:p text:style-name="P1">"FreteHub Platform"</text:p>
      <text:p text:style-name="P1">ou</text:p>
      <text:p text:style-name="P1">"Logística inteligente com IA"</text:p>
      <text:p text:style-name="P1"/>
      <text:p text:style-name="P1">Se DEMO_MODE=true, também exibir:</text:p>
      <text:p text:style-name="P1">"Modo Demonstração"</text:p>
      <text:p text:style-name="P1"/>
      <text:p text:style-name="P1">=======================================================<text:span text:style-name="T1">=</text:span></text:p>
      <text:p text:style-name="P1">5. SLOGANS ALTERNATIVOS</text:p>
      <text:p text:style-name="P1">========================================================</text:p>
      <text:p text:style-name="P2"/>
      <text:p text:style-name="P1">Adicionar variações de slogan ao longo das páginas públicas:</text:p>
      <text:p text:style-name="P1"/>
      <text:p text:style-name="P4">- "Fretes mais inteligentes, rápidos e rastreáveis."</text:p>
      <text:p text:style-name="P4">- "O hub da logística moderna."</text:p>
      <text:p text:style-name="P4">- "Conecte cargas, motoristas e transportadoras em tempo real."</text:p>
      <text:p text:style-name="P4">- "Do pedido à entrega, tudo em uma única plataforma."</text:p>
      <text:p text:style-name="P4">- "Rastreamento, IA e gestão logística no mesmo lugar."</text:p>
      <text:p text:style-name="P4">- "Menos custos, mais previsibilidade e mais controle."</text:p>
      <text:p text:style-name="P4">- "A nova central inteligente de fretes."</text:p>
      <text:p text:style-name="P1"/>
      <text:p text:style-name="P1">========================================================</text:p>
      <text:p text:style-name="P1"><text:soft-page-break/>6. PÁGINA DE INVESTIDORES</text:p>
      <text:p text:style-name="P1">========================================================</text:p>
      <text:p text:style-name="P1"/>
      <text:p text:style-name="P1">Atualizar a página /investors/ com a nova marca.</text:p>
      <text:p text:style-name="P1"/>
      <text:p text:style-name="P1">Texto de abertura:</text:p>
      <text:p text:style-name="P1"/>
      <text:p text:style-name="P1">"FreteHub nasceu para resolver um dos maiores desafios da logística: conectar demanda, capacidade de transporte e inteligência operacional em tempo real."</text:p>
      <text:p text:style-name="P1"/>
      <text:p text:style-name="P1">Mensagem para investidores:</text:p>
      <text:p text:style-name="P1"/>
      <text:p text:style-name="P1">"Estamos construindo uma plataforma escalável para digitalizar, automatizar e otimizar o mercado de fretes, conectando embarcadores, motoristas autônomos, transportadoras e dados logísticos em um único hub inteligente."</text:p>
      <text:p text:style-name="P1"/>
      <text:p text:style-name="P1">Chamada final:</text:p>
      <text:p text:style-name="P1"/>
      <text:p text:style-name="P1">"FreteHub é mais do que um sistema de fretes. É uma infraestrutura digital para a logística inteligente."</text:p>
      <text:p text:style-name="P2"/>
      <text:p text:style-name="P4">Botões:</text:p>
      <text:p text:style-name="P4">- "Ver Demonstração"</text:p>
      <text:p text:style-name="P4">- "Agendar Apresentação"</text:p>
      <text:p text:style-name="P4">- "Conhecer Dashboard Executivo"</text:p>
      <text:p text:style-name="P4">- "Simular Operação"</text:p>
      <text:p text:style-name="P1"/>
      <text:p text:style-name="P1">========================================================</text:p>
      <text:p text:style-name="P1"><text:soft-page-break/>7. PÁGINA DE PRODUTO</text:p>
      <text:p text:style-name="P1">========================================================</text:p>
      <text:p text:style-name="P2"/>
      <text:p text:style-name="P1">Atualizar textos para:</text:p>
      <text:p text:style-name="P2"/>
      <text:p text:style-name="P1">"Com o FreteHub, empresas e pessoas podem solicitar fretes, acompanhar entregas, consultar ETA, acessar documentos, gerenciar pagamentos e usar IA para tomar decisões melhores."</text:p>
      <text:p text:style-name="P2"/>
      <text:p text:style-name="P4">Destacar módulos:</text:p>
      <text:p text:style-name="P2"/>
      <text:p text:style-name="P4">- Solicitação de frete</text:p>
      <text:p text:style-name="P4">- Matching inteligente</text:p>
      <text:p text:style-name="P4">- Rastreamento em tempo real</text:p>
      <text:p text:style-name="P4">- Gestão de motoristas</text:p>
      <text:p text:style-name="P4">- Gestão de veículos</text:p>
      <text:p text:style-name="P4">- Gestão de transportadoras</text:p>
      <text:p text:style-name="P4">- Precificação</text:p>
      <text:p text:style-name="P4">- Roteirização</text:p>
      <text:p text:style-name="P4">- ETA</text:p>
      <text:p text:style-name="P4">- Documentos</text:p>
      <text:p text:style-name="P4">- Pagamentos</text:p>
      <text:p text:style-name="P4">- Suporte</text:p>
      <text:p text:style-name="P4">- IA assistente</text:p>
      <text:p text:style-name="P4">- Dashboards executivos</text:p>
      <text:p text:style-name="P1">========================================================</text:p>
      <text:p text:style-name="P1">8. PÁGINA DE TECNOLOGIA</text:p>
      <text:p text:style-name="P1">========================================================</text:p>
      <text:p text:style-name="P4">Atualizar textos para:</text:p>
      <text:p text:style-name="P2"/>
      <text:p text:style-name="P4">"FreteHub foi desenhado com arquitetura moderna, APIs escaláveis, dados geográficos, automação assíncrona, WebSocket, IA e estrutura preparada para cloud."</text:p>
      <text:p text:style-name="P2"/>
      <text:p text:style-name="P1"><text:soft-page-break/>Manter menções técnicas <text:span text:style-name="T2">anteriores.</text:span></text:p>
      <text:p text:style-name="P1">========================================================</text:p>
      <text:p text:style-name="P1">9. PÁGINA DE SEGURANÇA</text:p>
      <text:p text:style-name="P1">========================================================</text:p>
      <text:p text:style-name="P4">Atualizar textos para:</text:p>
      <text:p text:style-name="P4">"No FreteHub, segurança, rastreabilidade e controle de acesso são parte central da arquitetura."</text:p>
      <text:p text:style-name="P2"/>
      <text:p text:style-name="P1">Destacar:</text:p>
      <text:p text:style-name="P2"/>
      <text:p text:style-name="P4">- JWT</text:p>
      <text:p text:style-name="P4">- Permissões por perfil</text:p>
      <text:p text:style-name="P4">- Auditoria</text:p>
      <text:p text:style-name="P4">- LGPD</text:p>
      <text:p text:style-name="P4">- Logs</text:p>
      <text:p text:style-name="P4">- Mascaramento de dados</text:p>
      <text:p text:style-name="P4">- Proteção de documentos</text:p>
      <text:p text:style-name="P4">- Segurança da IA</text:p>
      <text:p text:style-name="P2"/>
      <text:p text:style-name="P1">========================================================</text:p>
      <text:p text:style-name="P1">10. DASHBOARDS</text:p>
      <text:p text:style-name="P1">========================================================</text:p>
      <text:p text:style-name="P4">Atualizar títulos dos dashboards:</text:p>
      <text:p text:style-name="P2"/>
      <text:p text:style-name="P4">- "FreteHub Executive Dashboard"</text:p>
      <text:p text:style-name="P4">- "FreteHub Operações Inteligentes"</text:p>
      <text:p text:style-name="P4">- "FreteHub Financeiro"</text:p>
      <text:p text:style-name="P4">- "FreteHub IA"</text:p>
      <text:p text:style-name="P4">- "FreteHub Cliente"</text:p>
      <text:p text:style-name="P4">- "FreteHub Transportadora"</text:p>
      <text:p text:style-name="P4">- "FreteHub Motorista"</text:p>
      <text:p text:style-name="P1"/>
      <text:p text:style-name="P1"><text:soft-page-break/>Nos dashboards, usar textos como:</text:p>
      <text:p text:style-name="P4"/>
      <text:p text:style-name="P4">- "Visão executiva do ecossistema FreteHub"</text:p>
      <text:p text:style-name="P4">- "Operação logística em tempo real"</text:p>
      <text:p text:style-name="P4">- "Indicadores estratégicos para escala"</text:p>
      <text:p text:style-name="P4">- "Dados demonstrativos do FreteHub"</text:p>
      <text:p text:style-name="P4">- "Modo Demonstração FreteHub"</text:p>
      <text:p text:style-name="P1">========================================================</text:p>
      <text:p text:style-name="P1">11. SEO</text:p>
      <text:p text:style-name="P1">========================================================</text:p>
      <text:p text:style-name="P2"/>
      <text:p text:style-name="P4">Atualizar titles e meta descriptions.</text:p>
      <text:p text:style-name="P2"/>
      <text:p text:style-name="P4">Meta title principal:</text:p>
      <text:p text:style-name="P2"/>
      <text:p text:style-name="P4">FreteHub | Plataforma Inteligente de Fretes com IA</text:p>
      <text:p text:style-name="P4"/>
      <text:p text:style-name="P4">Meta description:</text:p>
      <text:p text:style-name="P4">Conecte cargas, motoristas e transportadoras com IA, rastreamento em tempo real, matching automático, ETA inteligente e dashboards executivos.</text:p>
      <text:p text:style-name="P4">Open Graph title:</text:p>
      <text:p text:style-name="P4">FreteHub — O hub inteligente da logística moderna</text:p>
      <text:p text:style-name="P4">Open Graph description:</text:p>
      <text:p text:style-name="P4">Uma plataforma completa para solicitar, rastrear, otimizar e gerenciar fretes com inteligência artificial e dados em tempo real.</text:p>
      <text:p text:style-name="P2"/>
      <text:p text:style-name="P1">========================================================</text:p>
      <text:p text:style-name="P1">12. DOCUMENTAÇÃO</text:p>
      <text:p text:style-name="P1">========================================================</text:p>
      <text:p text:style-name="P4">Atualizar README e docs/investor_demo.md para usar "FreteHub".</text:p>
      <text:p text:style-name="P1"/>
      <text:p text:style-name="P1">Adicionar seção:</text:p>
      <text:p text:style-name="P2"/>
      <text:p text:style-name="P1"><text:soft-page-break/>"Identidade da Marca"</text:p>
      <text:p text:style-name="P2"/>
      <text:p text:style-name="P1">Conteúdo:</text:p>
      <text:p text:style-name="P2"/>
      <text:p text:style-name="P1">Nome:</text:p>
      <text:p text:style-name="P1">FreteHub</text:p>
      <text:p text:style-name="P2"/>
      <text:p text:style-name="P4">Posicionamento:</text:p>
      <text:p text:style-name="P4">"FreteHub é o hub inteligente de fretes que conecta cargas, motoristas, transportadoras e dados em tempo real."</text:p>
      <text:p text:style-name="P4"/>
      <text:p text:style-name="P4">Proposta de valor:</text:p>
      <text:p text:style-name="P4">"Reduzir custos logísticos, aumentar previsibilidade, melhorar rastreabilidade e automatizar decisões operacionais usando tecnologia e inteligência artificial."</text:p>
      <text:p text:style-name="P1"/>
      <text:p text:style-name="P1">========================================================</text:p>
      <text:p text:style-name="P1">13. CUIDADO COM NOMES ANTIGOS</text:p>
      <text:p text:style-name="P1">========================================================</text:p>
      <text:p text:style-name="P4">Procurar e substituir:</text:p>
      <text:p text:style-name="P4">- Uber da Logística, quando estiver como nome principal</text:p>
      <text:p text:style-name="P4">- Sistema Inteligente de Logística, quando estiver como marca principal</text:p>
      <text:p text:style-name="P4"/>
      <text:p text:style-name="P4">Manter "Sistema Inteligente de Logística" apenas como descrição genérica, se fizer sentido.</text:p>
      <text:p text:style-name="P4"/>
      <text:p text:style-name="P4">Exemplo correto:</text:p>
      <text:p text:style-name="P4">"FreteHub é um sistema inteligente de logística."</text:p>
      <text:p text:style-name="P4">Exemplo incorreto:</text:p>
      <text:p text:style-name="P4">"O Sistema Inteligente de Logística é a marca principal."</text:p>
      <text:p text:style-name="P1">========================================================</text:p>
      <text:p text:style-name="P1">14. CRITÉRIOS DE ACEITE</text:p>
      <text:p text:style-name="P1">========================================================</text:p>
      <text:p text:style-name="P4"/>
      <text:p text:style-name="P4"><text:soft-page-break/>A alteração estará concluída quando:</text:p>
      <text:p text:style-name="P4">1. "FreteHub" aparecer como marca principal na landing page.</text:p>
      <text:p text:style-name="P4">2. Header, footer e dashboards usarem FreteHub.</text:p>
      <text:p text:style-name="P4">3. Página de investidores usar FreteHub.</text:p>
      <text:p text:style-name="P4">4. SEO usar FreteHub.</text:p>
      <text:p text:style-name="P4">5. README usar FreteHub.</text:p>
      <text:p text:style-name="P4">6. docs/investor_demo.md usar FreteHub.</text:p>
      <text:p text:style-name="P4">7. Modo demonstração exibir "Modo Demonstração FreteHub".</text:p>
      <text:p text:style-name="P4">8. Todas as funcionalidades existentes continuarem funcionando.</text:p>
      <text:p text:style-name="P4">9. Testes principais continuarem passando.</text:p>
      <text:p text:style-name="P1"/>
      <text:h text:style-name="P5" text:outline-level="1">Módulo 6 — Front-End Comercial, Landing Page Investidora, Dashboards Executivos e Demo Inteligente</text:h>
      <text:p text:style-name="P6"/>
      <text:p text:style-name="P6">Este módulo é focado em criar uma <text:span text:style-name="T3">frente visual poderosa</text:span>, com <text:span text:style-name="T3">primeira página criativa</text:span>, <text:span text:style-name="T3">dashboards</text:span>, <text:span text:style-name="T3">consultas</text:span>, <text:span text:style-name="T3">KPIs</text:span>, <text:span text:style-name="T3">visual de plataforma inteligente</text:span>, <text:span text:style-name="T3">experiência para investidores</text:span> e <text:span text:style-name="T3">demonstração comercial do Sistema Inteligente de Logística</text:span>.</text:p>
      <text:p text:style-name="P6">A ideia é que, ao abrir o sistema, o investidor veja algo moderno, tecnológico, confiável e escalável.</text:p>
      <text:p text:style-name="P7"/>
      <text:p text:style-name="P8">Continue o desenvolvimento do projeto Uber da Logística / Sistema Inteligente de Logística usando Django.<text:line-break/><text:line-break/>Não remova funcionalidades dos módulos anteriores.<text:line-break/><text:line-break/>Neste Módulo 6, implemente uma camada visual, comercial, executiva e demonstrativa para apresentar o sistema a investidores, clientes estratégicos, transportadoras, embarcadores e parceiros.<text:line-break/><text:line-break/>O objetivo é criar uma primeira impressão extremamente profissional, moderna, criativa e convincente, mostrando que o sistema é uma plataforma inteligente de logística com IA, rastreamento, dashboards, automação, matching de motoristas, roteirização, ETA, gestão de fretes, gestão de frota, análise operacional e potencial de escala.<text:line-break/><text:line-break/>============================================================<text:line-break/>1. OBJETIVO DO MÓDULO 6<text:line-break/>============================================================<text:line-break/><text:line-break/>Criar uma frente inicial visual e comercial para o sistema, composta por:<text:line-break/><text:line-break/>- Landing page institucional e investidora<text:line-break/>- Página inicial criativa e chamativa<text:line-break/>- Dashboard executivo<text:line-break/>- Dashboard operacional<text:line-break/><text:soft-page-break/>- Dashboard financeiro<text:line-break/>- Dashboard logístico<text:line-break/>- Dashboard de IA<text:line-break/>- Painel de demonstração em tempo real<text:line-break/>- Páginas públicas para convencer investidores<text:line-break/>- Área de apresentação do produto<text:line-break/>- Área de simulação de frete<text:line-break/>- Área de indicadores de mercado<text:line-break/>- Área de diferenciais competitivos<text:line-break/>- Área de impacto econômico<text:line-break/>- Área de crescimento e escalabilidade<text:line-break/>- Front-end responsivo e moderno<text:line-break/>- Back-end com APIs para métricas e consultas<text:line-break/>- Dados demonstrativos para simulação<text:line-break/><text:line-break/>Este módulo deve transformar o sistema em uma plataforma apresentável para captação de investimento.<text:line-break/><text:line-break/>============================================================<text:line-break/>2. ESTILO VISUAL E POSICIONAMENTO<text:line-break/>============================================================<text:line-break/><text:line-break/>Criar uma identidade visual moderna, tecnológica e premium.<text:line-break/><text:line-break/>O sistema deve transmitir:<text:line-break/><text:line-break/>- Inteligência<text:line-break/>- Escalabilidade<text:line-break/>- Segurança<text:line-break/>- Automação<text:line-break/>- Eficiência logística<text:line-break/>- Tecnologia de IA<text:line-break/>- Confiança<text:line-break/>- Potencial de mercado<text:line-break/>- Redução de custos<text:line-break/>- Aumento de produtividade<text:line-break/>- Visão de futuro<text:line-break/><text:line-break/>Estilo visual sugerido:<text:line-break/><text:line-break/>- Tema escuro premium com detalhes em azul, verde, ciano ou roxo<text:line-break/>- Cards com glassmorphism ou visual SaaS moderno<text:line-break/>- Gradientes tecnológicos<text:line-break/>- Ícones de logística, IA, mapas, caminhões, rotas, gráficos e automação<text:line-break/>- Animações leves<text:line-break/>- Layout responsivo<text:line-break/>- Visual inspirado em dashboards SaaS, fintechs, plataformas de mobilidade e startups de IA<text:line-break/><text:line-break/>Criar opção de tema claro/escuro se possível.<text:line-break/><text:line-break/>============================================================<text:line-break/>3. TECNOLOGIA DE FRONT-END<text:line-break/>============================================================<text:line-break/><text:line-break/>Usar uma das abordagens abaixo, priorizando a mais adequada para integrar ao Django existente:<text:line-break/><text:line-break/>Opção A — Django Templates com HTMX, Alpine.js e Tailwind CSS:<text:line-break/>- Ideal para MVP rápido<text:line-break/>- Fácil integração<text:line-break/>- Menos complexidade<text:line-break/><text:line-break/>Opção B — Front-end separado com React ou Next.js:<text:line-break/><text:soft-page-break/>- Criar estrutura preparada para SPA<text:line-break/>- Consumir APIs Django REST<text:line-break/>- Melhor visual comercial<text:line-break/><text:line-break/>Escolha a melhor opção considerando velocidade, estabilidade e facilidade de apresentação para investidor.<text:line-break/><text:line-break/>Caso use Django Templates, implementar:<text:line-break/><text:line-break/>- templates organizados<text:line-break/>- base.html<text:line-break/>- componentes reutilizáveis<text:line-break/>- partials<text:line-break/>- Tailwind CSS<text:line-break/>- Alpine.js para interações<text:line-break/>- Chart.js ou ApexCharts para gráficos<text:line-break/>- Leaflet.js ou mapa placeholder para rotas<text:line-break/>- animações CSS leves<text:line-break/><text:line-break/>Caso use React/Next.js, implementar:<text:line-break/><text:line-break/>- frontend/<text:line-break/>- páginas públicas<text:line-break/>- dashboards<text:line-break/>- componentes<text:line-break/>- chamadas API<text:line-break/>- layout responsivo<text:line-break/>- gráficos<text:line-break/>- autenticação JWT preparada<text:line-break/><text:line-break/>============================================================<text:line-break/>4. PÁGINA INICIAL / LANDING PAGE INVESTIDORA<text:line-break/>============================================================<text:line-break/><text:line-break/>Criar uma página pública em:<text:line-break/><text:line-break/>GET /<text:line-break/><text:line-break/>ou:<text:line-break/><text:line-break/>GET /landing/<text:line-break/><text:line-break/>Essa será a primeira página do sistema.<text:line-break/><text:line-break/>Ela deve ser extremamente criativa, chamativa e persuasiva.<text:line-break/><text:line-break/>Seções obrigatórias:<text:line-break/><text:line-break/>------------------------------------------------------------<text:line-break/>4.1 HERO SECTION<text:line-break/>------------------------------------------------------------<text:line-break/><text:line-break/>Criar uma primeira dobra impactante com título forte <text:span text:style-name="T2">já mencionado</text:span>.<text:line-break/><text:line-break/>Exemplos de título:<text:line-break/><text:line-break/>"Sistema Inteligente de Logística com IA, Rastreamento em Tempo Real e Matching Automático de Fretes"<text:line-break/><text:line-break/><text:line-break/><text:line-break/>Subtítulo:<text:line-break/><text:line-break/>"Uma plataforma completa para solicitar, rastrear, otimizar e gerenciar fretes <text:soft-page-break/>com inteligência artificial, dados em tempo real, automação operacional e dashboards executivos."<text:line-break/><text:line-break/>Elementos visuais:<text:line-break/><text:line-break/>- Caminhão em rota digital<text:line-break/>- Mapa tecnológico<text:line-break/>- Linhas de conexão<text:line-break/>- Cards flutuantes com indicadores<text:line-break/>- ETA em tempo real<text:line-break/>- IA recomendando veículo<text:line-break/>- Simulação de frete em andamento<text:line-break/><text:line-break/>Botões principais:<text:line-break/><text:line-break/>- "Ver Demonstração"<text:line-break/>- "Simular Frete"<text:line-break/>- "Acessar Dashboard"<text:line-break/>- "Apresentação para Investidores"<text:line-break/><text:line-break/>------------------------------------------------------------<text:line-break/>4.2 SEÇÃO DE PROBLEMA<text:line-break/>------------------------------------------------------------<text:line-break/><text:line-break/>Mostrar os problemas do mercado logístico:<text:line-break/><text:line-break/>- Falta de rastreabilidade<text:line-break/>- Fretes manuais<text:line-break/>- Alto custo operacional<text:line-break/>- Baixa previsibilidade<text:line-break/>- Ociosidade de veículos<text:line-break/>- Dificuldade de encontrar motoristas confiáveis<text:line-break/>- Falta de dados para tomada de decisão<text:line-break/>- Atrasos e perdas<text:line-break/>- Atendimento fragmentado<text:line-break/>- Pouca inteligência na roteirização<text:line-break/><text:line-break/>Mostrar em cards com ícones.<text:line-break/><text:line-break/>------------------------------------------------------------<text:line-break/>4.3 SEÇÃO DE SOLUÇÃO<text:line-break/>------------------------------------------------------------<text:line-break/><text:line-break/>Mostrar como o sistema resolve:<text:line-break/><text:line-break/>- Matching inteligente entre carga e veículo<text:line-break/>- Motoristas verificados<text:line-break/>- Rastreamento em tempo real<text:line-break/>- ETA automático<text:line-break/>- Precificação inteligente<text:line-break/>- IA assistente<text:line-break/>- Dashboards executivos<text:line-break/>- Gestão de documentos<text:line-break/>- Pagamentos simulados/integráveis<text:line-break/>- Roteirização inteligente<text:line-break/>- Relatórios e auditoria<text:line-break/><text:line-break/>------------------------------------------------------------<text:line-break/>4.4 SEÇÃO "COMO FUNCIONA"<text:line-break/>------------------------------------------------------------<text:line-break/><text:line-break/>Criar fluxo visual:<text:line-break/><text:line-break/>1. Cliente solicita frete<text:line-break/><text:soft-page-break/>2. IA recomenda veículo ideal<text:line-break/>3. Sistema calcula preço e rota<text:line-break/>4. Motoristas compatíveis recebem oferta<text:line-break/>5. Motorista aceita<text:line-break/>6. Carga é rastreada em tempo real<text:line-break/>7. Cliente acompanha ETA<text:line-break/>8. Entrega é confirmada<text:line-break/>9. Dados alimentam dashboards e IA<text:line-break/><text:line-break/>------------------------------------------------------------<text:line-break/>4.5 SEÇÃO DE INTELIGÊNCIA ARTIFICIAL<text:line-break/>------------------------------------------------------------<text:line-break/><text:line-break/>Mostrar que a IA ajuda em:<text:line-break/><text:line-break/>- Recomendação de veículo<text:line-break/>- Resposta a dúvidas<text:line-break/>- Consulta de ETA<text:line-break/>- Consulta de status<text:line-break/>- Abertura de chamados<text:line-break/>- Apoio ao suporte<text:line-break/>- Análise de operação<text:line-break/>- Base de conhecimento RAG<text:line-break/>- Redução de atendimento humano<text:line-break/><text:line-break/>Criar bloco visual com exemplo de chat:<text:line-break/><text:line-break/>Usuário:<text:line-break/>"Qual veículo uso para transportar soja?"<text:line-break/><text:line-break/>IA:<text:line-break/>"Para soja, recomendamos caminhão graneleiro, bitrem ou rodotrem graneleiro, com proteção contra umidade, lona quando necessário, romaneio, nota fiscal e pesagem."<text:line-break/><text:line-break/>------------------------------------------------------------<text:line-break/>4.6 SEÇÃO DE DASHBOARDS<text:line-break/>------------------------------------------------------------<text:line-break/><text:line-break/>Mostrar previews dos dashboards:<text:line-break/><text:line-break/>- Dashboard Executivo<text:line-break/>- Dashboard Operacional<text:line-break/>- Dashboard Financeiro<text:line-break/>- Dashboard de Fretes<text:line-break/>- Dashboard de Frota<text:line-break/>- Dashboard de IA<text:line-break/>- Dashboard de Rastreamento<text:line-break/><text:line-break/>Cada preview deve ter gráficos e indicadores fake/demonstrativos se ainda não houver dados reais.<text:line-break/><text:line-break/>------------------------------------------------------------<text:line-break/>4.7 SEÇÃO DE MERCADO E OPORTUNIDADE<text:line-break/>------------------------------------------------------------<text:line-break/><text:line-break/>Criar seção para convencer investidor.<text:line-break/><text:line-break/>Mostrar textos estratégicos:<text:line-break/><text:line-break/>- Logística é um dos maiores custos das empresas<text:line-break/>- Há grande fragmentação entre embarcadores, motoristas e transportadoras<text:line-break/>- Pequenas e médias empresas precisam de tecnologia acessível<text:line-break/>- Motoristas autônomos precisam de mais oportunidades<text:line-break/><text:soft-page-break/>- O mercado agrícola exige transporte eficiente de grãos secos<text:line-break/>- O setor de equipamentos e móveis exige fretes rápidos e rastreáveis<text:line-break/>- A IA pode reduzir suporte, melhorar matching e aumentar margem<text:line-break/><text:line-break/>Criar cards:<text:line-break/><text:line-break/>- Mercado endereçável<text:line-break/>- Receita recorrente<text:line-break/>- Comissão por frete<text:line-break/>- Planos para empresas<text:line-break/>- Serviços premium<text:line-break/>- Dados logísticos<text:line-break/>- Expansão regional<text:line-break/><text:line-break/>Não inventar números oficiais falsos. Se necessário, usar textos como "potencial estimado", "simulação" e "modelo projetado".<text:line-break/><text:line-break/>------------------------------------------------------------<text:line-break/>4.8 SEÇÃO DE MODELO DE NEGÓCIO<text:line-break/>------------------------------------------------------------<text:line-break/><text:line-break/>Mostrar possíveis fontes de receita:<text:line-break/><text:line-break/>- Comissão por frete<text:line-break/>- Assinatura para empresas<text:line-break/>- Plano para transportadoras<text:line-break/>- Taxa de tecnologia<text:line-break/>- Serviços premium de rastreamento<text:line-break/>- IA para suporte e operação<text:line-break/>- Relatórios avançados<text:line-break/>- Integrações fiscais e financeiras<text:line-break/>- Marketplace de seguros<text:line-break/>- Marketplace de serviços para motoristas<text:line-break/><text:line-break/>------------------------------------------------------------<text:line-break/>4.9 SEÇÃO DE TRAÇÃO SIMULADA / DEMO<text:line-break/>------------------------------------------------------------<text:line-break/><text:line-break/>Criar cards de demonstração com dados de exemplo:<text:line-break/><text:line-break/>- 1.240 fretes simulados<text:line-break/>- 380 motoristas cadastrados<text:line-break/>- 92 transportadoras<text:line-break/>- 18% redução média de custo operacional<text:line-break/>- 27% melhoria em previsibilidade de entrega<text:line-break/>- 96% rastreabilidade dos eventos<text:line-break/>- 4.8 avaliação média dos motoristas<text:line-break/><text:line-break/>Deixar claro no código e texto que são "dados demonstrativos do MVP" ou "simulação".<text:line-break/><text:line-break/>------------------------------------------------------------<text:line-break/>4.10 SEÇÃO DE ROADMAP<text:line-break/>------------------------------------------------------------<text:line-break/><text:line-break/>Mostrar roadmap:<text:line-break/><text:line-break/>Fase 1:<text:line-break/>- MVP operacional<text:line-break/>- Cadastro<text:line-break/>- Fretes<text:line-break/>- Motoristas<text:line-break/>- Veículos<text:line-break/>- Matching<text:line-break/><text:soft-page-break/>- Rastreamento<text:line-break/>- IA básica<text:line-break/><text:line-break/>Fase 2:<text:line-break/>- App mobile<text:line-break/>- Pagamentos reais<text:line-break/>- Integrações fiscais<text:line-break/>- Otimização avançada de rotas<text:line-break/>- Painéis BI<text:line-break/><text:line-break/>Fase 3:<text:line-break/>- IA preditiva<text:line-break/>- Expansão nacional<text:line-break/>- Marketplace de serviços<text:line-break/>- Integração com ERPs<text:line-break/>- API pública para embarcadores<text:line-break/><text:line-break/>------------------------------------------------------------<text:line-break/>4.11 CHAMADA PARA INVESTIDOR<text:line-break/>------------------------------------------------------------<text:line-break/><text:line-break/>Criar uma seção final forte:<text:line-break/><text:line-break/>"Estamos construindo a infraestrutura inteligente para a nova logística brasileira."<text:line-break/><text:line-break/>Botões:<text:line-break/><text:line-break/>- "Ver Dashboard Executivo"<text:line-break/>- "Solicitar Apresentação"<text:line-break/>- "Simular Operação"<text:line-break/>- "Entrar em Contato"<text:line-break/><text:line-break/>Criar formulário simples de interesse:<text:line-break/><text:line-break/>Campos:<text:line-break/><text:line-break/>- nome<text:line-break/>- email<text:line-break/>- telefone<text:line-break/>- empresa<text:line-break/>- perfil:<text:line-break/> <text:s/>- investidor<text:line-break/> <text:s/>- transportadora<text:line-break/> <text:s/>- embarcador<text:line-break/> <text:s/>- parceiro<text:line-break/> <text:s/>- outro<text:line-break/>- mensagem<text:line-break/><text:line-break/>Salvar no banco.<text:line-break/><text:line-break/>============================================================<text:line-break/>5. MODELO PARA LEADS DE INVESTIDORES E PARCEIROS<text:line-break/>============================================================<text:line-break/><text:line-break/>Criar app ou usar core/commercial.<text:line-break/><text:line-break/>Criar modelo InvestorLead:<text:line-break/><text:line-break/>- id<text:line-break/>- name<text:line-break/>- email<text:line-break/>- phone<text:line-break/>- company<text:line-break/><text:soft-page-break/>- profile_type:<text:line-break/> <text:s/>- investor<text:line-break/> <text:s/>- carrier<text:line-break/> <text:s/>- shipper<text:line-break/> <text:s/>- partner<text:line-break/> <text:s/>- press<text:line-break/> <text:s/>- other<text:line-break/>- estimated_interest_level:<text:line-break/> <text:s/>- low<text:line-break/> <text:s/>- medium<text:line-break/> <text:s/>- high<text:line-break/> <text:s/>- strategic<text:line-break/>- message<text:line-break/>- source_page<text:line-break/>- status:<text:line-break/> <text:s/>- new<text:line-break/> <text:s/>- contacted<text:line-break/> <text:s/>- meeting_scheduled<text:line-break/> <text:s/>- negotiating<text:line-break/> <text:s/>- converted<text:line-break/> <text:s/>- lost<text:line-break/>- notes<text:line-break/>- created_at<text:line-break/>- updated_at<text:line-break/><text:line-break/>Criar endpoints:<text:line-break/><text:line-break/>- POST /api/commercial/leads/<text:line-break/>- GET /api/admin/commercial/leads/<text:line-break/>- GET /api/admin/commercial/leads/{id}/<text:line-break/>- PATCH /api/admin/commercial/leads/{id}/<text:line-break/><text:line-break/>Criar página administrativa:<text:line-break/><text:line-break/>- /operations/investor-leads/<text:line-break/><text:line-break/>Permissões:<text:line-break/><text:line-break/>- Público pode criar lead.<text:line-break/>- Apenas admin, comercial ou superuser pode listar e editar leads.<text:line-break/><text:line-break/>Auditar criação e alteração de leads.<text:line-break/><text:line-break/>============================================================<text:line-break/>6. DASHBOARD EXECUTIVO<text:line-break/>============================================================<text:line-break/><text:line-break/>Criar página:<text:line-break/><text:line-break/>GET /executive/dashboard/<text:line-break/><text:line-break/>ou:<text:line-break/><text:line-break/>GET /operations/executive-dashboard/<text:line-break/><text:line-break/>Este dashboard deve ser visualmente impressionante e útil para investidores.<text:line-break/><text:line-break/>Indicadores principais:<text:line-break/><text:line-break/>- GMV simulado ou real<text:line-break/>- Receita da plataforma<text:line-break/>- Fretes criados<text:line-break/>- Fretes concluídos<text:line-break/>- Fretes em andamento<text:line-break/><text:soft-page-break/>- Ticket médio<text:line-break/>- Motoristas cadastrados<text:line-break/>- Motoristas online<text:line-break/>- Veículos aprovados<text:line-break/>- Empresas cadastradas<text:line-break/>- Transportadoras cadastradas<text:line-break/>- Taxa de conclusão<text:line-break/>- Taxa de cancelamento<text:line-break/>- Tempo médio de entrega<text:line-break/>- Percentual de entregas no prazo<text:line-break/>- Pedidos por categoria<text:line-break/>- Crescimento mensal<text:line-break/>- Receita por mês<text:line-break/>- Volume transportado<text:line-break/>- Cargas de equipamentos<text:line-break/>- Cargas de grãos secos<text:line-break/>- Chamados abertos<text:line-break/>- Conversas resolvidas pela IA<text:line-break/><text:line-break/>Gráficos:<text:line-break/><text:line-break/>- Receita mensal<text:line-break/>- Quantidade de fretes por mês<text:line-break/>- Fretes por status<text:line-break/>- Fretes por tipo de carga<text:line-break/>- Motoristas por status<text:line-break/>- Veículos por tipo<text:line-break/>- Entregas no prazo vs atrasadas<text:line-break/>- Mapa de calor operacional, se possível<text:line-break/>- Funil comercial de leads<text:line-break/><text:line-break/>Criar API:<text:line-break/><text:line-break/>GET /api/executive/dashboard/<text:line-break/><text:line-break/>Resposta:<text:line-break/><text:line-break/>{<text:line-break/> <text:s/>"success": true,<text:line-break/> <text:s/>"data": {<text:line-break/> <text:s text:c="3"/>"kpis": {},<text:line-break/> <text:s text:c="3"/>"charts": {},<text:line-break/> <text:s text:c="3"/>"last_updated": ""<text:line-break/> <text:s/>},<text:line-break/> <text:s/>"message": "Dashboard executivo carregado com sucesso."<text:line-break/>}<text:line-break/><text:line-break/>Usar dados reais do banco quando existirem.<text:line-break/>Quando não existirem, usar modo demo controlado por configuração:<text:line-break/><text:line-break/>DEMO_MODE=true<text:line-break/><text:line-break/>Nunca misturar dados falsos como se fossem reais. Se DEMO_MODE estiver ativo, exibir selo "Modo Demonstração".<text:line-break/><text:line-break/>============================================================<text:line-break/>7. DASHBOARD OPERACIONAL INTELIGENTE<text:line-break/>============================================================<text:line-break/><text:line-break/>Criar página:<text:line-break/><text:line-break/>GET /operations/intelligent-dashboard/<text:line-break/><text:line-break/>Indicadores:<text:line-break/><text:soft-page-break/><text:line-break/>- Fretes aguardando motorista<text:line-break/>- Fretes em rota<text:line-break/>- Fretes atrasados<text:line-break/>- Fretes com desvio de rota<text:line-break/>- Fretes parados<text:line-break/>- Motoristas online<text:line-break/>- Motoristas disponíveis<text:line-break/>- Veículos ativos<text:line-break/>- Ocorrências críticas<text:line-break/>- Documentos pendentes<text:line-break/>- Pagamentos pendentes<text:line-break/>- Tickets abertos<text:line-break/>- ETA médio<text:line-break/>- Alertas de operação<text:line-break/><text:line-break/>Funcionalidades:<text:line-break/><text:line-break/>- Lista de fretes críticos<text:line-break/>- Filtros por status<text:line-break/>- Filtros por tipo de carga<text:line-break/>- Filtros por transportadora<text:line-break/>- Filtros por região<text:line-break/>- Busca por cliente, motorista, placa, pedido<text:line-break/>- Timeline de eventos recentes<text:line-break/>- Cards de alertas<text:line-break/>- Mapa operacional ou placeholder<text:line-break/><text:line-break/>Criar API:<text:line-break/><text:line-break/>GET /api/operations/intelligent-dashboard/<text:line-break/><text:line-break/>============================================================<text:line-break/>8. DASHBOARD FINANCEIRO<text:line-break/>============================================================<text:line-break/><text:line-break/>Criar página:<text:line-break/><text:line-break/>GET /operations/financial-dashboard/<text:line-break/><text:line-break/>Indicadores:<text:line-break/><text:line-break/>- Receita total<text:line-break/>- Receita do mês<text:line-break/>- Pagamentos pagos<text:line-break/>- Pagamentos pendentes<text:line-break/>- Pagamentos falhos<text:line-break/>- Repasse a motoristas<text:line-break/>- Taxa da plataforma<text:line-break/>- Ticket médio<text:line-break/>- Receita por tipo de carga<text:line-break/>- Receita por região<text:line-break/>- Receita por transportadora<text:line-break/>- Projeção mensal<text:line-break/><text:line-break/>Gráficos:<text:line-break/><text:line-break/>- Receita por mês<text:line-break/>- Receita por categoria<text:line-break/>- Status dos pagamentos<text:line-break/>- Ticket médio mensal<text:line-break/>- Margem simulada<text:line-break/>- Ranking de clientes<text:line-break/><text:line-break/><text:soft-page-break/>Criar API:<text:line-break/><text:line-break/>GET /api/operations/financial-dashboard/<text:line-break/><text:line-break/>============================================================<text:line-break/>9. DASHBOARD DE IA<text:line-break/>============================================================<text:line-break/><text:line-break/>Criar página:<text:line-break/><text:line-break/>GET /operations/ai-dashboard/<text:line-break/><text:line-break/>Indicadores:<text:line-break/><text:line-break/>- Total de conversas<text:line-break/>- Conversas ativas<text:line-break/>- Conversas encerradas<text:line-break/>- Conversas escaladas<text:line-break/>- Taxa de resolução automática<text:line-break/>- Intenções mais comuns<text:line-break/>- Tickets criados pela IA<text:line-break/>- Perguntas sobre frete<text:line-break/>- Perguntas sobre documentos<text:line-break/>- Perguntas sobre rastreamento<text:line-break/>- Perguntas sobre pagamento<text:line-break/>- Usuários atendidos<text:line-break/>- Tempo médio de resposta<text:line-break/><text:line-break/>Gráficos:<text:line-break/><text:line-break/>- Conversas por dia<text:line-break/>- Intenções mais frequentes<text:line-break/>- Escalonamentos por motivo<text:line-break/>- Tickets abertos por IA<text:line-break/>- Base de conhecimento mais consultada<text:line-break/><text:line-break/>Criar API:<text:line-break/><text:line-break/>GET /api/operations/ai-dashboard/<text:line-break/><text:line-break/>============================================================<text:line-break/>10. DASHBOARD DE CLIENTE / EMBARCADOR<text:line-break/>============================================================<text:line-break/><text:line-break/>Melhorar portal do cliente:<text:line-break/><text:line-break/>GET /portal/dashboard/<text:line-break/><text:line-break/>Adicionar:<text:line-break/><text:line-break/>- Total de fretes<text:line-break/>- Fretes ativos<text:line-break/>- Fretes entregues<text:line-break/>- Fretes cancelados<text:line-break/>- Últimos pedidos<text:line-break/>- Próxima entrega<text:line-break/>- Gastos mensais<text:line-break/>- Fretes por tipo de carga<text:line-break/>- Status de pagamentos<text:line-break/>- Atalho para solicitar frete<text:line-break/>- Atalho para rastrear entrega<text:line-break/>- Chat IA em destaque<text:line-break/><text:line-break/>Criar visual moderno e simples.<text:line-break/><text:soft-page-break/><text:line-break/>============================================================<text:line-break/>11. DASHBOARD DA TRANSPORTADORA<text:line-break/>============================================================<text:line-break/><text:line-break/>Melhorar portal da transportadora:<text:line-break/><text:line-break/>GET /carrier/dashboard/<text:line-break/><text:line-break/>Adicionar:<text:line-break/><text:line-break/>- Motoristas vinculados<text:line-break/>- Motoristas online<text:line-break/>- Veículos cadastrados<text:line-break/>- Veículos aprovados<text:line-break/>- Fretes disponíveis<text:line-break/>- Fretes aceitos<text:line-break/>- Fretes concluídos<text:line-break/>- Ganhos estimados<text:line-break/>- Ranking de motoristas<text:line-break/>- Ocorrências<text:line-break/>- Documentos pendentes<text:line-break/>- Mapa da frota ou placeholder<text:line-break/>- Alertas operacionais<text:line-break/><text:line-break/>============================================================<text:line-break/>12. DASHBOARD DO MOTORISTA<text:line-break/>============================================================<text:line-break/><text:line-break/>Criar ou melhorar área do motorista:<text:line-break/><text:line-break/>GET /driver/dashboard/<text:line-break/><text:line-break/>Adicionar:<text:line-break/><text:line-break/>- Fretes disponíveis<text:line-break/>- Frete atual<text:line-break/>- Ganhos estimados<text:line-break/>- Histórico de entregas<text:line-break/>- Avaliação média<text:line-break/>- Status do perfil<text:line-break/>- Status do veículo<text:line-break/>- Documentos pendentes<text:line-break/>- Botão ficar online/offline<text:line-break/>- Próxima coleta<text:line-break/>- Chat IA para ajuda<text:line-break/><text:line-break/>Criar endpoints de apoio:<text:line-break/><text:line-break/>GET /api/driver/dashboard/<text:line-break/><text:line-break/>============================================================<text:line-break/>13. SIMULADOR DE FRETE NA PÁGINA INICIAL<text:line-break/>============================================================<text:line-break/><text:line-break/>Criar um simulador público ou semi-público na landing page.<text:line-break/><text:line-break/>Campos:<text:line-break/><text:line-break/>- origem<text:line-break/>- destino<text:line-break/>- tipo de carga<text:line-break/>- peso estimado<text:line-break/>- volume estimado<text:line-break/><text:soft-page-break/>- urgência<text:line-break/>- precisa ajudante<text:line-break/>- precisa seguro<text:line-break/><text:line-break/>Ao simular:<text:line-break/><text:line-break/>- chamar API de estimativa<text:line-break/>- retornar veículo recomendado<text:line-break/>- preço estimado demo<text:line-break/>- distância estimada<text:line-break/>- tempo estimado<text:line-break/>- vantagens do sistema<text:line-break/>- CTA para criar conta ou falar com comercial<text:line-break/><text:line-break/>Endpoint:<text:line-break/><text:line-break/>POST /api/public/freight-simulator/<text:line-break/><text:line-break/>Regras:<text:line-break/><text:line-break/>- Não exigir login para simulação simples<text:line-break/>- Aplicar rate limit<text:line-break/>- Não criar frete real sem autenticação<text:line-break/>- Se usuário autenticado quiser prosseguir, direcionar para criação real de frete<text:line-break/><text:line-break/>Resposta:<text:line-break/><text:line-break/>{<text:line-break/> <text:s/>"success": true,<text:line-break/> <text:s/>"data": {<text:line-break/> <text:s text:c="3"/>"recommended_vehicle": "",<text:line-break/> <text:s text:c="3"/>"estimated_price": "",<text:line-break/> <text:s text:c="3"/>"estimated_distance_km": "",<text:line-break/> <text:s text:c="3"/>"estimated_duration_minutes": "",<text:line-break/> <text:s text:c="3"/>"benefits": [],<text:line-break/> <text:s text:c="3"/>"cta": ""<text:line-break/> <text:s/>},<text:line-break/> <text:s/>"message": "Simulação realizada com sucesso."<text:line-break/>}<text:line-break/><text:line-break/>============================================================<text:line-break/>14. PÁGINA DE DEMONSTRAÇÃO AO VIVO<text:line-break/>============================================================<text:line-break/><text:line-break/>Criar página:<text:line-break/><text:line-break/>GET /demo/live-operation/<text:line-break/><text:line-break/>Objetivo:<text:line-break/><text:line-break/>Mostrar uma operação logística simulada em tempo real.<text:line-break/><text:line-break/>Elementos:<text:line-break/><text:line-break/>- mapa ou placeholder com caminhões<text:line-break/>- cards de fretes em andamento<text:line-break/>- ETA mudando<text:line-break/>- eventos de rastreamento aparecendo<text:line-break/>- IA sugerindo ações<text:line-break/>- alertas operacionais<text:line-break/>- gráfico em tempo real<text:line-break/>- timeline de eventos<text:line-break/><text:line-break/><text:soft-page-break/>Criar modo demo que simula:<text:line-break/><text:line-break/>- localização de caminhão<text:line-break/>- mudança de status<text:line-break/>- entrega próxima<text:line-break/>- ocorrência<text:line-break/>- resposta da IA<text:line-break/>- atualização de dashboard<text:line-break/><text:line-break/>Pode usar dados fake controlados e identificados como "Demonstração".<text:line-break/><text:line-break/>============================================================<text:line-break/>15. BACK-END DE CONSULTAS E MÉTRICAS<text:line-break/>============================================================<text:line-break/><text:line-break/>Criar services para métricas:<text:line-break/><text:line-break/>- ExecutiveMetricsService<text:line-break/>- OperationalMetricsService<text:line-break/>- FinancialMetricsService<text:line-break/>- AIMetricsService<text:line-break/>- CommercialMetricsService<text:line-break/>- DemoDataService<text:line-break/><text:line-break/>Cada service deve:<text:line-break/><text:line-break/>- consultar dados reais<text:line-break/>- aplicar filtros<text:line-break/>- retornar estrutura limpa para gráficos<text:line-break/>- usar cache quando necessário<text:line-break/>- suportar modo demo<text:line-break/><text:line-break/>Filtros comuns:<text:line-break/><text:line-break/>- data inicial<text:line-break/>- data final<text:line-break/>- status<text:line-break/>- tipo de carga<text:line-break/>- transportadora<text:line-break/>- cliente<text:line-break/>- motorista<text:line-break/>- veículo<text:line-break/>- região<text:line-break/>- categoria<text:line-break/><text:line-break/>Endpoints:<text:line-break/><text:line-break/>GET /api/metrics/executive/<text:line-break/>GET /api/metrics/operations/<text:line-break/>GET /api/metrics/financial/<text:line-break/>GET /api/metrics/ai/<text:line-break/>GET /api/metrics/commercial/<text:line-break/>GET /api/metrics/demo/<text:line-break/><text:line-break/>Adicionar cache com Redis para dashboards:<text:line-break/><text:line-break/>- cache por 1 a 5 minutos<text:line-break/>- invalidar em eventos importantes quando possível<text:line-break/><text:line-break/>============================================================<text:line-break/>16. CONSULTAS AVANÇADAS<text:line-break/>============================================================<text:line-break/><text:line-break/>Criar área:<text:line-break/><text:soft-page-break/><text:line-break/>GET /operations/advanced-search/<text:line-break/><text:line-break/>Permitir consultar:<text:line-break/><text:line-break/>- Fretes<text:line-break/>- Clientes<text:line-break/>- Motoristas<text:line-break/>- Veículos<text:line-break/>- Transportadoras<text:line-break/>- Pagamentos<text:line-break/>- Documentos<text:line-break/>- Tickets<text:line-break/>- Conversas de IA<text:line-break/>- Leads comerciais<text:line-break/><text:line-break/>Filtros:<text:line-break/><text:line-break/>- texto livre<text:line-break/>- status<text:line-break/>- data<text:line-break/>- tipo<text:line-break/>- categoria<text:line-break/>- origem<text:line-break/>- destino<text:line-break/>- usuário<text:line-break/>- placa<text:line-break/>- CPF/CNPJ mascarado<text:line-break/>- transportadora<text:line-break/>- valor mínimo/máximo<text:line-break/><text:line-break/>Endpoint:<text:line-break/><text:line-break/>GET /api/operations/search/<text:line-break/><text:line-break/>Resposta agrupada:<text:line-break/><text:line-break/>{<text:line-break/> <text:s/>"success": true,<text:line-break/> <text:s/>"data": {<text:line-break/> <text:s text:c="3"/>"freights": [],<text:line-break/> <text:s text:c="3"/>"drivers": [],<text:line-break/> <text:s text:c="3"/>"vehicles": [],<text:line-break/> <text:s text:c="3"/>"companies": [],<text:line-break/> <text:s text:c="3"/>"payments": [],<text:line-break/> <text:s text:c="3"/>"tickets": [],<text:line-break/> <text:s text:c="3"/>"ai_conversations": [],<text:line-break/> <text:s text:c="3"/>"leads": []<text:line-break/> <text:s/>},<text:line-break/> <text:s/>"message": "Consulta realizada com sucesso."<text:line-break/>}<text:line-break/><text:line-break/>Aplicar permissões rigorosas.<text:line-break/>Mascarar dados sensíveis.<text:line-break/><text:line-break/>============================================================<text:line-break/>17. PÁGINA DE APRESENTAÇÃO PARA INVESTIDOR<text:line-break/>============================================================<text:line-break/><text:line-break/>Criar página:<text:line-break/><text:line-break/>GET /investors/<text:line-break/><text:line-break/>Objetivo:<text:line-break/><text:soft-page-break/><text:line-break/>Ser uma página estilo pitch deck web.<text:line-break/><text:line-break/>Seções:<text:line-break/><text:line-break/>1. Visão geral<text:line-break/>2. Problema<text:line-break/>3. Solução<text:line-break/>4. Produto<text:line-break/>5. Demonstração<text:line-break/>6. Mercado<text:line-break/>7. Modelo de negócio<text:line-break/>8. Diferenciais<text:line-break/>9. Tecnologia<text:line-break/>10. Inteligência Artificial<text:line-break/>11. Segurança e LGPD<text:line-break/>12. Roadmap<text:line-break/>13. Indicadores do MVP<text:line-break/>14. Uso do investimento<text:line-break/>15. Contato<text:line-break/><text:line-break/>Seção "Uso do investimento":<text:line-break/><text:line-break/>- Desenvolvimento mobile<text:line-break/>- Integrações de pagamento<text:line-break/>- Integrações fiscais<text:line-break/>- Infraestrutura cloud<text:line-break/>- Aquisição de motoristas<text:line-break/>- Aquisição de clientes<text:line-break/>- Equipe comercial<text:line-break/>- Segurança e compliance<text:line-break/>- IA e dados<text:line-break/><text:line-break/>Criar CTA:<text:line-break/><text:line-break/>- "Quero conhecer a tese"<text:line-break/>- "Agendar reunião"<text:line-break/>- "Receber apresentação"<text:line-break/><text:line-break/>Salvar contatos em InvestorLead.<text:line-break/><text:line-break/>============================================================<text:line-break/>18. PÁGINA DE PRODUTO<text:line-break/>============================================================<text:line-break/><text:line-break/>Criar página:<text:line-break/><text:line-break/>GET /product/<text:line-break/><text:line-break/>Mostrar módulos do sistema:<text:line-break/><text:line-break/>- Solicitação de fretes<text:line-break/>- Cadastro de motoristas<text:line-break/>- Cadastro de veículos<text:line-break/>- Matching inteligente<text:line-break/>- IA assistente<text:line-break/>- Roteirização<text:line-break/>- ETA<text:line-break/>- Rastreamento<text:line-break/>- Pagamentos<text:line-break/>- Documentos<text:line-break/>- Dashboards<text:line-break/>- Suporte<text:line-break/>- Auditoria<text:line-break/><text:soft-page-break/>- LGPD<text:line-break/><text:line-break/>Cada módulo deve ter card visual com descrição.<text:line-break/><text:line-break/>============================================================<text:line-break/>19. PÁGINA DE TECNOLOGIA<text:line-break/>============================================================<text:line-break/><text:line-break/>Criar página:<text:line-break/><text:line-break/>GET /technology/<text:line-break/><text:line-break/>Mostrar arquitetura:<text:line-break/><text:line-break/>- Django<text:line-break/>- Django REST Framework<text:line-break/>- PostgreSQL/PostGIS<text:line-break/>- Redis<text:line-break/>- Celery<text:line-break/>- Channels<text:line-break/>- WebSocket<text:line-break/>- pgvector<text:line-break/>- IA com RAG<text:line-break/>- APIs externas<text:line-break/>- Cloud ready<text:line-break/>- Docker<text:line-break/>- Kubernetes ready<text:line-break/><text:line-break/>Mostrar diagrama visual simples com HTML/CSS/SVG se possível.<text:line-break/><text:line-break/>============================================================<text:line-break/>20. PÁGINA DE SEGURANÇA E COMPLIANCE<text:line-break/>============================================================<text:line-break/><text:line-break/>Criar página:<text:line-break/><text:line-break/>GET /security/<text:line-break/><text:line-break/>Mostrar:<text:line-break/><text:line-break/>- Autenticação JWT<text:line-break/>- Permissões por perfil<text:line-break/>- Auditoria<text:line-break/>- Logs<text:line-break/>- LGPD<text:line-break/>- Controle de acesso<text:line-break/>- Mascaramento de dados<text:line-break/>- Documentos protegidos<text:line-break/>- Rastreabilidade de eventos<text:line-break/>- Segurança da IA<text:line-break/><text:line-break/>============================================================<text:line-break/>21. COMPONENTES VISUAIS REUTILIZÁVEIS<text:line-break/>============================================================<text:line-break/><text:line-break/>Criar componentes para:<text:line-break/><text:line-break/>- KPI Card<text:line-break/>- Chart Card<text:line-break/>- Status Badge<text:line-break/>- Timeline<text:line-break/>- Activity Feed<text:line-break/>- Map Placeholder<text:line-break/>- Freight Status Card<text:line-break/><text:soft-page-break/>- Driver Card<text:line-break/>- Vehicle Card<text:line-break/>- AI Chat Preview<text:line-break/>- Investor CTA<text:line-break/>- Pricing Simulator<text:line-break/>- Lead Form<text:line-break/>- Dashboard Layout<text:line-break/>- Sidebar<text:line-break/>- Topbar<text:line-break/>- Theme Toggle<text:line-break/>- Loading Skeleton<text:line-break/>- Empty State<text:line-break/>- Error State<text:line-break/><text:line-break/>============================================================<text:line-break/>22. DADOS DEMONSTRATIVOS<text:line-break/>============================================================<text:line-break/><text:line-break/>Atualizar seed:<text:line-break/><text:line-break/>python manage.py seed_initial_data<text:line-break/><text:line-break/>Adicionar dados suficientes para dashboards:<text:line-break/><text:line-break/>- 50 clientes demo<text:line-break/>- 80 motoristas demo<text:line-break/>- 60 veículos demo<text:line-break/>- 20 transportadoras demo<text:line-break/>- 200 fretes demo<text:line-break/>- 150 pagamentos demo<text:line-break/>- 300 tracking events demo<text:line-break/>- 100 notificações demo<text:line-break/>- 50 conversas IA demo<text:line-break/>- 30 tickets suporte demo<text:line-break/>- 20 leads comerciais demo<text:line-break/><text:line-break/>Distribuir os dados por status, datas e categorias para gerar gráficos bonitos.<text:line-break/><text:line-break/>Criar comando opcional:<text:line-break/><text:line-break/>python manage.py seed_demo_dashboard<text:line-break/><text:line-break/>Este comando deve criar apenas dados para apresentação comercial.<text:line-break/><text:line-break/>Garantir que dados demo sejam claramente marcados com:<text:line-break/><text:line-break/>is_demo = true<text:line-break/><text:line-break/>Quando o modelo não tiver campo is_demo, usar metadata ou padrão de nomes.<text:line-break/><text:line-break/>============================================================<text:line-break/>23. CONFIGURAÇÃO DEMO_MODE<text:line-break/>============================================================<text:line-break/><text:line-break/>Adicionar variável no .env.example:<text:line-break/><text:line-break/>DEMO_MODE=true<text:line-break/><text:line-break/>Quando DEMO_MODE=true:<text:line-break/><text:line-break/>- mostrar selo "Modo Demonstração"<text:line-break/>- permitir dados demonstrativos<text:line-break/>- preencher dashboards com simulações<text:line-break/>- facilitar apresentação ao investidor<text:line-break/><text:soft-page-break/><text:line-break/>Quando DEMO_MODE=false:<text:line-break/><text:line-break/>- usar apenas dados reais<text:line-break/>- não mostrar métricas simuladas como reais<text:line-break/><text:line-break/>============================================================<text:line-break/>24. ADMIN DJANGO<text:line-break/>============================================================<text:line-break/><text:line-break/>Customizar Django Admin para:<text:line-break/><text:line-break/>- InvestorLead<text:line-break/>- Métricas comerciais se houver<text:line-break/>- Dados demo<text:line-break/>- Configurações comerciais<text:line-break/>- Leads por status<text:line-break/>- Leads por perfil<text:line-break/>- Leads por origem<text:line-break/><text:line-break/>Adicionar filtros:<text:line-break/><text:line-break/>- perfil<text:line-break/>- status<text:line-break/>- nível de interesse<text:line-break/>- data<text:line-break/>- origem<text:line-break/><text:line-break/>============================================================<text:line-break/>25. PERMISSÕES<text:line-break/>============================================================<text:line-break/><text:line-break/>Definir permissões:<text:line-break/><text:line-break/>Páginas públicas:<text:line-break/><text:line-break/>- /<text:line-break/>- /landing/<text:line-break/>- /investors/<text:line-break/>- /product/<text:line-break/>- /technology/<text:line-break/>- /security/<text:line-break/>- /demo/live-operation/<text:line-break/>- /api/public/freight-simulator/<text:line-break/>- /api/commercial/leads/<text:line-break/><text:line-break/>Páginas protegidas:<text:line-break/><text:line-break/>- dashboards operacionais<text:line-break/>- dashboard financeiro<text:line-break/>- dashboard de IA<text:line-break/>- consultas avançadas<text:line-break/>- leads comerciais<text:line-break/><text:line-break/>Regras:<text:line-break/><text:line-break/>- Admin acessa tudo<text:line-break/>- Operação acessa dashboard operacional<text:line-break/>- Financeiro acessa financeiro<text:line-break/>- Suporte acessa tickets e IA<text:line-break/>- Comercial acessa leads e investidores<text:line-break/>- Cliente acessa apenas seu dashboard<text:line-break/>- Motorista acessa apenas seu dashboard<text:line-break/>- Transportadora acessa apenas seus dados<text:line-break/><text:soft-page-break/><text:line-break/>============================================================<text:line-break/>26. PERFORMANCE<text:line-break/>============================================================<text:line-break/><text:line-break/>Implementar:<text:line-break/><text:line-break/>- cache para métricas<text:line-break/>- paginação nas consultas<text:line-break/>- queries otimizadas<text:line-break/>- select_related e prefetch_related<text:line-break/>- índices se necessário<text:line-break/>- agregações no banco<text:line-break/>- evitar N+1 queries<text:line-break/>- compressão de assets se possível<text:line-break/><text:line-break/>============================================================<text:line-break/>27. RESPONSIVIDADE<text:line-break/>============================================================<text:line-break/><text:line-break/>Todas as páginas devem funcionar bem em:<text:line-break/><text:line-break/>- desktop<text:line-break/>- notebook<text:line-break/>- tablet<text:line-break/>- celular<text:line-break/><text:line-break/>A landing page deve ser bonita no mobile.<text:line-break/><text:line-break/>Os dashboards devem adaptar cards e gráficos para telas menores.<text:line-break/><text:line-break/>============================================================<text:line-break/>28. ACESSIBILIDADE<text:line-break/>============================================================<text:line-break/><text:line-break/>Implementar:<text:line-break/><text:line-break/>- contraste adequado<text:line-break/>- labels nos formulários<text:line-break/>- navegação por teclado básica<text:line-break/>- textos alternativos<text:line-break/>- botões claros<text:line-break/>- feedback de erro/sucesso<text:line-break/><text:line-break/>============================================================<text:line-break/>29. SEO BÁSICO<text:line-break/>============================================================<text:line-break/><text:line-break/>Para páginas públicas, adicionar:<text:line-break/><text:line-break/>- title<text:line-break/>- meta description<text:line-break/>- Open Graph<text:line-break/>- favicon<text:line-break/>- robots básico<text:line-break/>- sitemap simples se possível<text:line-break/><text:line-break/>Exemplos de títulos:<text:line-break/><text:line-break/>- "Uber da Logística | Plataforma Inteligente de Fretes com IA"<text:line-break/>- "Sistema Inteligente de Logística com Rastreamento em Tempo Real"<text:line-break/>- "Logística com IA, Matching de Fretes e Dashboards Executivos"<text:line-break/><text:line-break/>============================================================<text:line-break/><text:soft-page-break/>30. TESTES<text:line-break/>============================================================<text:line-break/><text:line-break/>Criar testes para:<text:line-break/><text:line-break/>- acesso à landing page<text:line-break/>- envio de lead<text:line-break/>- simulador de frete público<text:line-break/>- dashboard executivo autenticado<text:line-break/>- dashboard operacional autenticado<text:line-break/>- dashboard financeiro com permissão<text:line-break/>- bloqueio de acesso sem permissão<text:line-break/>- métricas executivas retornando estrutura correta<text:line-break/>- modo demo ativo<text:line-break/>- consulta avançada<text:line-break/>- mascaramento de dados sensíveis<text:line-break/>- seed_demo_dashboard<text:line-break/><text:line-break/>============================================================<text:line-break/>31. DOCUMENTAÇÃO<text:line-break/>============================================================<text:line-break/><text:line-break/>Atualizar README com:<text:line-break/><text:line-break/>- objetivo do Módulo 6<text:line-break/>- rotas públicas<text:line-break/>- rotas de dashboards<text:line-break/>- endpoints de métricas<text:line-break/>- como ativar DEMO_MODE<text:line-break/>- como gerar dados demo<text:line-break/>- como acessar a apresentação de investidores<text:line-break/>- como usar simulador público<text:line-break/>- como testar permissões<text:line-break/>- como personalizar identidade visual<text:line-break/><text:line-break/>Criar também arquivo:<text:line-break/><text:line-break/>docs/investor_demo.md<text:line-break/><text:line-break/>Conteúdo:<text:line-break/><text:line-break/>- roteiro para apresentação ao investidor<text:line-break/>- páginas que devem ser mostradas<text:line-break/>- sequência recomendada<text:line-break/>- principais argumentos<text:line-break/>- principais métricas simuladas<text:line-break/>- cuidado para explicar dados demo<text:line-break/>- proposta de valor<text:line-break/>- modelo de negócio<text:line-break/>- próximos passos<text:line-break/><text:line-break/>============================================================<text:line-break/>32. ROTEIRO DE DEMONSTRAÇÃO PARA INVESTIDOR<text:line-break/>============================================================<text:line-break/><text:line-break/>Criar no docs/investor_demo.md um roteiro como:<text:line-break/><text:line-break/>1. Abrir landing page<text:line-break/>2. Mostrar o problema da logística<text:line-break/>3. Mostrar a solução<text:line-break/>4. Simular um frete<text:line-break/>5. Mostrar recomendação de veículo<text:line-break/>6. Mostrar dashboard executivo<text:line-break/>7. Mostrar operação em tempo real<text:line-break/><text:soft-page-break/>8. Mostrar rastreamento<text:line-break/>9. Mostrar IA respondendo dúvidas<text:line-break/>10. Mostrar dashboard financeiro<text:line-break/>11. Mostrar roadmap<text:line-break/>12. Finalizar com chamada de investimento<text:line-break/><text:line-break/>============================================================<text:line-break/>33. CRITÉRIOS DE ACEITE DO MÓDULO 6<text:line-break/>============================================================<text:line-break/><text:line-break/>O módulo estará pronto quando:<text:line-break/><text:line-break/>1. A página inicial pública estiver visualmente forte e persuasiva.<text:line-break/>2. A página de investidores funcionar como pitch deck web.<text:line-break/>3. O simulador público de frete funcionar.<text:line-break/>4. O formulário de lead salvar dados no banco.<text:line-break/>5. Dashboard executivo funcionar.<text:line-break/>6. Dashboard operacional funcionar.<text:line-break/>7. Dashboard financeiro funcionar.<text:line-break/>8. Dashboard de IA funcionar.<text:line-break/>9. Portal do cliente tiver dashboard melhorado.<text:line-break/>10. Portal da transportadora tiver dashboard melhorado.<text:line-break/>11. Portal do motorista tiver dashboard.<text:line-break/>12. Consulta avançada funcionar.<text:line-break/>13. Modo demonstração funcionar.<text:line-break/>14. Seed demo gerar dados para apresentação.<text:line-break/>15. Dados demo forem identificados corretamente.<text:line-break/>16. Permissões estiverem protegendo dashboards.<text:line-break/>17. Layout for responsivo.<text:line-break/>18. README e docs/investor_demo.md estiverem atualizados.<text:line-break/>19. Testes principais passarem.<text:line-break/>20. O sistema estiver pronto para ser apresentado a um investidor.<text:line-break/><text:line-break/>Implemente este módulo com código real, templates ou frontend moderno, APIs, services, serializers, views, URLs, permissions, admin, testes, seed demo e documentação.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1:15:45.319355400</meta:creation-date>
    <dc:date>2026-05-31T00:06:56.964936900</dc:date>
    <meta:editing-duration>PT2H40M49S</meta:editing-duration>
    <meta:editing-cycles>1</meta:editing-cycles>
    <meta:generator>LibreOffice/26.2.3.2$Windows_X86_64 LibreOffice_project/70e089b17412e4cb7773e41413306b17a2328c34</meta:generator>
    <meta:document-statistic meta:table-count="0" meta:image-count="0" meta:object-count="0" meta:page-count="32" meta:paragraph-count="227" meta:word-count="4919" meta:character-count="39671" meta:non-whitespace-character-count="34533"/>
  </office:meta>
</office:document-meta>
</file>